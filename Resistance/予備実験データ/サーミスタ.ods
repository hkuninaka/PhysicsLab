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サーミスタ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1]/[.B1]" office:value-type="float" office:value="2113.20754716981" calcext:value-type="float">
            <text:p>2113.20754716981</text:p>
          </table:table-cell>
          <table:table-cell table:formula="of:=1/[.D1]" office:value-type="float" office:value="0.0418410041841004" calcext:value-type="float">
            <text:p>0.0418410041841004</text:p>
          </table:table-cell>
          <table:table-cell table:formula="of:=LOG10([.E1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2]/[.B2]" office:value-type="float" office:value="1056.60377358491" calcext:value-type="float">
            <text:p>1056.60377358491</text:p>
          </table:table-cell>
          <table:table-cell table:formula="of:=1/[.D2]" office:value-type="float" office:value="0.0418410041841004" calcext:value-type="float">
            <text:p>0.0418410041841004</text:p>
          </table:table-cell>
          <table:table-cell table:formula="of:=LOG10([.E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3]/[.B3]" office:value-type="float" office:value="1408.80503144654" calcext:value-type="float">
            <text:p>1408.80503144654</text:p>
          </table:table-cell>
          <table:table-cell table:formula="of:=1/[.D3]" office:value-type="float" office:value="0.0418410041841004" calcext:value-type="float">
            <text:p>0.0418410041841004</text:p>
          </table:table-cell>
          <table:table-cell table:formula="of:=LOG10([.E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5" calcext:value-type="float">
            <text:p>2.25</text:p>
          </table:table-cell>
          <table:table-cell office:value-type="float" office:value="23.9" calcext:value-type="float">
            <text:p>23.9</text:p>
          </table:table-cell>
          <table:table-cell table:formula="of:=[.C4]/[.B4]" office:value-type="float" office:value="2122.64150943396" calcext:value-type="float">
            <text:p>2122.64150943396</text:p>
          </table:table-cell>
          <table:table-cell table:formula="of:=1/[.D4]" office:value-type="float" office:value="0.0418410041841004" calcext:value-type="float">
            <text:p>0.0418410041841004</text:p>
          </table:table-cell>
          <table:table-cell table:formula="of:=LOG10([.E4])" office:value-type="float" office:value="3.32687665284659" calcext:value-type="float">
            <text:p>3.32687665284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5]/[.B5]" office:value-type="float" office:value="1408.80503144654" calcext:value-type="float">
            <text:p>1408.80503144654</text:p>
          </table:table-cell>
          <table:table-cell table:formula="of:=1/[.D5]" office:value-type="float" office:value="0.0418410041841004" calcext:value-type="float">
            <text:p>0.0418410041841004</text:p>
          </table:table-cell>
          <table:table-cell table:formula="of:=LOG10([.E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6]/[.B6]" office:value-type="float" office:value="845.283018867925" calcext:value-type="float">
            <text:p>845.283018867925</text:p>
          </table:table-cell>
          <table:table-cell table:formula="of:=1/[.D6]" office:value-type="float" office:value="0.0418410041841004" calcext:value-type="float">
            <text:p>0.0418410041841004</text:p>
          </table:table-cell>
          <table:table-cell table:formula="of:=LOG10([.E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7]/[.B7]" office:value-type="float" office:value="845.283018867925" calcext:value-type="float">
            <text:p>845.283018867925</text:p>
          </table:table-cell>
          <table:table-cell table:formula="of:=1/[.D7]" office:value-type="float" office:value="0.0418410041841004" calcext:value-type="float">
            <text:p>0.0418410041841004</text:p>
          </table:table-cell>
          <table:table-cell table:formula="of:=LOG10([.E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8]/[.B8]" office:value-type="float" office:value="2113.20754716981" calcext:value-type="float">
            <text:p>2113.20754716981</text:p>
          </table:table-cell>
          <table:table-cell table:formula="of:=1/[.D8]" office:value-type="float" office:value="0.0418410041841004" calcext:value-type="float">
            <text:p>0.0418410041841004</text:p>
          </table:table-cell>
          <table:table-cell table:formula="of:=LOG10([.E8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9]/[.B9]" office:value-type="float" office:value="2113.20754716981" calcext:value-type="float">
            <text:p>2113.20754716981</text:p>
          </table:table-cell>
          <table:table-cell table:formula="of:=1/[.D9]" office:value-type="float" office:value="0.0418410041841004" calcext:value-type="float">
            <text:p>0.0418410041841004</text:p>
          </table:table-cell>
          <table:table-cell table:formula="of:=LOG10([.E9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10]/[.B10]" office:value-type="float" office:value="1408.80503144654" calcext:value-type="float">
            <text:p>1408.80503144654</text:p>
          </table:table-cell>
          <table:table-cell table:formula="of:=1/[.D10]" office:value-type="float" office:value="0.0418410041841004" calcext:value-type="float">
            <text:p>0.0418410041841004</text:p>
          </table:table-cell>
          <table:table-cell table:formula="of:=LOG10([.E10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23.9" calcext:value-type="float">
            <text:p>23.9</text:p>
          </table:table-cell>
          <table:table-cell table:formula="of:=[.C11]/[.B11]" office:value-type="float" office:value="1056.60377358491" calcext:value-type="float">
            <text:p>1056.60377358491</text:p>
          </table:table-cell>
          <table:table-cell table:formula="of:=1/[.D11]" office:value-type="float" office:value="0.0418410041841004" calcext:value-type="float">
            <text:p>0.0418410041841004</text:p>
          </table:table-cell>
          <table:table-cell table:formula="of:=LOG10([.E1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24.5" calcext:value-type="float">
            <text:p>24.5</text:p>
          </table:table-cell>
          <table:table-cell table:formula="of:=[.C12]/[.B12]" office:value-type="float" office:value="2113.20754716981" calcext:value-type="float">
            <text:p>2113.20754716981</text:p>
          </table:table-cell>
          <table:table-cell table:formula="of:=1/[.D12]" office:value-type="float" office:value="0.0408163265306122" calcext:value-type="float">
            <text:p>0.0408163265306122</text:p>
          </table:table-cell>
          <table:table-cell table:formula="of:=LOG10([.E12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3]/[.B13]" office:value-type="float" office:value="1056.60377358491" calcext:value-type="float">
            <text:p>1056.60377358491</text:p>
          </table:table-cell>
          <table:table-cell table:formula="of:=1/[.D13]" office:value-type="float" office:value="0.0266666666666667" calcext:value-type="float">
            <text:p>0.0266666666666667</text:p>
          </table:table-cell>
          <table:table-cell table:formula="of:=LOG10([.E1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54.2" calcext:value-type="float">
            <text:p>54.2</text:p>
          </table:table-cell>
          <table:table-cell table:formula="of:=[.C14]/[.B14]" office:value-type="float" office:value="1408.80503144654" calcext:value-type="float">
            <text:p>1408.80503144654</text:p>
          </table:table-cell>
          <table:table-cell table:formula="of:=1/[.D14]" office:value-type="float" office:value="0.018450184501845" calcext:value-type="float">
            <text:p>0.018450184501845</text:p>
          </table:table-cell>
          <table:table-cell table:formula="of:=LOG10([.E14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64.1" calcext:value-type="float">
            <text:p>64.1</text:p>
          </table:table-cell>
          <table:table-cell table:formula="of:=[.C15]/[.B15]" office:value-type="float" office:value="1408.80503144654" calcext:value-type="float">
            <text:p>1408.80503144654</text:p>
          </table:table-cell>
          <table:table-cell table:formula="of:=1/[.D15]" office:value-type="float" office:value="0.015600624024961" calcext:value-type="float">
            <text:p>0.015600624024961</text:p>
          </table:table-cell>
          <table:table-cell table:formula="of:=LOG10([.E1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69.9" calcext:value-type="float">
            <text:p>69.9</text:p>
          </table:table-cell>
          <table:table-cell table:formula="of:=[.C16]/[.B16]" office:value-type="float" office:value="1408.80503144654" calcext:value-type="float">
            <text:p>1408.80503144654</text:p>
          </table:table-cell>
          <table:table-cell table:formula="of:=1/[.D16]" office:value-type="float" office:value="0.0143061516452074" calcext:value-type="float">
            <text:p>0.0143061516452074</text:p>
          </table:table-cell>
          <table:table-cell table:formula="of:=LOG10([.E1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73.5" calcext:value-type="float">
            <text:p>73.5</text:p>
          </table:table-cell>
          <table:table-cell table:formula="of:=[.C17]/[.B17]" office:value-type="float" office:value="1408.80503144654" calcext:value-type="float">
            <text:p>1408.80503144654</text:p>
          </table:table-cell>
          <table:table-cell table:formula="of:=1/[.D17]" office:value-type="float" office:value="0.0136054421768707" calcext:value-type="float">
            <text:p>0.0136054421768707</text:p>
          </table:table-cell>
          <table:table-cell table:formula="of:=LOG10([.E1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75.4" calcext:value-type="float">
            <text:p>75.4</text:p>
          </table:table-cell>
          <table:table-cell table:formula="of:=[.C18]/[.B18]" office:value-type="float" office:value="2113.20754716981" calcext:value-type="float">
            <text:p>2113.20754716981</text:p>
          </table:table-cell>
          <table:table-cell table:formula="of:=1/[.D18]" office:value-type="float" office:value="0.013262599469496" calcext:value-type="float">
            <text:p>0.013262599469496</text:p>
          </table:table-cell>
          <table:table-cell table:formula="of:=LOG10([.E18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76.6" calcext:value-type="float">
            <text:p>76.6</text:p>
          </table:table-cell>
          <table:table-cell table:formula="of:=[.C19]/[.B19]" office:value-type="float" office:value="1402.51572327044" calcext:value-type="float">
            <text:p>1402.51572327044</text:p>
          </table:table-cell>
          <table:table-cell table:formula="of:=1/[.D19]" office:value-type="float" office:value="0.0130548302872063" calcext:value-type="float">
            <text:p>0.0130548302872063</text:p>
          </table:table-cell>
          <table:table-cell table:formula="of:=LOG10([.E19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77" calcext:value-type="float">
            <text:p>77</text:p>
          </table:table-cell>
          <table:table-cell table:formula="of:=[.C20]/[.B20]" office:value-type="float" office:value="845.283018867925" calcext:value-type="float">
            <text:p>845.283018867925</text:p>
          </table:table-cell>
          <table:table-cell table:formula="of:=1/[.D20]" office:value-type="float" office:value="0.012987012987013" calcext:value-type="float">
            <text:p>0.012987012987013</text:p>
          </table:table-cell>
          <table:table-cell table:formula="of:=LOG10([.E2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77.2" calcext:value-type="float">
            <text:p>77.2</text:p>
          </table:table-cell>
          <table:table-cell table:formula="of:=[.C21]/[.B21]" office:value-type="float" office:value="422.641509433962" calcext:value-type="float">
            <text:p>422.641509433962</text:p>
          </table:table-cell>
          <table:table-cell table:formula="of:=1/[.D21]" office:value-type="float" office:value="0.0129533678756477" calcext:value-type="float">
            <text:p>0.0129533678756477</text:p>
          </table:table-cell>
          <table:table-cell table:formula="of:=LOG10([.E21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77" calcext:value-type="float">
            <text:p>77</text:p>
          </table:table-cell>
          <table:table-cell table:formula="of:=[.C22]/[.B22]" office:value-type="float" office:value="704.402515723271" calcext:value-type="float">
            <text:p>704.402515723271</text:p>
          </table:table-cell>
          <table:table-cell table:formula="of:=1/[.D22]" office:value-type="float" office:value="0.012987012987013" calcext:value-type="float">
            <text:p>0.012987012987013</text:p>
          </table:table-cell>
          <table:table-cell table:formula="of:=LOG10([.E2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76.9" calcext:value-type="float">
            <text:p>76.9</text:p>
          </table:table-cell>
          <table:table-cell table:formula="of:=[.C23]/[.B23]" office:value-type="float" office:value="601.078167115903" calcext:value-type="float">
            <text:p>601.078167115903</text:p>
          </table:table-cell>
          <table:table-cell table:formula="of:=1/[.D23]" office:value-type="float" office:value="0.0130039011703511" calcext:value-type="float">
            <text:p>0.0130039011703511</text:p>
          </table:table-cell>
          <table:table-cell table:formula="of:=LOG10([.E23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76.7" calcext:value-type="float">
            <text:p>76.7</text:p>
          </table:table-cell>
          <table:table-cell table:formula="of:=[.C24]/[.B24]" office:value-type="float" office:value="603.77358490566" calcext:value-type="float">
            <text:p>603.77358490566</text:p>
          </table:table-cell>
          <table:table-cell table:formula="of:=1/[.D24]" office:value-type="float" office:value="0.0130378096479791" calcext:value-type="float">
            <text:p>0.0130378096479791</text:p>
          </table:table-cell>
          <table:table-cell table:formula="of:=LOG10([.E2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76.6" calcext:value-type="float">
            <text:p>76.6</text:p>
          </table:table-cell>
          <table:table-cell table:formula="of:=[.C25]/[.B25]" office:value-type="float" office:value="528.301886792453" calcext:value-type="float">
            <text:p>528.301886792453</text:p>
          </table:table-cell>
          <table:table-cell table:formula="of:=1/[.D25]" office:value-type="float" office:value="0.0130548302872063" calcext:value-type="float">
            <text:p>0.0130548302872063</text:p>
          </table:table-cell>
          <table:table-cell table:formula="of:=LOG10([.E25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76.6" calcext:value-type="float">
            <text:p>76.6</text:p>
          </table:table-cell>
          <table:table-cell table:formula="of:=[.C26]/[.B26]" office:value-type="float" office:value="525.943396226415" calcext:value-type="float">
            <text:p>525.943396226415</text:p>
          </table:table-cell>
          <table:table-cell table:formula="of:=1/[.D26]" office:value-type="float" office:value="0.0130548302872063" calcext:value-type="float">
            <text:p>0.0130548302872063</text:p>
          </table:table-cell>
          <table:table-cell table:formula="of:=LOG10([.E26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76.5" calcext:value-type="float">
            <text:p>76.5</text:p>
          </table:table-cell>
          <table:table-cell table:formula="of:=[.C27]/[.B27]" office:value-type="float" office:value="528.301886792453" calcext:value-type="float">
            <text:p>528.301886792453</text:p>
          </table:table-cell>
          <table:table-cell table:formula="of:=1/[.D27]" office:value-type="float" office:value="0.0130718954248366" calcext:value-type="float">
            <text:p>0.0130718954248366</text:p>
          </table:table-cell>
          <table:table-cell table:formula="of:=LOG10([.E2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6.4" calcext:value-type="float">
            <text:p>76.4</text:p>
          </table:table-cell>
          <table:table-cell table:formula="of:=[.C28]/[.B28]" office:value-type="float" office:value="467.505241090147" calcext:value-type="float">
            <text:p>467.505241090147</text:p>
          </table:table-cell>
          <table:table-cell table:formula="of:=1/[.D28]" office:value-type="float" office:value="0.0130890052356021" calcext:value-type="float">
            <text:p>0.0130890052356021</text:p>
          </table:table-cell>
          <table:table-cell table:formula="of:=LOG10([.E28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6.2" calcext:value-type="float">
            <text:p>76.2</text:p>
          </table:table-cell>
          <table:table-cell table:formula="of:=[.C29]/[.B29]" office:value-type="float" office:value="467.505241090147" calcext:value-type="float">
            <text:p>467.505241090147</text:p>
          </table:table-cell>
          <table:table-cell table:formula="of:=1/[.D29]" office:value-type="float" office:value="0.0131233595800525" calcext:value-type="float">
            <text:p>0.0131233595800525</text:p>
          </table:table-cell>
          <table:table-cell table:formula="of:=LOG10([.E29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5.8" calcext:value-type="float">
            <text:p>75.8</text:p>
          </table:table-cell>
          <table:table-cell table:formula="of:=[.C30]/[.B30]" office:value-type="float" office:value="467.505241090147" calcext:value-type="float">
            <text:p>467.505241090147</text:p>
          </table:table-cell>
          <table:table-cell table:formula="of:=1/[.D30]" office:value-type="float" office:value="0.0131926121372032" calcext:value-type="float">
            <text:p>0.0131926121372032</text:p>
          </table:table-cell>
          <table:table-cell table:formula="of:=LOG10([.E30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75.4" calcext:value-type="float">
            <text:p>75.4</text:p>
          </table:table-cell>
          <table:table-cell table:formula="of:=[.C31]/[.B31]" office:value-type="float" office:value="420.754716981132" calcext:value-type="float">
            <text:p>420.754716981132</text:p>
          </table:table-cell>
          <table:table-cell table:formula="of:=1/[.D31]" office:value-type="float" office:value="0.013262599469496" calcext:value-type="float">
            <text:p>0.013262599469496</text:p>
          </table:table-cell>
          <table:table-cell table:formula="of:=LOG10([.E3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5" calcext:value-type="float">
            <text:p>75</text:p>
          </table:table-cell>
          <table:table-cell table:formula="of:=[.C32]/[.B32]" office:value-type="float" office:value="467.505241090147" calcext:value-type="float">
            <text:p>467.505241090147</text:p>
          </table:table-cell>
          <table:table-cell table:formula="of:=1/[.D32]" office:value-type="float" office:value="0.0133333333333333" calcext:value-type="float">
            <text:p>0.0133333333333333</text:p>
          </table:table-cell>
          <table:table-cell table:formula="of:=LOG10([.E32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74.6" calcext:value-type="float">
            <text:p>74.6</text:p>
          </table:table-cell>
          <table:table-cell table:formula="of:=[.C33]/[.B33]" office:value-type="float" office:value="525.943396226415" calcext:value-type="float">
            <text:p>525.943396226415</text:p>
          </table:table-cell>
          <table:table-cell table:formula="of:=1/[.D33]" office:value-type="float" office:value="0.0134048257372654" calcext:value-type="float">
            <text:p>0.0134048257372654</text:p>
          </table:table-cell>
          <table:table-cell table:formula="of:=LOG10([.E33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74.2" calcext:value-type="float">
            <text:p>74.2</text:p>
          </table:table-cell>
          <table:table-cell table:formula="of:=[.C34]/[.B34]" office:value-type="float" office:value="601.078167115903" calcext:value-type="float">
            <text:p>601.078167115903</text:p>
          </table:table-cell>
          <table:table-cell table:formula="of:=1/[.D34]" office:value-type="float" office:value="0.0134770889487871" calcext:value-type="float">
            <text:p>0.0134770889487871</text:p>
          </table:table-cell>
          <table:table-cell table:formula="of:=LOG10([.E34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3.9" calcext:value-type="float">
            <text:p>73.9</text:p>
          </table:table-cell>
          <table:table-cell table:formula="of:=[.C35]/[.B35]" office:value-type="float" office:value="467.505241090147" calcext:value-type="float">
            <text:p>467.505241090147</text:p>
          </table:table-cell>
          <table:table-cell table:formula="of:=1/[.D35]" office:value-type="float" office:value="0.013531799729364" calcext:value-type="float">
            <text:p>0.013531799729364</text:p>
          </table:table-cell>
          <table:table-cell table:formula="of:=LOG10([.E3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3.5" calcext:value-type="float">
            <text:p>73.5</text:p>
          </table:table-cell>
          <table:table-cell table:formula="of:=[.C36]/[.B36]" office:value-type="float" office:value="467.505241090147" calcext:value-type="float">
            <text:p>467.505241090147</text:p>
          </table:table-cell>
          <table:table-cell table:formula="of:=1/[.D36]" office:value-type="float" office:value="0.0136054421768707" calcext:value-type="float">
            <text:p>0.0136054421768707</text:p>
          </table:table-cell>
          <table:table-cell table:formula="of:=LOG10([.E36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3" calcext:value-type="float">
            <text:p>2.23</text:p>
          </table:table-cell>
          <table:table-cell office:value-type="float" office:value="73.2" calcext:value-type="float">
            <text:p>73.2</text:p>
          </table:table-cell>
          <table:table-cell table:formula="of:=[.C37]/[.B37]" office:value-type="float" office:value="350.62893081761" calcext:value-type="float">
            <text:p>350.62893081761</text:p>
          </table:table-cell>
          <table:table-cell table:formula="of:=1/[.D37]" office:value-type="float" office:value="0.0136612021857924" calcext:value-type="float">
            <text:p>0.0136612021857924</text:p>
          </table:table-cell>
          <table:table-cell table:formula="of:=LOG10([.E37])" office:value-type="float" office:value="2.54484774739975" calcext:value-type="float">
            <text:p>2.54484774739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3" calcext:value-type="float">
            <text:p>2.23</text:p>
          </table:table-cell>
          <table:table-cell office:value-type="float" office:value="72.9" calcext:value-type="float">
            <text:p>72.9</text:p>
          </table:table-cell>
          <table:table-cell table:formula="of:=[.C38]/[.B38]" office:value-type="float" office:value="323.657474600871" calcext:value-type="float">
            <text:p>323.657474600871</text:p>
          </table:table-cell>
          <table:table-cell table:formula="of:=1/[.D38]" office:value-type="float" office:value="0.0137174211248285" calcext:value-type="float">
            <text:p>0.0137174211248285</text:p>
          </table:table-cell>
          <table:table-cell table:formula="of:=LOG10([.E38])" office:value-type="float" office:value="2.51008564114054" calcext:value-type="float">
            <text:p>2.510085641140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72.5" calcext:value-type="float">
            <text:p>72.5</text:p>
          </table:table-cell>
          <table:table-cell table:formula="of:=[.C39]/[.B39]" office:value-type="float" office:value="382.504288164666" calcext:value-type="float">
            <text:p>382.504288164666</text:p>
          </table:table-cell>
          <table:table-cell table:formula="of:=1/[.D39]" office:value-type="float" office:value="0.0137931034482759" calcext:value-type="float">
            <text:p>0.0137931034482759</text:p>
          </table:table-cell>
          <table:table-cell table:formula="of:=LOG10([.E39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72.3" calcext:value-type="float">
            <text:p>72.3</text:p>
          </table:table-cell>
          <table:table-cell table:formula="of:=[.C40]/[.B40]" office:value-type="float" office:value="420.754716981132" calcext:value-type="float">
            <text:p>420.754716981132</text:p>
          </table:table-cell>
          <table:table-cell table:formula="of:=1/[.D40]" office:value-type="float" office:value="0.0138312586445367" calcext:value-type="float">
            <text:p>0.0138312586445367</text:p>
          </table:table-cell>
          <table:table-cell table:formula="of:=LOG10([.E40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71.8" calcext:value-type="float">
            <text:p>71.8</text:p>
          </table:table-cell>
          <table:table-cell table:formula="of:=[.C41]/[.B41]" office:value-type="float" office:value="420.754716981132" calcext:value-type="float">
            <text:p>420.754716981132</text:p>
          </table:table-cell>
          <table:table-cell table:formula="of:=1/[.D41]" office:value-type="float" office:value="0.0139275766016713" calcext:value-type="float">
            <text:p>0.0139275766016713</text:p>
          </table:table-cell>
          <table:table-cell table:formula="of:=LOG10([.E4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71.4" calcext:value-type="float">
            <text:p>71.4</text:p>
          </table:table-cell>
          <table:table-cell table:formula="of:=[.C42]/[.B42]" office:value-type="float" office:value="420.754716981132" calcext:value-type="float">
            <text:p>420.754716981132</text:p>
          </table:table-cell>
          <table:table-cell table:formula="of:=1/[.D42]" office:value-type="float" office:value="0.0140056022408964" calcext:value-type="float">
            <text:p>0.0140056022408964</text:p>
          </table:table-cell>
          <table:table-cell table:formula="of:=LOG10([.E42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71" calcext:value-type="float">
            <text:p>71</text:p>
          </table:table-cell>
          <table:table-cell table:formula="of:=[.C43]/[.B43]" office:value-type="float" office:value="420.754716981132" calcext:value-type="float">
            <text:p>420.754716981132</text:p>
          </table:table-cell>
          <table:table-cell table:formula="of:=1/[.D43]" office:value-type="float" office:value="0.0140845070422535" calcext:value-type="float">
            <text:p>0.0140845070422535</text:p>
          </table:table-cell>
          <table:table-cell table:formula="of:=LOG10([.E43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0.5" calcext:value-type="float">
            <text:p>70.5</text:p>
          </table:table-cell>
          <table:table-cell table:formula="of:=[.C44]/[.B44]" office:value-type="float" office:value="467.505241090147" calcext:value-type="float">
            <text:p>467.505241090147</text:p>
          </table:table-cell>
          <table:table-cell table:formula="of:=1/[.D44]" office:value-type="float" office:value="0.0141843971631206" calcext:value-type="float">
            <text:p>0.0141843971631206</text:p>
          </table:table-cell>
          <table:table-cell table:formula="of:=LOG10([.E44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70.3" calcext:value-type="float">
            <text:p>70.3</text:p>
          </table:table-cell>
          <table:table-cell table:formula="of:=[.C45]/[.B45]" office:value-type="float" office:value="467.505241090147" calcext:value-type="float">
            <text:p>467.505241090147</text:p>
          </table:table-cell>
          <table:table-cell table:formula="of:=1/[.D45]" office:value-type="float" office:value="0.0142247510668563" calcext:value-type="float">
            <text:p>0.0142247510668563</text:p>
          </table:table-cell>
          <table:table-cell table:formula="of:=LOG10([.E4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69.9" calcext:value-type="float">
            <text:p>69.9</text:p>
          </table:table-cell>
          <table:table-cell table:formula="of:=[.C46]/[.B46]" office:value-type="float" office:value="422.641509433962" calcext:value-type="float">
            <text:p>422.641509433962</text:p>
          </table:table-cell>
          <table:table-cell table:formula="of:=1/[.D46]" office:value-type="float" office:value="0.0143061516452074" calcext:value-type="float">
            <text:p>0.0143061516452074</text:p>
          </table:table-cell>
          <table:table-cell table:formula="of:=LOG10([.E46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69.7" calcext:value-type="float">
            <text:p>69.7</text:p>
          </table:table-cell>
          <table:table-cell table:formula="of:=[.C47]/[.B47]" office:value-type="float" office:value="382.504288164666" calcext:value-type="float">
            <text:p>382.504288164666</text:p>
          </table:table-cell>
          <table:table-cell table:formula="of:=1/[.D47]" office:value-type="float" office:value="0.0143472022955524" calcext:value-type="float">
            <text:p>0.0143472022955524</text:p>
          </table:table-cell>
          <table:table-cell table:formula="of:=LOG10([.E47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69.4" calcext:value-type="float">
            <text:p>69.4</text:p>
          </table:table-cell>
          <table:table-cell table:formula="of:=[.C48]/[.B48]" office:value-type="float" office:value="382.504288164666" calcext:value-type="float">
            <text:p>382.504288164666</text:p>
          </table:table-cell>
          <table:table-cell table:formula="of:=1/[.D48]" office:value-type="float" office:value="0.0144092219020173" calcext:value-type="float">
            <text:p>0.0144092219020173</text:p>
          </table:table-cell>
          <table:table-cell table:formula="of:=LOG10([.E48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3" calcext:value-type="float">
            <text:p>2.23</text:p>
          </table:table-cell>
          <table:table-cell office:value-type="float" office:value="69" calcext:value-type="float">
            <text:p>69</text:p>
          </table:table-cell>
          <table:table-cell table:formula="of:=[.C49]/[.B49]" office:value-type="float" office:value="323.657474600871" calcext:value-type="float">
            <text:p>323.657474600871</text:p>
          </table:table-cell>
          <table:table-cell table:formula="of:=1/[.D49]" office:value-type="float" office:value="0.0144927536231884" calcext:value-type="float">
            <text:p>0.0144927536231884</text:p>
          </table:table-cell>
          <table:table-cell table:formula="of:=LOG10([.E49])" office:value-type="float" office:value="2.51008564114054" calcext:value-type="float">
            <text:p>2.51008564114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68.6" calcext:value-type="float">
            <text:p>68.6</text:p>
          </table:table-cell>
          <table:table-cell table:formula="of:=[.C50]/[.B50]" office:value-type="float" office:value="382.504288164666" calcext:value-type="float">
            <text:p>382.504288164666</text:p>
          </table:table-cell>
          <table:table-cell table:formula="of:=1/[.D50]" office:value-type="float" office:value="0.0145772594752187" calcext:value-type="float">
            <text:p>0.0145772594752187</text:p>
          </table:table-cell>
          <table:table-cell table:formula="of:=LOG10([.E50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8.2" calcext:value-type="float">
            <text:p>68.2</text:p>
          </table:table-cell>
          <table:table-cell table:formula="of:=[.C51]/[.B51]" office:value-type="float" office:value="420.754716981132" calcext:value-type="float">
            <text:p>420.754716981132</text:p>
          </table:table-cell>
          <table:table-cell table:formula="of:=1/[.D51]" office:value-type="float" office:value="0.0146627565982405" calcext:value-type="float">
            <text:p>0.0146627565982405</text:p>
          </table:table-cell>
          <table:table-cell table:formula="of:=LOG10([.E5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7.9" calcext:value-type="float">
            <text:p>67.9</text:p>
          </table:table-cell>
          <table:table-cell table:formula="of:=[.C52]/[.B52]" office:value-type="float" office:value="420.754716981132" calcext:value-type="float">
            <text:p>420.754716981132</text:p>
          </table:table-cell>
          <table:table-cell table:formula="of:=1/[.D52]" office:value-type="float" office:value="0.0147275405007364" calcext:value-type="float">
            <text:p>0.0147275405007364</text:p>
          </table:table-cell>
          <table:table-cell table:formula="of:=LOG10([.E52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7.6" calcext:value-type="float">
            <text:p>67.6</text:p>
          </table:table-cell>
          <table:table-cell table:formula="of:=[.C53]/[.B53]" office:value-type="float" office:value="420.754716981132" calcext:value-type="float">
            <text:p>420.754716981132</text:p>
          </table:table-cell>
          <table:table-cell table:formula="of:=1/[.D53]" office:value-type="float" office:value="0.014792899408284" calcext:value-type="float">
            <text:p>0.014792899408284</text:p>
          </table:table-cell>
          <table:table-cell table:formula="of:=LOG10([.E53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7.3" calcext:value-type="float">
            <text:p>67.3</text:p>
          </table:table-cell>
          <table:table-cell table:formula="of:=[.C54]/[.B54]" office:value-type="float" office:value="420.754716981132" calcext:value-type="float">
            <text:p>420.754716981132</text:p>
          </table:table-cell>
          <table:table-cell table:formula="of:=1/[.D54]" office:value-type="float" office:value="0.0148588410104012" calcext:value-type="float">
            <text:p>0.0148588410104012</text:p>
          </table:table-cell>
          <table:table-cell table:formula="of:=LOG10([.E54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7" calcext:value-type="float">
            <text:p>67</text:p>
          </table:table-cell>
          <table:table-cell table:formula="of:=[.C55]/[.B55]" office:value-type="float" office:value="420.754716981132" calcext:value-type="float">
            <text:p>420.754716981132</text:p>
          </table:table-cell>
          <table:table-cell table:formula="of:=1/[.D55]" office:value-type="float" office:value="0.0149253731343284" calcext:value-type="float">
            <text:p>0.0149253731343284</text:p>
          </table:table-cell>
          <table:table-cell table:formula="of:=LOG10([.E55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6.7" calcext:value-type="float">
            <text:p>66.7</text:p>
          </table:table-cell>
          <table:table-cell table:formula="of:=[.C56]/[.B56]" office:value-type="float" office:value="420.754716981132" calcext:value-type="float">
            <text:p>420.754716981132</text:p>
          </table:table-cell>
          <table:table-cell table:formula="of:=1/[.D56]" office:value-type="float" office:value="0.0149925037481259" calcext:value-type="float">
            <text:p>0.0149925037481259</text:p>
          </table:table-cell>
          <table:table-cell table:formula="of:=LOG10([.E56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6.5" calcext:value-type="float">
            <text:p>66.5</text:p>
          </table:table-cell>
          <table:table-cell table:formula="of:=[.C57]/[.B57]" office:value-type="float" office:value="420.754716981132" calcext:value-type="float">
            <text:p>420.754716981132</text:p>
          </table:table-cell>
          <table:table-cell table:formula="of:=1/[.D57]" office:value-type="float" office:value="0.0150375939849624" calcext:value-type="float">
            <text:p>0.0150375939849624</text:p>
          </table:table-cell>
          <table:table-cell table:formula="of:=LOG10([.E57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66.2" calcext:value-type="float">
            <text:p>66.2</text:p>
          </table:table-cell>
          <table:table-cell table:formula="of:=[.C58]/[.B58]" office:value-type="float" office:value="467.505241090147" calcext:value-type="float">
            <text:p>467.505241090147</text:p>
          </table:table-cell>
          <table:table-cell table:formula="of:=1/[.D58]" office:value-type="float" office:value="0.0151057401812689" calcext:value-type="float">
            <text:p>0.0151057401812689</text:p>
          </table:table-cell>
          <table:table-cell table:formula="of:=LOG10([.E58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5.9" calcext:value-type="float">
            <text:p>65.9</text:p>
          </table:table-cell>
          <table:table-cell table:formula="of:=[.C59]/[.B59]" office:value-type="float" office:value="420.754716981132" calcext:value-type="float">
            <text:p>420.754716981132</text:p>
          </table:table-cell>
          <table:table-cell table:formula="of:=1/[.D59]" office:value-type="float" office:value="0.0151745068285281" calcext:value-type="float">
            <text:p>0.0151745068285281</text:p>
          </table:table-cell>
          <table:table-cell table:formula="of:=LOG10([.E59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5.6" calcext:value-type="float">
            <text:p>65.6</text:p>
          </table:table-cell>
          <table:table-cell table:formula="of:=[.C60]/[.B60]" office:value-type="float" office:value="420.754716981132" calcext:value-type="float">
            <text:p>420.754716981132</text:p>
          </table:table-cell>
          <table:table-cell table:formula="of:=1/[.D60]" office:value-type="float" office:value="0.0152439024390244" calcext:value-type="float">
            <text:p>0.0152439024390244</text:p>
          </table:table-cell>
          <table:table-cell table:formula="of:=LOG10([.E60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5.4" calcext:value-type="float">
            <text:p>65.4</text:p>
          </table:table-cell>
          <table:table-cell table:formula="of:=[.C61]/[.B61]" office:value-type="float" office:value="420.754716981132" calcext:value-type="float">
            <text:p>420.754716981132</text:p>
          </table:table-cell>
          <table:table-cell table:formula="of:=1/[.D61]" office:value-type="float" office:value="0.0152905198776758" calcext:value-type="float">
            <text:p>0.0152905198776758</text:p>
          </table:table-cell>
          <table:table-cell table:formula="of:=LOG10([.E6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3" calcext:value-type="float">
            <text:p>2.23</text:p>
          </table:table-cell>
          <table:table-cell office:value-type="float" office:value="65" calcext:value-type="float">
            <text:p>65</text:p>
          </table:table-cell>
          <table:table-cell table:formula="of:=[.C62]/[.B62]" office:value-type="float" office:value="350.62893081761" calcext:value-type="float">
            <text:p>350.62893081761</text:p>
          </table:table-cell>
          <table:table-cell table:formula="of:=1/[.D62]" office:value-type="float" office:value="0.0153846153846154" calcext:value-type="float">
            <text:p>0.0153846153846154</text:p>
          </table:table-cell>
          <table:table-cell table:formula="of:=LOG10([.E62])" office:value-type="float" office:value="2.54484774739975" calcext:value-type="float">
            <text:p>2.544847747399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3" calcext:value-type="float">
            <text:p>2.23</text:p>
          </table:table-cell>
          <table:table-cell office:value-type="float" office:value="64.8" calcext:value-type="float">
            <text:p>64.8</text:p>
          </table:table-cell>
          <table:table-cell table:formula="of:=[.C63]/[.B63]" office:value-type="float" office:value="323.657474600871" calcext:value-type="float">
            <text:p>323.657474600871</text:p>
          </table:table-cell>
          <table:table-cell table:formula="of:=1/[.D63]" office:value-type="float" office:value="0.0154320987654321" calcext:value-type="float">
            <text:p>0.0154320987654321</text:p>
          </table:table-cell>
          <table:table-cell table:formula="of:=LOG10([.E63])" office:value-type="float" office:value="2.51008564114054" calcext:value-type="float">
            <text:p>2.51008564114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4" calcext:value-type="float">
            <text:p>2.24</text:p>
          </table:table-cell>
          <table:table-cell office:value-type="float" office:value="64.6" calcext:value-type="float">
            <text:p>64.6</text:p>
          </table:table-cell>
          <table:table-cell table:formula="of:=[.C64]/[.B64]" office:value-type="float" office:value="325.10885341074" calcext:value-type="float">
            <text:p>325.10885341074</text:p>
          </table:table-cell>
          <table:table-cell table:formula="of:=1/[.D64]" office:value-type="float" office:value="0.0154798761609907" calcext:value-type="float">
            <text:p>0.0154798761609907</text:p>
          </table:table-cell>
          <table:table-cell table:formula="of:=LOG10([.E64])" office:value-type="float" office:value="2.51202879642654" calcext:value-type="float">
            <text:p>2.512028796426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3" calcext:value-type="float">
            <text:p>2.23</text:p>
          </table:table-cell>
          <table:table-cell office:value-type="float" office:value="64.3" calcext:value-type="float">
            <text:p>64.3</text:p>
          </table:table-cell>
          <table:table-cell table:formula="of:=[.C65]/[.B65]" office:value-type="float" office:value="323.657474600871" calcext:value-type="float">
            <text:p>323.657474600871</text:p>
          </table:table-cell>
          <table:table-cell table:formula="of:=1/[.D65]" office:value-type="float" office:value="0.015552099533437" calcext:value-type="float">
            <text:p>0.015552099533437</text:p>
          </table:table-cell>
          <table:table-cell table:formula="of:=LOG10([.E65])" office:value-type="float" office:value="2.51008564114054" calcext:value-type="float">
            <text:p>2.510085641140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2.23" calcext:value-type="float">
            <text:p>2.23</text:p>
          </table:table-cell>
          <table:table-cell office:value-type="float" office:value="64" calcext:value-type="float">
            <text:p>64</text:p>
          </table:table-cell>
          <table:table-cell table:formula="of:=[.C66]/[.B66]" office:value-type="float" office:value="300.539083557951" calcext:value-type="float">
            <text:p>300.539083557951</text:p>
          </table:table-cell>
          <table:table-cell table:formula="of:=1/[.D66]" office:value-type="float" office:value="0.015625" calcext:value-type="float">
            <text:p>0.015625</text:p>
          </table:table-cell>
          <table:table-cell table:formula="of:=LOG10([.E66])" office:value-type="float" office:value="2.47790095776913" calcext:value-type="float">
            <text:p>2.477900957769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4" calcext:value-type="float">
            <text:p>2.24</text:p>
          </table:table-cell>
          <table:table-cell office:value-type="float" office:value="63.7" calcext:value-type="float">
            <text:p>63.7</text:p>
          </table:table-cell>
          <table:table-cell table:formula="of:=[.C67]/[.B67]" office:value-type="float" office:value="325.10885341074" calcext:value-type="float">
            <text:p>325.10885341074</text:p>
          </table:table-cell>
          <table:table-cell table:formula="of:=1/[.D67]" office:value-type="float" office:value="0.0156985871271586" calcext:value-type="float">
            <text:p>0.0156985871271586</text:p>
          </table:table-cell>
          <table:table-cell table:formula="of:=LOG10([.E67])" office:value-type="float" office:value="2.51202879642654" calcext:value-type="float">
            <text:p>2.512028796426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3" calcext:value-type="float">
            <text:p>2.23</text:p>
          </table:table-cell>
          <table:table-cell office:value-type="float" office:value="63.6" calcext:value-type="float">
            <text:p>63.6</text:p>
          </table:table-cell>
          <table:table-cell table:formula="of:=[.C68]/[.B68]" office:value-type="float" office:value="323.657474600871" calcext:value-type="float">
            <text:p>323.657474600871</text:p>
          </table:table-cell>
          <table:table-cell table:formula="of:=1/[.D68]" office:value-type="float" office:value="0.0157232704402516" calcext:value-type="float">
            <text:p>0.0157232704402516</text:p>
          </table:table-cell>
          <table:table-cell table:formula="of:=LOG10([.E68])" office:value-type="float" office:value="2.51008564114054" calcext:value-type="float">
            <text:p>2.510085641140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4" calcext:value-type="float">
            <text:p>2.24</text:p>
          </table:table-cell>
          <table:table-cell office:value-type="float" office:value="63.3" calcext:value-type="float">
            <text:p>63.3</text:p>
          </table:table-cell>
          <table:table-cell table:formula="of:=[.C69]/[.B69]" office:value-type="float" office:value="352.201257861635" calcext:value-type="float">
            <text:p>352.201257861635</text:p>
          </table:table-cell>
          <table:table-cell table:formula="of:=1/[.D69]" office:value-type="float" office:value="0.0157977883096367" calcext:value-type="float">
            <text:p>0.0157977883096367</text:p>
          </table:table-cell>
          <table:table-cell table:formula="of:=LOG10([.E69])" office:value-type="float" office:value="2.54679090268575" calcext:value-type="float">
            <text:p>2.546790902685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63" calcext:value-type="float">
            <text:p>63</text:p>
          </table:table-cell>
          <table:table-cell table:formula="of:=[.C70]/[.B70]" office:value-type="float" office:value="382.504288164666" calcext:value-type="float">
            <text:p>382.504288164666</text:p>
          </table:table-cell>
          <table:table-cell table:formula="of:=1/[.D70]" office:value-type="float" office:value="0.0158730158730159" calcext:value-type="float">
            <text:p>0.0158730158730159</text:p>
          </table:table-cell>
          <table:table-cell table:formula="of:=LOG10([.E70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62.8" calcext:value-type="float">
            <text:p>62.8</text:p>
          </table:table-cell>
          <table:table-cell table:formula="of:=[.C71]/[.B71]" office:value-type="float" office:value="467.505241090147" calcext:value-type="float">
            <text:p>467.505241090147</text:p>
          </table:table-cell>
          <table:table-cell table:formula="of:=1/[.D71]" office:value-type="float" office:value="0.0159235668789809" calcext:value-type="float">
            <text:p>0.0159235668789809</text:p>
          </table:table-cell>
          <table:table-cell table:formula="of:=LOG10([.E71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62.6" calcext:value-type="float">
            <text:p>62.6</text:p>
          </table:table-cell>
          <table:table-cell table:formula="of:=[.C72]/[.B72]" office:value-type="float" office:value="467.505241090147" calcext:value-type="float">
            <text:p>467.505241090147</text:p>
          </table:table-cell>
          <table:table-cell table:formula="of:=1/[.D72]" office:value-type="float" office:value="0.0159744408945687" calcext:value-type="float">
            <text:p>0.0159744408945687</text:p>
          </table:table-cell>
          <table:table-cell table:formula="of:=LOG10([.E72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2.4" calcext:value-type="float">
            <text:p>62.4</text:p>
          </table:table-cell>
          <table:table-cell table:formula="of:=[.C73]/[.B73]" office:value-type="float" office:value="420.754716981132" calcext:value-type="float">
            <text:p>420.754716981132</text:p>
          </table:table-cell>
          <table:table-cell table:formula="of:=1/[.D73]" office:value-type="float" office:value="0.016025641025641" calcext:value-type="float">
            <text:p>0.016025641025641</text:p>
          </table:table-cell>
          <table:table-cell table:formula="of:=LOG10([.E73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2.1" calcext:value-type="float">
            <text:p>62.1</text:p>
          </table:table-cell>
          <table:table-cell table:formula="of:=[.C74]/[.B74]" office:value-type="float" office:value="420.754716981132" calcext:value-type="float">
            <text:p>420.754716981132</text:p>
          </table:table-cell>
          <table:table-cell table:formula="of:=1/[.D74]" office:value-type="float" office:value="0.0161030595813205" calcext:value-type="float">
            <text:p>0.0161030595813205</text:p>
          </table:table-cell>
          <table:table-cell table:formula="of:=LOG10([.E74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61.9" calcext:value-type="float">
            <text:p>61.9</text:p>
          </table:table-cell>
          <table:table-cell table:formula="of:=[.C75]/[.B75]" office:value-type="float" office:value="467.505241090147" calcext:value-type="float">
            <text:p>467.505241090147</text:p>
          </table:table-cell>
          <table:table-cell table:formula="of:=1/[.D75]" office:value-type="float" office:value="0.0161550888529887" calcext:value-type="float">
            <text:p>0.0161550888529887</text:p>
          </table:table-cell>
          <table:table-cell table:formula="of:=LOG10([.E7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1.6" calcext:value-type="float">
            <text:p>61.6</text:p>
          </table:table-cell>
          <table:table-cell table:formula="of:=[.C76]/[.B76]" office:value-type="float" office:value="420.754716981132" calcext:value-type="float">
            <text:p>420.754716981132</text:p>
          </table:table-cell>
          <table:table-cell table:formula="of:=1/[.D76]" office:value-type="float" office:value="0.0162337662337662" calcext:value-type="float">
            <text:p>0.0162337662337662</text:p>
          </table:table-cell>
          <table:table-cell table:formula="of:=LOG10([.E76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61.4" calcext:value-type="float">
            <text:p>61.4</text:p>
          </table:table-cell>
          <table:table-cell table:formula="of:=[.C77]/[.B77]" office:value-type="float" office:value="467.505241090147" calcext:value-type="float">
            <text:p>467.505241090147</text:p>
          </table:table-cell>
          <table:table-cell table:formula="of:=1/[.D77]" office:value-type="float" office:value="0.0162866449511401" calcext:value-type="float">
            <text:p>0.0162866449511401</text:p>
          </table:table-cell>
          <table:table-cell table:formula="of:=LOG10([.E77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61.2" calcext:value-type="float">
            <text:p>61.2</text:p>
          </table:table-cell>
          <table:table-cell table:formula="of:=[.C78]/[.B78]" office:value-type="float" office:value="467.505241090147" calcext:value-type="float">
            <text:p>467.505241090147</text:p>
          </table:table-cell>
          <table:table-cell table:formula="of:=1/[.D78]" office:value-type="float" office:value="0.0163398692810458" calcext:value-type="float">
            <text:p>0.0163398692810458</text:p>
          </table:table-cell>
          <table:table-cell table:formula="of:=LOG10([.E78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1" calcext:value-type="float">
            <text:p>61</text:p>
          </table:table-cell>
          <table:table-cell table:formula="of:=[.C79]/[.B79]" office:value-type="float" office:value="420.754716981132" calcext:value-type="float">
            <text:p>420.754716981132</text:p>
          </table:table-cell>
          <table:table-cell table:formula="of:=1/[.D79]" office:value-type="float" office:value="0.0163934426229508" calcext:value-type="float">
            <text:p>0.0163934426229508</text:p>
          </table:table-cell>
          <table:table-cell table:formula="of:=LOG10([.E79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0.8" calcext:value-type="float">
            <text:p>60.8</text:p>
          </table:table-cell>
          <table:table-cell table:formula="of:=[.C80]/[.B80]" office:value-type="float" office:value="420.754716981132" calcext:value-type="float">
            <text:p>420.754716981132</text:p>
          </table:table-cell>
          <table:table-cell table:formula="of:=1/[.D80]" office:value-type="float" office:value="0.0164473684210526" calcext:value-type="float">
            <text:p>0.0164473684210526</text:p>
          </table:table-cell>
          <table:table-cell table:formula="of:=LOG10([.E80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0.5" calcext:value-type="float">
            <text:p>60.5</text:p>
          </table:table-cell>
          <table:table-cell table:formula="of:=[.C81]/[.B81]" office:value-type="float" office:value="420.754716981132" calcext:value-type="float">
            <text:p>420.754716981132</text:p>
          </table:table-cell>
          <table:table-cell table:formula="of:=1/[.D81]" office:value-type="float" office:value="0.0165289256198347" calcext:value-type="float">
            <text:p>0.0165289256198347</text:p>
          </table:table-cell>
          <table:table-cell table:formula="of:=LOG10([.E8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60.3" calcext:value-type="float">
            <text:p>60.3</text:p>
          </table:table-cell>
          <table:table-cell table:formula="of:=[.C82]/[.B82]" office:value-type="float" office:value="420.754716981132" calcext:value-type="float">
            <text:p>420.754716981132</text:p>
          </table:table-cell>
          <table:table-cell table:formula="of:=1/[.D82]" office:value-type="float" office:value="0.0165837479270315" calcext:value-type="float">
            <text:p>0.0165837479270315</text:p>
          </table:table-cell>
          <table:table-cell table:formula="of:=LOG10([.E82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3" calcext:value-type="float">
            <text:p>2.23</text:p>
          </table:table-cell>
          <table:table-cell office:value-type="float" office:value="60.1" calcext:value-type="float">
            <text:p>60.1</text:p>
          </table:table-cell>
          <table:table-cell table:formula="of:=[.C83]/[.B83]" office:value-type="float" office:value="323.657474600871" calcext:value-type="float">
            <text:p>323.657474600871</text:p>
          </table:table-cell>
          <table:table-cell table:formula="of:=1/[.D83]" office:value-type="float" office:value="0.0166389351081531" calcext:value-type="float">
            <text:p>0.0166389351081531</text:p>
          </table:table-cell>
          <table:table-cell table:formula="of:=LOG10([.E83])" office:value-type="float" office:value="2.51008564114054" calcext:value-type="float">
            <text:p>2.510085641140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9.9" calcext:value-type="float">
            <text:p>59.9</text:p>
          </table:table-cell>
          <table:table-cell table:formula="of:=[.C84]/[.B84]" office:value-type="float" office:value="420.754716981132" calcext:value-type="float">
            <text:p>420.754716981132</text:p>
          </table:table-cell>
          <table:table-cell table:formula="of:=1/[.D84]" office:value-type="float" office:value="0.0166944908180301" calcext:value-type="float">
            <text:p>0.0166944908180301</text:p>
          </table:table-cell>
          <table:table-cell table:formula="of:=LOG10([.E84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9.7" calcext:value-type="float">
            <text:p>59.7</text:p>
          </table:table-cell>
          <table:table-cell table:formula="of:=[.C85]/[.B85]" office:value-type="float" office:value="382.504288164666" calcext:value-type="float">
            <text:p>382.504288164666</text:p>
          </table:table-cell>
          <table:table-cell table:formula="of:=1/[.D85]" office:value-type="float" office:value="0.016750418760469" calcext:value-type="float">
            <text:p>0.016750418760469</text:p>
          </table:table-cell>
          <table:table-cell table:formula="of:=LOG10([.E85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9.6" calcext:value-type="float">
            <text:p>59.6</text:p>
          </table:table-cell>
          <table:table-cell table:formula="of:=[.C86]/[.B86]" office:value-type="float" office:value="420.754716981132" calcext:value-type="float">
            <text:p>420.754716981132</text:p>
          </table:table-cell>
          <table:table-cell table:formula="of:=1/[.D86]" office:value-type="float" office:value="0.0167785234899329" calcext:value-type="float">
            <text:p>0.0167785234899329</text:p>
          </table:table-cell>
          <table:table-cell table:formula="of:=LOG10([.E86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59.3" calcext:value-type="float">
            <text:p>59.3</text:p>
          </table:table-cell>
          <table:table-cell table:formula="of:=[.C87]/[.B87]" office:value-type="float" office:value="469.601677148847" calcext:value-type="float">
            <text:p>469.601677148847</text:p>
          </table:table-cell>
          <table:table-cell table:formula="of:=1/[.D87]" office:value-type="float" office:value="0.0168634064080944" calcext:value-type="float">
            <text:p>0.0168634064080944</text:p>
          </table:table-cell>
          <table:table-cell table:formula="of:=LOG10([.E87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9.1" calcext:value-type="float">
            <text:p>59.1</text:p>
          </table:table-cell>
          <table:table-cell table:formula="of:=[.C88]/[.B88]" office:value-type="float" office:value="420.754716981132" calcext:value-type="float">
            <text:p>420.754716981132</text:p>
          </table:table-cell>
          <table:table-cell table:formula="of:=1/[.D88]" office:value-type="float" office:value="0.0169204737732657" calcext:value-type="float">
            <text:p>0.0169204737732657</text:p>
          </table:table-cell>
          <table:table-cell table:formula="of:=LOG10([.E88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9" calcext:value-type="float">
            <text:p>59</text:p>
          </table:table-cell>
          <table:table-cell table:formula="of:=[.C89]/[.B89]" office:value-type="float" office:value="467.505241090147" calcext:value-type="float">
            <text:p>467.505241090147</text:p>
          </table:table-cell>
          <table:table-cell table:formula="of:=1/[.D89]" office:value-type="float" office:value="0.0169491525423729" calcext:value-type="float">
            <text:p>0.0169491525423729</text:p>
          </table:table-cell>
          <table:table-cell table:formula="of:=LOG10([.E89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8.8" calcext:value-type="float">
            <text:p>58.8</text:p>
          </table:table-cell>
          <table:table-cell table:formula="of:=[.C90]/[.B90]" office:value-type="float" office:value="382.504288164666" calcext:value-type="float">
            <text:p>382.504288164666</text:p>
          </table:table-cell>
          <table:table-cell table:formula="of:=1/[.D90]" office:value-type="float" office:value="0.0170068027210884" calcext:value-type="float">
            <text:p>0.0170068027210884</text:p>
          </table:table-cell>
          <table:table-cell table:formula="of:=LOG10([.E90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8.6" calcext:value-type="float">
            <text:p>58.6</text:p>
          </table:table-cell>
          <table:table-cell table:formula="of:=[.C91]/[.B91]" office:value-type="float" office:value="467.505241090147" calcext:value-type="float">
            <text:p>467.505241090147</text:p>
          </table:table-cell>
          <table:table-cell table:formula="of:=1/[.D91]" office:value-type="float" office:value="0.0170648464163823" calcext:value-type="float">
            <text:p>0.0170648464163823</text:p>
          </table:table-cell>
          <table:table-cell table:formula="of:=LOG10([.E91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8.4" calcext:value-type="float">
            <text:p>58.4</text:p>
          </table:table-cell>
          <table:table-cell table:formula="of:=[.C92]/[.B92]" office:value-type="float" office:value="420.754716981132" calcext:value-type="float">
            <text:p>420.754716981132</text:p>
          </table:table-cell>
          <table:table-cell table:formula="of:=1/[.D92]" office:value-type="float" office:value="0.0171232876712329" calcext:value-type="float">
            <text:p>0.0171232876712329</text:p>
          </table:table-cell>
          <table:table-cell table:formula="of:=LOG10([.E92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8.2" calcext:value-type="float">
            <text:p>58.2</text:p>
          </table:table-cell>
          <table:table-cell table:formula="of:=[.C93]/[.B93]" office:value-type="float" office:value="382.504288164666" calcext:value-type="float">
            <text:p>382.504288164666</text:p>
          </table:table-cell>
          <table:table-cell table:formula="of:=1/[.D93]" office:value-type="float" office:value="0.0171821305841924" calcext:value-type="float">
            <text:p>0.0171821305841924</text:p>
          </table:table-cell>
          <table:table-cell table:formula="of:=LOG10([.E93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8.1" calcext:value-type="float">
            <text:p>58.1</text:p>
          </table:table-cell>
          <table:table-cell table:formula="of:=[.C94]/[.B94]" office:value-type="float" office:value="420.754716981132" calcext:value-type="float">
            <text:p>420.754716981132</text:p>
          </table:table-cell>
          <table:table-cell table:formula="of:=1/[.D94]" office:value-type="float" office:value="0.0172117039586919" calcext:value-type="float">
            <text:p>0.0172117039586919</text:p>
          </table:table-cell>
          <table:table-cell table:formula="of:=LOG10([.E94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57.9" calcext:value-type="float">
            <text:p>57.9</text:p>
          </table:table-cell>
          <table:table-cell table:formula="of:=[.C95]/[.B95]" office:value-type="float" office:value="469.601677148847" calcext:value-type="float">
            <text:p>469.601677148847</text:p>
          </table:table-cell>
          <table:table-cell table:formula="of:=1/[.D95]" office:value-type="float" office:value="0.0172711571675302" calcext:value-type="float">
            <text:p>0.0172711571675302</text:p>
          </table:table-cell>
          <table:table-cell table:formula="of:=LOG10([.E9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7.7" calcext:value-type="float">
            <text:p>57.7</text:p>
          </table:table-cell>
          <table:table-cell table:formula="of:=[.C96]/[.B96]" office:value-type="float" office:value="467.505241090147" calcext:value-type="float">
            <text:p>467.505241090147</text:p>
          </table:table-cell>
          <table:table-cell table:formula="of:=1/[.D96]" office:value-type="float" office:value="0.0173310225303293" calcext:value-type="float">
            <text:p>0.0173310225303293</text:p>
          </table:table-cell>
          <table:table-cell table:formula="of:=LOG10([.E96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7.5" calcext:value-type="float">
            <text:p>57.5</text:p>
          </table:table-cell>
          <table:table-cell table:formula="of:=[.C97]/[.B97]" office:value-type="float" office:value="467.505241090147" calcext:value-type="float">
            <text:p>467.505241090147</text:p>
          </table:table-cell>
          <table:table-cell table:formula="of:=1/[.D97]" office:value-type="float" office:value="0.0173913043478261" calcext:value-type="float">
            <text:p>0.0173913043478261</text:p>
          </table:table-cell>
          <table:table-cell table:formula="of:=LOG10([.E97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7.4" calcext:value-type="float">
            <text:p>57.4</text:p>
          </table:table-cell>
          <table:table-cell table:formula="of:=[.C98]/[.B98]" office:value-type="float" office:value="420.754716981132" calcext:value-type="float">
            <text:p>420.754716981132</text:p>
          </table:table-cell>
          <table:table-cell table:formula="of:=1/[.D98]" office:value-type="float" office:value="0.0174216027874564" calcext:value-type="float">
            <text:p>0.0174216027874564</text:p>
          </table:table-cell>
          <table:table-cell table:formula="of:=LOG10([.E98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7.2" calcext:value-type="float">
            <text:p>57.2</text:p>
          </table:table-cell>
          <table:table-cell table:formula="of:=[.C99]/[.B99]" office:value-type="float" office:value="420.754716981132" calcext:value-type="float">
            <text:p>420.754716981132</text:p>
          </table:table-cell>
          <table:table-cell table:formula="of:=1/[.D99]" office:value-type="float" office:value="0.0174825174825175" calcext:value-type="float">
            <text:p>0.0174825174825175</text:p>
          </table:table-cell>
          <table:table-cell table:formula="of:=LOG10([.E99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7" calcext:value-type="float">
            <text:p>57</text:p>
          </table:table-cell>
          <table:table-cell table:formula="of:=[.C100]/[.B100]" office:value-type="float" office:value="420.754716981132" calcext:value-type="float">
            <text:p>420.754716981132</text:p>
          </table:table-cell>
          <table:table-cell table:formula="of:=1/[.D100]" office:value-type="float" office:value="0.0175438596491228" calcext:value-type="float">
            <text:p>0.0175438596491228</text:p>
          </table:table-cell>
          <table:table-cell table:formula="of:=LOG10([.E100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6.9" calcext:value-type="float">
            <text:p>56.9</text:p>
          </table:table-cell>
          <table:table-cell table:formula="of:=[.C101]/[.B101]" office:value-type="float" office:value="467.505241090147" calcext:value-type="float">
            <text:p>467.505241090147</text:p>
          </table:table-cell>
          <table:table-cell table:formula="of:=1/[.D101]" office:value-type="float" office:value="0.0175746924428823" calcext:value-type="float">
            <text:p>0.0175746924428823</text:p>
          </table:table-cell>
          <table:table-cell table:formula="of:=LOG10([.E101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6.7" calcext:value-type="float">
            <text:p>56.7</text:p>
          </table:table-cell>
          <table:table-cell table:formula="of:=[.C102]/[.B102]" office:value-type="float" office:value="420.754716981132" calcext:value-type="float">
            <text:p>420.754716981132</text:p>
          </table:table-cell>
          <table:table-cell table:formula="of:=1/[.D102]" office:value-type="float" office:value="0.017636684303351" calcext:value-type="float">
            <text:p>0.017636684303351</text:p>
          </table:table-cell>
          <table:table-cell table:formula="of:=LOG10([.E102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6.6" calcext:value-type="float">
            <text:p>56.6</text:p>
          </table:table-cell>
          <table:table-cell table:formula="of:=[.C103]/[.B103]" office:value-type="float" office:value="420.754716981132" calcext:value-type="float">
            <text:p>420.754716981132</text:p>
          </table:table-cell>
          <table:table-cell table:formula="of:=1/[.D103]" office:value-type="float" office:value="0.0176678445229682" calcext:value-type="float">
            <text:p>0.0176678445229682</text:p>
          </table:table-cell>
          <table:table-cell table:formula="of:=LOG10([.E103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6.4" calcext:value-type="float">
            <text:p>56.4</text:p>
          </table:table-cell>
          <table:table-cell table:formula="of:=[.C104]/[.B104]" office:value-type="float" office:value="467.505241090147" calcext:value-type="float">
            <text:p>467.505241090147</text:p>
          </table:table-cell>
          <table:table-cell table:formula="of:=1/[.D104]" office:value-type="float" office:value="0.0177304964539007" calcext:value-type="float">
            <text:p>0.0177304964539007</text:p>
          </table:table-cell>
          <table:table-cell table:formula="of:=LOG10([.E104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6.3" calcext:value-type="float">
            <text:p>56.3</text:p>
          </table:table-cell>
          <table:table-cell table:formula="of:=[.C105]/[.B105]" office:value-type="float" office:value="382.504288164666" calcext:value-type="float">
            <text:p>382.504288164666</text:p>
          </table:table-cell>
          <table:table-cell table:formula="of:=1/[.D105]" office:value-type="float" office:value="0.0177619893428064" calcext:value-type="float">
            <text:p>0.0177619893428064</text:p>
          </table:table-cell>
          <table:table-cell table:formula="of:=LOG10([.E105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6.1" calcext:value-type="float">
            <text:p>56.1</text:p>
          </table:table-cell>
          <table:table-cell table:formula="of:=[.C106]/[.B106]" office:value-type="float" office:value="525.943396226415" calcext:value-type="float">
            <text:p>525.943396226415</text:p>
          </table:table-cell>
          <table:table-cell table:formula="of:=1/[.D106]" office:value-type="float" office:value="0.017825311942959" calcext:value-type="float">
            <text:p>0.017825311942959</text:p>
          </table:table-cell>
          <table:table-cell table:formula="of:=LOG10([.E106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6" calcext:value-type="float">
            <text:p>56</text:p>
          </table:table-cell>
          <table:table-cell table:formula="of:=[.C107]/[.B107]" office:value-type="float" office:value="382.504288164666" calcext:value-type="float">
            <text:p>382.504288164666</text:p>
          </table:table-cell>
          <table:table-cell table:formula="of:=1/[.D107]" office:value-type="float" office:value="0.0178571428571429" calcext:value-type="float">
            <text:p>0.0178571428571429</text:p>
          </table:table-cell>
          <table:table-cell table:formula="of:=LOG10([.E107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5.8" calcext:value-type="float">
            <text:p>55.8</text:p>
          </table:table-cell>
          <table:table-cell table:formula="of:=[.C108]/[.B108]" office:value-type="float" office:value="525.943396226415" calcext:value-type="float">
            <text:p>525.943396226415</text:p>
          </table:table-cell>
          <table:table-cell table:formula="of:=1/[.D108]" office:value-type="float" office:value="0.017921146953405" calcext:value-type="float">
            <text:p>0.017921146953405</text:p>
          </table:table-cell>
          <table:table-cell table:formula="of:=LOG10([.E108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5.7" calcext:value-type="float">
            <text:p>55.7</text:p>
          </table:table-cell>
          <table:table-cell table:formula="of:=[.C109]/[.B109]" office:value-type="float" office:value="467.505241090147" calcext:value-type="float">
            <text:p>467.505241090147</text:p>
          </table:table-cell>
          <table:table-cell table:formula="of:=1/[.D109]" office:value-type="float" office:value="0.0179533213644524" calcext:value-type="float">
            <text:p>0.0179533213644524</text:p>
          </table:table-cell>
          <table:table-cell table:formula="of:=LOG10([.E109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5.5" calcext:value-type="float">
            <text:p>55.5</text:p>
          </table:table-cell>
          <table:table-cell table:formula="of:=[.C110]/[.B110]" office:value-type="float" office:value="420.754716981132" calcext:value-type="float">
            <text:p>420.754716981132</text:p>
          </table:table-cell>
          <table:table-cell table:formula="of:=1/[.D110]" office:value-type="float" office:value="0.018018018018018" calcext:value-type="float">
            <text:p>0.018018018018018</text:p>
          </table:table-cell>
          <table:table-cell table:formula="of:=LOG10([.E110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5.4" calcext:value-type="float">
            <text:p>55.4</text:p>
          </table:table-cell>
          <table:table-cell table:formula="of:=[.C111]/[.B111]" office:value-type="float" office:value="420.754716981132" calcext:value-type="float">
            <text:p>420.754716981132</text:p>
          </table:table-cell>
          <table:table-cell table:formula="of:=1/[.D111]" office:value-type="float" office:value="0.0180505415162455" calcext:value-type="float">
            <text:p>0.0180505415162455</text:p>
          </table:table-cell>
          <table:table-cell table:formula="of:=LOG10([.E11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5.3" calcext:value-type="float">
            <text:p>55.3</text:p>
          </table:table-cell>
          <table:table-cell table:formula="of:=[.C112]/[.B112]" office:value-type="float" office:value="525.943396226415" calcext:value-type="float">
            <text:p>525.943396226415</text:p>
          </table:table-cell>
          <table:table-cell table:formula="of:=1/[.D112]" office:value-type="float" office:value="0.0180831826401447" calcext:value-type="float">
            <text:p>0.0180831826401447</text:p>
          </table:table-cell>
          <table:table-cell table:formula="of:=LOG10([.E112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5.1" calcext:value-type="float">
            <text:p>55.1</text:p>
          </table:table-cell>
          <table:table-cell table:formula="of:=[.C113]/[.B113]" office:value-type="float" office:value="382.504288164666" calcext:value-type="float">
            <text:p>382.504288164666</text:p>
          </table:table-cell>
          <table:table-cell table:formula="of:=1/[.D113]" office:value-type="float" office:value="0.0181488203266788" calcext:value-type="float">
            <text:p>0.0181488203266788</text:p>
          </table:table-cell>
          <table:table-cell table:formula="of:=LOG10([.E113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5" calcext:value-type="float">
            <text:p>55</text:p>
          </table:table-cell>
          <table:table-cell table:formula="of:=[.C114]/[.B114]" office:value-type="float" office:value="382.504288164666" calcext:value-type="float">
            <text:p>382.504288164666</text:p>
          </table:table-cell>
          <table:table-cell table:formula="of:=1/[.D114]" office:value-type="float" office:value="0.0181818181818182" calcext:value-type="float">
            <text:p>0.0181818181818182</text:p>
          </table:table-cell>
          <table:table-cell table:formula="of:=LOG10([.E114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4.8" calcext:value-type="float">
            <text:p>54.8</text:p>
          </table:table-cell>
          <table:table-cell table:formula="of:=[.C115]/[.B115]" office:value-type="float" office:value="467.505241090147" calcext:value-type="float">
            <text:p>467.505241090147</text:p>
          </table:table-cell>
          <table:table-cell table:formula="of:=1/[.D115]" office:value-type="float" office:value="0.0182481751824818" calcext:value-type="float">
            <text:p>0.0182481751824818</text:p>
          </table:table-cell>
          <table:table-cell table:formula="of:=LOG10([.E11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4.7" calcext:value-type="float">
            <text:p>54.7</text:p>
          </table:table-cell>
          <table:table-cell table:formula="of:=[.C116]/[.B116]" office:value-type="float" office:value="420.754716981132" calcext:value-type="float">
            <text:p>420.754716981132</text:p>
          </table:table-cell>
          <table:table-cell table:formula="of:=1/[.D116]" office:value-type="float" office:value="0.0182815356489945" calcext:value-type="float">
            <text:p>0.0182815356489945</text:p>
          </table:table-cell>
          <table:table-cell table:formula="of:=LOG10([.E116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4.6" calcext:value-type="float">
            <text:p>54.6</text:p>
          </table:table-cell>
          <table:table-cell table:formula="of:=[.C117]/[.B117]" office:value-type="float" office:value="420.754716981132" calcext:value-type="float">
            <text:p>420.754716981132</text:p>
          </table:table-cell>
          <table:table-cell table:formula="of:=1/[.D117]" office:value-type="float" office:value="0.0183150183150183" calcext:value-type="float">
            <text:p>0.0183150183150183</text:p>
          </table:table-cell>
          <table:table-cell table:formula="of:=LOG10([.E117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4.5" calcext:value-type="float">
            <text:p>54.5</text:p>
          </table:table-cell>
          <table:table-cell table:formula="of:=[.C118]/[.B118]" office:value-type="float" office:value="382.504288164666" calcext:value-type="float">
            <text:p>382.504288164666</text:p>
          </table:table-cell>
          <table:table-cell table:formula="of:=1/[.D118]" office:value-type="float" office:value="0.018348623853211" calcext:value-type="float">
            <text:p>0.018348623853211</text:p>
          </table:table-cell>
          <table:table-cell table:formula="of:=LOG10([.E118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4.3" calcext:value-type="float">
            <text:p>54.3</text:p>
          </table:table-cell>
          <table:table-cell table:formula="of:=[.C119]/[.B119]" office:value-type="float" office:value="382.504288164666" calcext:value-type="float">
            <text:p>382.504288164666</text:p>
          </table:table-cell>
          <table:table-cell table:formula="of:=1/[.D119]" office:value-type="float" office:value="0.0184162062615101" calcext:value-type="float">
            <text:p>0.0184162062615101</text:p>
          </table:table-cell>
          <table:table-cell table:formula="of:=LOG10([.E119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3" calcext:value-type="float">
            <text:p>2.23</text:p>
          </table:table-cell>
          <table:table-cell office:value-type="float" office:value="54.2" calcext:value-type="float">
            <text:p>54.2</text:p>
          </table:table-cell>
          <table:table-cell table:formula="of:=[.C120]/[.B120]" office:value-type="float" office:value="350.62893081761" calcext:value-type="float">
            <text:p>350.62893081761</text:p>
          </table:table-cell>
          <table:table-cell table:formula="of:=1/[.D120]" office:value-type="float" office:value="0.018450184501845" calcext:value-type="float">
            <text:p>0.018450184501845</text:p>
          </table:table-cell>
          <table:table-cell table:formula="of:=LOG10([.E120])" office:value-type="float" office:value="2.54484774739975" calcext:value-type="float">
            <text:p>2.544847747399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4.1" calcext:value-type="float">
            <text:p>54.1</text:p>
          </table:table-cell>
          <table:table-cell table:formula="of:=[.C121]/[.B121]" office:value-type="float" office:value="420.754716981132" calcext:value-type="float">
            <text:p>420.754716981132</text:p>
          </table:table-cell>
          <table:table-cell table:formula="of:=1/[.D121]" office:value-type="float" office:value="0.0184842883548983" calcext:value-type="float">
            <text:p>0.0184842883548983</text:p>
          </table:table-cell>
          <table:table-cell table:formula="of:=LOG10([.E121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4" calcext:value-type="float">
            <text:p>54</text:p>
          </table:table-cell>
          <table:table-cell table:formula="of:=[.C122]/[.B122]" office:value-type="float" office:value="420.754716981132" calcext:value-type="float">
            <text:p>420.754716981132</text:p>
          </table:table-cell>
          <table:table-cell table:formula="of:=1/[.D122]" office:value-type="float" office:value="0.0185185185185185" calcext:value-type="float">
            <text:p>0.0185185185185185</text:p>
          </table:table-cell>
          <table:table-cell table:formula="of:=LOG10([.E122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4" calcext:value-type="float">
            <text:p>2.24</text:p>
          </table:table-cell>
          <table:table-cell office:value-type="float" office:value="53.9" calcext:value-type="float">
            <text:p>53.9</text:p>
          </table:table-cell>
          <table:table-cell table:formula="of:=[.C123]/[.B123]" office:value-type="float" office:value="352.201257861635" calcext:value-type="float">
            <text:p>352.201257861635</text:p>
          </table:table-cell>
          <table:table-cell table:formula="of:=1/[.D123]" office:value-type="float" office:value="0.0185528756957328" calcext:value-type="float">
            <text:p>0.0185528756957328</text:p>
          </table:table-cell>
          <table:table-cell table:formula="of:=LOG10([.E123])" office:value-type="float" office:value="2.54679090268575" calcext:value-type="float">
            <text:p>2.546790902685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53.7" calcext:value-type="float">
            <text:p>53.7</text:p>
          </table:table-cell>
          <table:table-cell table:formula="of:=[.C124]/[.B124]" office:value-type="float" office:value="422.641509433962" calcext:value-type="float">
            <text:p>422.641509433962</text:p>
          </table:table-cell>
          <table:table-cell table:formula="of:=1/[.D124]" office:value-type="float" office:value="0.0186219739292365" calcext:value-type="float">
            <text:p>0.0186219739292365</text:p>
          </table:table-cell>
          <table:table-cell table:formula="of:=LOG10([.E124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3.6" calcext:value-type="float">
            <text:p>53.6</text:p>
          </table:table-cell>
          <table:table-cell table:formula="of:=[.C125]/[.B125]" office:value-type="float" office:value="525.943396226415" calcext:value-type="float">
            <text:p>525.943396226415</text:p>
          </table:table-cell>
          <table:table-cell table:formula="of:=1/[.D125]" office:value-type="float" office:value="0.0186567164179104" calcext:value-type="float">
            <text:p>0.0186567164179104</text:p>
          </table:table-cell>
          <table:table-cell table:formula="of:=LOG10([.E125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53.5" calcext:value-type="float">
            <text:p>53.5</text:p>
          </table:table-cell>
          <table:table-cell table:formula="of:=[.C126]/[.B126]" office:value-type="float" office:value="704.402515723271" calcext:value-type="float">
            <text:p>704.402515723271</text:p>
          </table:table-cell>
          <table:table-cell table:formula="of:=1/[.D126]" office:value-type="float" office:value="0.0186915887850467" calcext:value-type="float">
            <text:p>0.0186915887850467</text:p>
          </table:table-cell>
          <table:table-cell table:formula="of:=LOG10([.E12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53.4" calcext:value-type="float">
            <text:p>53.4</text:p>
          </table:table-cell>
          <table:table-cell table:formula="of:=[.C127]/[.B127]" office:value-type="float" office:value="528.301886792453" calcext:value-type="float">
            <text:p>528.301886792453</text:p>
          </table:table-cell>
          <table:table-cell table:formula="of:=1/[.D127]" office:value-type="float" office:value="0.0187265917602996" calcext:value-type="float">
            <text:p>0.0187265917602996</text:p>
          </table:table-cell>
          <table:table-cell table:formula="of:=LOG10([.E12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3.3" calcext:value-type="float">
            <text:p>53.3</text:p>
          </table:table-cell>
          <table:table-cell table:formula="of:=[.C128]/[.B128]" office:value-type="float" office:value="525.943396226415" calcext:value-type="float">
            <text:p>525.943396226415</text:p>
          </table:table-cell>
          <table:table-cell table:formula="of:=1/[.D128]" office:value-type="float" office:value="0.0187617260787993" calcext:value-type="float">
            <text:p>0.0187617260787993</text:p>
          </table:table-cell>
          <table:table-cell table:formula="of:=LOG10([.E128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3.1" calcext:value-type="float">
            <text:p>53.1</text:p>
          </table:table-cell>
          <table:table-cell table:formula="of:=[.C129]/[.B129]" office:value-type="float" office:value="467.505241090147" calcext:value-type="float">
            <text:p>467.505241090147</text:p>
          </table:table-cell>
          <table:table-cell table:formula="of:=1/[.D129]" office:value-type="float" office:value="0.0188323917137476" calcext:value-type="float">
            <text:p>0.0188323917137476</text:p>
          </table:table-cell>
          <table:table-cell table:formula="of:=LOG10([.E129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3.1" calcext:value-type="float">
            <text:p>53.1</text:p>
          </table:table-cell>
          <table:table-cell table:formula="of:=[.C130]/[.B130]" office:value-type="float" office:value="420.754716981132" calcext:value-type="float">
            <text:p>420.754716981132</text:p>
          </table:table-cell>
          <table:table-cell table:formula="of:=1/[.D130]" office:value-type="float" office:value="0.0188323917137476" calcext:value-type="float">
            <text:p>0.0188323917137476</text:p>
          </table:table-cell>
          <table:table-cell table:formula="of:=LOG10([.E130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3" calcext:value-type="float">
            <text:p>53</text:p>
          </table:table-cell>
          <table:table-cell table:formula="of:=[.C131]/[.B131]" office:value-type="float" office:value="525.943396226415" calcext:value-type="float">
            <text:p>525.943396226415</text:p>
          </table:table-cell>
          <table:table-cell table:formula="of:=1/[.D131]" office:value-type="float" office:value="0.0188679245283019" calcext:value-type="float">
            <text:p>0.0188679245283019</text:p>
          </table:table-cell>
          <table:table-cell table:formula="of:=LOG10([.E13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2.9" calcext:value-type="float">
            <text:p>52.9</text:p>
          </table:table-cell>
          <table:table-cell table:formula="of:=[.C132]/[.B132]" office:value-type="float" office:value="467.505241090147" calcext:value-type="float">
            <text:p>467.505241090147</text:p>
          </table:table-cell>
          <table:table-cell table:formula="of:=1/[.D132]" office:value-type="float" office:value="0.0189035916824197" calcext:value-type="float">
            <text:p>0.0189035916824197</text:p>
          </table:table-cell>
          <table:table-cell table:formula="of:=LOG10([.E132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2.7" calcext:value-type="float">
            <text:p>52.7</text:p>
          </table:table-cell>
          <table:table-cell table:formula="of:=[.C133]/[.B133]" office:value-type="float" office:value="467.505241090147" calcext:value-type="float">
            <text:p>467.505241090147</text:p>
          </table:table-cell>
          <table:table-cell table:formula="of:=1/[.D133]" office:value-type="float" office:value="0.0189753320683112" calcext:value-type="float">
            <text:p>0.0189753320683112</text:p>
          </table:table-cell>
          <table:table-cell table:formula="of:=LOG10([.E133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2.6" calcext:value-type="float">
            <text:p>52.6</text:p>
          </table:table-cell>
          <table:table-cell table:formula="of:=[.C134]/[.B134]" office:value-type="float" office:value="420.754716981132" calcext:value-type="float">
            <text:p>420.754716981132</text:p>
          </table:table-cell>
          <table:table-cell table:formula="of:=1/[.D134]" office:value-type="float" office:value="0.0190114068441065" calcext:value-type="float">
            <text:p>0.0190114068441065</text:p>
          </table:table-cell>
          <table:table-cell table:formula="of:=LOG10([.E134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2.5" calcext:value-type="float">
            <text:p>52.5</text:p>
          </table:table-cell>
          <table:table-cell table:formula="of:=[.C135]/[.B135]" office:value-type="float" office:value="467.505241090147" calcext:value-type="float">
            <text:p>467.505241090147</text:p>
          </table:table-cell>
          <table:table-cell table:formula="of:=1/[.D135]" office:value-type="float" office:value="0.0190476190476191" calcext:value-type="float">
            <text:p>0.0190476190476191</text:p>
          </table:table-cell>
          <table:table-cell table:formula="of:=LOG10([.E13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2.5" calcext:value-type="float">
            <text:p>52.5</text:p>
          </table:table-cell>
          <table:table-cell table:formula="of:=[.C136]/[.B136]" office:value-type="float" office:value="382.504288164666" calcext:value-type="float">
            <text:p>382.504288164666</text:p>
          </table:table-cell>
          <table:table-cell table:formula="of:=1/[.D136]" office:value-type="float" office:value="0.0190476190476191" calcext:value-type="float">
            <text:p>0.0190476190476191</text:p>
          </table:table-cell>
          <table:table-cell table:formula="of:=LOG10([.E136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2.4" calcext:value-type="float">
            <text:p>52.4</text:p>
          </table:table-cell>
          <table:table-cell table:formula="of:=[.C137]/[.B137]" office:value-type="float" office:value="467.505241090147" calcext:value-type="float">
            <text:p>467.505241090147</text:p>
          </table:table-cell>
          <table:table-cell table:formula="of:=1/[.D137]" office:value-type="float" office:value="0.0190839694656489" calcext:value-type="float">
            <text:p>0.0190839694656489</text:p>
          </table:table-cell>
          <table:table-cell table:formula="of:=LOG10([.E137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2.3" calcext:value-type="float">
            <text:p>52.3</text:p>
          </table:table-cell>
          <table:table-cell table:formula="of:=[.C138]/[.B138]" office:value-type="float" office:value="525.943396226415" calcext:value-type="float">
            <text:p>525.943396226415</text:p>
          </table:table-cell>
          <table:table-cell table:formula="of:=1/[.D138]" office:value-type="float" office:value="0.0191204588910134" calcext:value-type="float">
            <text:p>0.0191204588910134</text:p>
          </table:table-cell>
          <table:table-cell table:formula="of:=LOG10([.E138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2.2" calcext:value-type="float">
            <text:p>52.2</text:p>
          </table:table-cell>
          <table:table-cell table:formula="of:=[.C139]/[.B139]" office:value-type="float" office:value="525.943396226415" calcext:value-type="float">
            <text:p>525.943396226415</text:p>
          </table:table-cell>
          <table:table-cell table:formula="of:=1/[.D139]" office:value-type="float" office:value="0.0191570881226054" calcext:value-type="float">
            <text:p>0.0191570881226054</text:p>
          </table:table-cell>
          <table:table-cell table:formula="of:=LOG10([.E139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2" calcext:value-type="float">
            <text:p>52</text:p>
          </table:table-cell>
          <table:table-cell table:formula="of:=[.C140]/[.B140]" office:value-type="float" office:value="467.505241090147" calcext:value-type="float">
            <text:p>467.505241090147</text:p>
          </table:table-cell>
          <table:table-cell table:formula="of:=1/[.D140]" office:value-type="float" office:value="0.0192307692307692" calcext:value-type="float">
            <text:p>0.0192307692307692</text:p>
          </table:table-cell>
          <table:table-cell table:formula="of:=LOG10([.E140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1.9" calcext:value-type="float">
            <text:p>51.9</text:p>
          </table:table-cell>
          <table:table-cell table:formula="of:=[.C141]/[.B141]" office:value-type="float" office:value="525.943396226415" calcext:value-type="float">
            <text:p>525.943396226415</text:p>
          </table:table-cell>
          <table:table-cell table:formula="of:=1/[.D141]" office:value-type="float" office:value="0.0192678227360308" calcext:value-type="float">
            <text:p>0.0192678227360308</text:p>
          </table:table-cell>
          <table:table-cell table:formula="of:=LOG10([.E14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51.8" calcext:value-type="float">
            <text:p>51.8</text:p>
          </table:table-cell>
          <table:table-cell table:formula="of:=[.C142]/[.B142]" office:value-type="float" office:value="422.641509433962" calcext:value-type="float">
            <text:p>422.641509433962</text:p>
          </table:table-cell>
          <table:table-cell table:formula="of:=1/[.D142]" office:value-type="float" office:value="0.0193050193050193" calcext:value-type="float">
            <text:p>0.0193050193050193</text:p>
          </table:table-cell>
          <table:table-cell table:formula="of:=LOG10([.E142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1.8" calcext:value-type="float">
            <text:p>51.8</text:p>
          </table:table-cell>
          <table:table-cell table:formula="of:=[.C143]/[.B143]" office:value-type="float" office:value="467.505241090147" calcext:value-type="float">
            <text:p>467.505241090147</text:p>
          </table:table-cell>
          <table:table-cell table:formula="of:=1/[.D143]" office:value-type="float" office:value="0.0193050193050193" calcext:value-type="float">
            <text:p>0.0193050193050193</text:p>
          </table:table-cell>
          <table:table-cell table:formula="of:=LOG10([.E143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1.7" calcext:value-type="float">
            <text:p>51.7</text:p>
          </table:table-cell>
          <table:table-cell table:formula="of:=[.C144]/[.B144]" office:value-type="float" office:value="467.505241090147" calcext:value-type="float">
            <text:p>467.505241090147</text:p>
          </table:table-cell>
          <table:table-cell table:formula="of:=1/[.D144]" office:value-type="float" office:value="0.0193423597678917" calcext:value-type="float">
            <text:p>0.0193423597678917</text:p>
          </table:table-cell>
          <table:table-cell table:formula="of:=LOG10([.E144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51.6" calcext:value-type="float">
            <text:p>51.6</text:p>
          </table:table-cell>
          <table:table-cell table:formula="of:=[.C145]/[.B145]" office:value-type="float" office:value="384.219554030875" calcext:value-type="float">
            <text:p>384.219554030875</text:p>
          </table:table-cell>
          <table:table-cell table:formula="of:=1/[.D145]" office:value-type="float" office:value="0.0193798449612403" calcext:value-type="float">
            <text:p>0.0193798449612403</text:p>
          </table:table-cell>
          <table:table-cell table:formula="of:=LOG10([.E145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1.5" calcext:value-type="float">
            <text:p>51.5</text:p>
          </table:table-cell>
          <table:table-cell table:formula="of:=[.C146]/[.B146]" office:value-type="float" office:value="525.943396226415" calcext:value-type="float">
            <text:p>525.943396226415</text:p>
          </table:table-cell>
          <table:table-cell table:formula="of:=1/[.D146]" office:value-type="float" office:value="0.0194174757281553" calcext:value-type="float">
            <text:p>0.0194174757281553</text:p>
          </table:table-cell>
          <table:table-cell table:formula="of:=LOG10([.E146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1.4" calcext:value-type="float">
            <text:p>51.4</text:p>
          </table:table-cell>
          <table:table-cell table:formula="of:=[.C147]/[.B147]" office:value-type="float" office:value="467.505241090147" calcext:value-type="float">
            <text:p>467.505241090147</text:p>
          </table:table-cell>
          <table:table-cell table:formula="of:=1/[.D147]" office:value-type="float" office:value="0.0194552529182879" calcext:value-type="float">
            <text:p>0.0194552529182879</text:p>
          </table:table-cell>
          <table:table-cell table:formula="of:=LOG10([.E147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1.3" calcext:value-type="float">
            <text:p>51.3</text:p>
          </table:table-cell>
          <table:table-cell table:formula="of:=[.C148]/[.B148]" office:value-type="float" office:value="467.505241090147" calcext:value-type="float">
            <text:p>467.505241090147</text:p>
          </table:table-cell>
          <table:table-cell table:formula="of:=1/[.D148]" office:value-type="float" office:value="0.0194931773879142" calcext:value-type="float">
            <text:p>0.0194931773879142</text:p>
          </table:table-cell>
          <table:table-cell table:formula="of:=LOG10([.E148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4" calcext:value-type="float">
            <text:p>2.24</text:p>
          </table:table-cell>
          <table:table-cell office:value-type="float" office:value="51.2" calcext:value-type="float">
            <text:p>51.2</text:p>
          </table:table-cell>
          <table:table-cell table:formula="of:=[.C149]/[.B149]" office:value-type="float" office:value="325.10885341074" calcext:value-type="float">
            <text:p>325.10885341074</text:p>
          </table:table-cell>
          <table:table-cell table:formula="of:=1/[.D149]" office:value-type="float" office:value="0.01953125" calcext:value-type="float">
            <text:p>0.01953125</text:p>
          </table:table-cell>
          <table:table-cell table:formula="of:=LOG10([.E149])" office:value-type="float" office:value="2.51202879642654" calcext:value-type="float">
            <text:p>2.51202879642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1.2" calcext:value-type="float">
            <text:p>51.2</text:p>
          </table:table-cell>
          <table:table-cell table:formula="of:=[.C150]/[.B150]" office:value-type="float" office:value="467.505241090147" calcext:value-type="float">
            <text:p>467.505241090147</text:p>
          </table:table-cell>
          <table:table-cell table:formula="of:=1/[.D150]" office:value-type="float" office:value="0.01953125" calcext:value-type="float">
            <text:p>0.01953125</text:p>
          </table:table-cell>
          <table:table-cell table:formula="of:=LOG10([.E150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1.1" calcext:value-type="float">
            <text:p>51.1</text:p>
          </table:table-cell>
          <table:table-cell table:formula="of:=[.C151]/[.B151]" office:value-type="float" office:value="525.943396226415" calcext:value-type="float">
            <text:p>525.943396226415</text:p>
          </table:table-cell>
          <table:table-cell table:formula="of:=1/[.D151]" office:value-type="float" office:value="0.0195694716242661" calcext:value-type="float">
            <text:p>0.0195694716242661</text:p>
          </table:table-cell>
          <table:table-cell table:formula="of:=LOG10([.E15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51" calcext:value-type="float">
            <text:p>51</text:p>
          </table:table-cell>
          <table:table-cell table:formula="of:=[.C152]/[.B152]" office:value-type="float" office:value="701.25786163522" calcext:value-type="float">
            <text:p>701.25786163522</text:p>
          </table:table-cell>
          <table:table-cell table:formula="of:=1/[.D152]" office:value-type="float" office:value="0.0196078431372549" calcext:value-type="float">
            <text:p>0.0196078431372549</text:p>
          </table:table-cell>
          <table:table-cell table:formula="of:=LOG10([.E152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0.9" calcext:value-type="float">
            <text:p>50.9</text:p>
          </table:table-cell>
          <table:table-cell table:formula="of:=[.C153]/[.B153]" office:value-type="float" office:value="467.505241090147" calcext:value-type="float">
            <text:p>467.505241090147</text:p>
          </table:table-cell>
          <table:table-cell table:formula="of:=1/[.D153]" office:value-type="float" office:value="0.0196463654223969" calcext:value-type="float">
            <text:p>0.0196463654223969</text:p>
          </table:table-cell>
          <table:table-cell table:formula="of:=LOG10([.E153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50.9" calcext:value-type="float">
            <text:p>50.9</text:p>
          </table:table-cell>
          <table:table-cell table:formula="of:=[.C154]/[.B154]" office:value-type="float" office:value="382.504288164666" calcext:value-type="float">
            <text:p>382.504288164666</text:p>
          </table:table-cell>
          <table:table-cell table:formula="of:=1/[.D154]" office:value-type="float" office:value="0.0196463654223969" calcext:value-type="float">
            <text:p>0.0196463654223969</text:p>
          </table:table-cell>
          <table:table-cell table:formula="of:=LOG10([.E154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50.8" calcext:value-type="float">
            <text:p>50.8</text:p>
          </table:table-cell>
          <table:table-cell table:formula="of:=[.C155]/[.B155]" office:value-type="float" office:value="420.754716981132" calcext:value-type="float">
            <text:p>420.754716981132</text:p>
          </table:table-cell>
          <table:table-cell table:formula="of:=1/[.D155]" office:value-type="float" office:value="0.0196850393700787" calcext:value-type="float">
            <text:p>0.0196850393700787</text:p>
          </table:table-cell>
          <table:table-cell table:formula="of:=LOG10([.E155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50.7" calcext:value-type="float">
            <text:p>50.7</text:p>
          </table:table-cell>
          <table:table-cell table:formula="of:=[.C156]/[.B156]" office:value-type="float" office:value="528.301886792453" calcext:value-type="float">
            <text:p>528.301886792453</text:p>
          </table:table-cell>
          <table:table-cell table:formula="of:=1/[.D156]" office:value-type="float" office:value="0.019723865877712" calcext:value-type="float">
            <text:p>0.019723865877712</text:p>
          </table:table-cell>
          <table:table-cell table:formula="of:=LOG10([.E156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0.6" calcext:value-type="float">
            <text:p>50.6</text:p>
          </table:table-cell>
          <table:table-cell table:formula="of:=[.C157]/[.B157]" office:value-type="float" office:value="525.943396226415" calcext:value-type="float">
            <text:p>525.943396226415</text:p>
          </table:table-cell>
          <table:table-cell table:formula="of:=1/[.D157]" office:value-type="float" office:value="0.0197628458498024" calcext:value-type="float">
            <text:p>0.0197628458498024</text:p>
          </table:table-cell>
          <table:table-cell table:formula="of:=LOG10([.E157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50.5" calcext:value-type="float">
            <text:p>50.5</text:p>
          </table:table-cell>
          <table:table-cell table:formula="of:=[.C158]/[.B158]" office:value-type="float" office:value="422.641509433962" calcext:value-type="float">
            <text:p>422.641509433962</text:p>
          </table:table-cell>
          <table:table-cell table:formula="of:=1/[.D158]" office:value-type="float" office:value="0.0198019801980198" calcext:value-type="float">
            <text:p>0.0198019801980198</text:p>
          </table:table-cell>
          <table:table-cell table:formula="of:=LOG10([.E158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50.4" calcext:value-type="float">
            <text:p>50.4</text:p>
          </table:table-cell>
          <table:table-cell table:formula="of:=[.C159]/[.B159]" office:value-type="float" office:value="422.641509433962" calcext:value-type="float">
            <text:p>422.641509433962</text:p>
          </table:table-cell>
          <table:table-cell table:formula="of:=1/[.D159]" office:value-type="float" office:value="0.0198412698412698" calcext:value-type="float">
            <text:p>0.0198412698412698</text:p>
          </table:table-cell>
          <table:table-cell table:formula="of:=LOG10([.E159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0.3" calcext:value-type="float">
            <text:p>50.3</text:p>
          </table:table-cell>
          <table:table-cell table:formula="of:=[.C160]/[.B160]" office:value-type="float" office:value="525.943396226415" calcext:value-type="float">
            <text:p>525.943396226415</text:p>
          </table:table-cell>
          <table:table-cell table:formula="of:=1/[.D160]" office:value-type="float" office:value="0.0198807157057654" calcext:value-type="float">
            <text:p>0.0198807157057654</text:p>
          </table:table-cell>
          <table:table-cell table:formula="of:=LOG10([.E160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50.3" calcext:value-type="float">
            <text:p>50.3</text:p>
          </table:table-cell>
          <table:table-cell table:formula="of:=[.C161]/[.B161]" office:value-type="float" office:value="525.943396226415" calcext:value-type="float">
            <text:p>525.943396226415</text:p>
          </table:table-cell>
          <table:table-cell table:formula="of:=1/[.D161]" office:value-type="float" office:value="0.0198807157057654" calcext:value-type="float">
            <text:p>0.0198807157057654</text:p>
          </table:table-cell>
          <table:table-cell table:formula="of:=LOG10([.E16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50.2" calcext:value-type="float">
            <text:p>50.2</text:p>
          </table:table-cell>
          <table:table-cell table:formula="of:=[.C162]/[.B162]" office:value-type="float" office:value="528.301886792453" calcext:value-type="float">
            <text:p>528.301886792453</text:p>
          </table:table-cell>
          <table:table-cell table:formula="of:=1/[.D162]" office:value-type="float" office:value="0.0199203187250996" calcext:value-type="float">
            <text:p>0.0199203187250996</text:p>
          </table:table-cell>
          <table:table-cell table:formula="of:=LOG10([.E16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50.1" calcext:value-type="float">
            <text:p>50.1</text:p>
          </table:table-cell>
          <table:table-cell table:formula="of:=[.C163]/[.B163]" office:value-type="float" office:value="467.505241090147" calcext:value-type="float">
            <text:p>467.505241090147</text:p>
          </table:table-cell>
          <table:table-cell table:formula="of:=1/[.D163]" office:value-type="float" office:value="0.0199600798403194" calcext:value-type="float">
            <text:p>0.0199600798403194</text:p>
          </table:table-cell>
          <table:table-cell table:formula="of:=LOG10([.E163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50.1" calcext:value-type="float">
            <text:p>50.1</text:p>
          </table:table-cell>
          <table:table-cell table:formula="of:=[.C164]/[.B164]" office:value-type="float" office:value="384.219554030875" calcext:value-type="float">
            <text:p>384.219554030875</text:p>
          </table:table-cell>
          <table:table-cell table:formula="of:=1/[.D164]" office:value-type="float" office:value="0.0199600798403194" calcext:value-type="float">
            <text:p>0.0199600798403194</text:p>
          </table:table-cell>
          <table:table-cell table:formula="of:=LOG10([.E164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4" calcext:value-type="float">
            <text:p>2.24</text:p>
          </table:table-cell>
          <table:table-cell office:value-type="float" office:value="50" calcext:value-type="float">
            <text:p>50</text:p>
          </table:table-cell>
          <table:table-cell table:formula="of:=[.C165]/[.B165]" office:value-type="float" office:value="325.10885341074" calcext:value-type="float">
            <text:p>325.10885341074</text:p>
          </table:table-cell>
          <table:table-cell table:formula="of:=1/[.D165]" office:value-type="float" office:value="0.02" calcext:value-type="float">
            <text:p>0.02</text:p>
          </table:table-cell>
          <table:table-cell table:formula="of:=LOG10([.E165])" office:value-type="float" office:value="2.51202879642654" calcext:value-type="float">
            <text:p>2.512028796426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9.9" calcext:value-type="float">
            <text:p>49.9</text:p>
          </table:table-cell>
          <table:table-cell table:formula="of:=[.C166]/[.B166]" office:value-type="float" office:value="469.601677148847" calcext:value-type="float">
            <text:p>469.601677148847</text:p>
          </table:table-cell>
          <table:table-cell table:formula="of:=1/[.D166]" office:value-type="float" office:value="0.0200400801603206" calcext:value-type="float">
            <text:p>0.0200400801603206</text:p>
          </table:table-cell>
          <table:table-cell table:formula="of:=LOG10([.E166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9.8" calcext:value-type="float">
            <text:p>49.8</text:p>
          </table:table-cell>
          <table:table-cell table:formula="of:=[.C167]/[.B167]" office:value-type="float" office:value="528.301886792453" calcext:value-type="float">
            <text:p>528.301886792453</text:p>
          </table:table-cell>
          <table:table-cell table:formula="of:=1/[.D167]" office:value-type="float" office:value="0.0200803212851406" calcext:value-type="float">
            <text:p>0.0200803212851406</text:p>
          </table:table-cell>
          <table:table-cell table:formula="of:=LOG10([.E16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9.8" calcext:value-type="float">
            <text:p>49.8</text:p>
          </table:table-cell>
          <table:table-cell table:formula="of:=[.C168]/[.B168]" office:value-type="float" office:value="701.25786163522" calcext:value-type="float">
            <text:p>701.25786163522</text:p>
          </table:table-cell>
          <table:table-cell table:formula="of:=1/[.D168]" office:value-type="float" office:value="0.0200803212851406" calcext:value-type="float">
            <text:p>0.0200803212851406</text:p>
          </table:table-cell>
          <table:table-cell table:formula="of:=LOG10([.E168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9.7" calcext:value-type="float">
            <text:p>49.7</text:p>
          </table:table-cell>
          <table:table-cell table:formula="of:=[.C169]/[.B169]" office:value-type="float" office:value="841.509433962264" calcext:value-type="float">
            <text:p>841.509433962264</text:p>
          </table:table-cell>
          <table:table-cell table:formula="of:=1/[.D169]" office:value-type="float" office:value="0.0201207243460765" calcext:value-type="float">
            <text:p>0.0201207243460765</text:p>
          </table:table-cell>
          <table:table-cell table:formula="of:=LOG10([.E169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9.7" calcext:value-type="float">
            <text:p>49.7</text:p>
          </table:table-cell>
          <table:table-cell table:formula="of:=[.C170]/[.B170]" office:value-type="float" office:value="525.943396226415" calcext:value-type="float">
            <text:p>525.943396226415</text:p>
          </table:table-cell>
          <table:table-cell table:formula="of:=1/[.D170]" office:value-type="float" office:value="0.0201207243460765" calcext:value-type="float">
            <text:p>0.0201207243460765</text:p>
          </table:table-cell>
          <table:table-cell table:formula="of:=LOG10([.E170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9.6" calcext:value-type="float">
            <text:p>49.6</text:p>
          </table:table-cell>
          <table:table-cell table:formula="of:=[.C171]/[.B171]" office:value-type="float" office:value="469.601677148847" calcext:value-type="float">
            <text:p>469.601677148847</text:p>
          </table:table-cell>
          <table:table-cell table:formula="of:=1/[.D171]" office:value-type="float" office:value="0.0201612903225806" calcext:value-type="float">
            <text:p>0.0201612903225806</text:p>
          </table:table-cell>
          <table:table-cell table:formula="of:=LOG10([.E171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9.5" calcext:value-type="float">
            <text:p>49.5</text:p>
          </table:table-cell>
          <table:table-cell table:formula="of:=[.C172]/[.B172]" office:value-type="float" office:value="467.505241090147" calcext:value-type="float">
            <text:p>467.505241090147</text:p>
          </table:table-cell>
          <table:table-cell table:formula="of:=1/[.D172]" office:value-type="float" office:value="0.0202020202020202" calcext:value-type="float">
            <text:p>0.0202020202020202</text:p>
          </table:table-cell>
          <table:table-cell table:formula="of:=LOG10([.E172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9.5" calcext:value-type="float">
            <text:p>49.5</text:p>
          </table:table-cell>
          <table:table-cell table:formula="of:=[.C173]/[.B173]" office:value-type="float" office:value="528.301886792453" calcext:value-type="float">
            <text:p>528.301886792453</text:p>
          </table:table-cell>
          <table:table-cell table:formula="of:=1/[.D173]" office:value-type="float" office:value="0.0202020202020202" calcext:value-type="float">
            <text:p>0.0202020202020202</text:p>
          </table:table-cell>
          <table:table-cell table:formula="of:=LOG10([.E17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9.4" calcext:value-type="float">
            <text:p>49.4</text:p>
          </table:table-cell>
          <table:table-cell table:formula="of:=[.C174]/[.B174]" office:value-type="float" office:value="422.641509433962" calcext:value-type="float">
            <text:p>422.641509433962</text:p>
          </table:table-cell>
          <table:table-cell table:formula="of:=1/[.D174]" office:value-type="float" office:value="0.0202429149797571" calcext:value-type="float">
            <text:p>0.0202429149797571</text:p>
          </table:table-cell>
          <table:table-cell table:formula="of:=LOG10([.E174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9.3" calcext:value-type="float">
            <text:p>49.3</text:p>
          </table:table-cell>
          <table:table-cell table:formula="of:=[.C175]/[.B175]" office:value-type="float" office:value="469.601677148847" calcext:value-type="float">
            <text:p>469.601677148847</text:p>
          </table:table-cell>
          <table:table-cell table:formula="of:=1/[.D175]" office:value-type="float" office:value="0.0202839756592292" calcext:value-type="float">
            <text:p>0.0202839756592292</text:p>
          </table:table-cell>
          <table:table-cell table:formula="of:=LOG10([.E17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9.2" calcext:value-type="float">
            <text:p>49.2</text:p>
          </table:table-cell>
          <table:table-cell table:formula="of:=[.C176]/[.B176]" office:value-type="float" office:value="469.601677148847" calcext:value-type="float">
            <text:p>469.601677148847</text:p>
          </table:table-cell>
          <table:table-cell table:formula="of:=1/[.D176]" office:value-type="float" office:value="0.0203252032520325" calcext:value-type="float">
            <text:p>0.0203252032520325</text:p>
          </table:table-cell>
          <table:table-cell table:formula="of:=LOG10([.E176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9.2" calcext:value-type="float">
            <text:p>49.2</text:p>
          </table:table-cell>
          <table:table-cell table:formula="of:=[.C177]/[.B177]" office:value-type="float" office:value="467.505241090147" calcext:value-type="float">
            <text:p>467.505241090147</text:p>
          </table:table-cell>
          <table:table-cell table:formula="of:=1/[.D177]" office:value-type="float" office:value="0.0203252032520325" calcext:value-type="float">
            <text:p>0.0203252032520325</text:p>
          </table:table-cell>
          <table:table-cell table:formula="of:=LOG10([.E177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9.1" calcext:value-type="float">
            <text:p>49.1</text:p>
          </table:table-cell>
          <table:table-cell table:formula="of:=[.C178]/[.B178]" office:value-type="float" office:value="701.25786163522" calcext:value-type="float">
            <text:p>701.25786163522</text:p>
          </table:table-cell>
          <table:table-cell table:formula="of:=1/[.D178]" office:value-type="float" office:value="0.0203665987780041" calcext:value-type="float">
            <text:p>0.0203665987780041</text:p>
          </table:table-cell>
          <table:table-cell table:formula="of:=LOG10([.E178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9.1" calcext:value-type="float">
            <text:p>49.1</text:p>
          </table:table-cell>
          <table:table-cell table:formula="of:=[.C179]/[.B179]" office:value-type="float" office:value="467.505241090147" calcext:value-type="float">
            <text:p>467.505241090147</text:p>
          </table:table-cell>
          <table:table-cell table:formula="of:=1/[.D179]" office:value-type="float" office:value="0.0203665987780041" calcext:value-type="float">
            <text:p>0.0203665987780041</text:p>
          </table:table-cell>
          <table:table-cell table:formula="of:=LOG10([.E179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9" calcext:value-type="float">
            <text:p>49</text:p>
          </table:table-cell>
          <table:table-cell table:formula="of:=[.C180]/[.B180]" office:value-type="float" office:value="469.601677148847" calcext:value-type="float">
            <text:p>469.601677148847</text:p>
          </table:table-cell>
          <table:table-cell table:formula="of:=1/[.D180]" office:value-type="float" office:value="0.0204081632653061" calcext:value-type="float">
            <text:p>0.0204081632653061</text:p>
          </table:table-cell>
          <table:table-cell table:formula="of:=LOG10([.E180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9" calcext:value-type="float">
            <text:p>49</text:p>
          </table:table-cell>
          <table:table-cell table:formula="of:=[.C181]/[.B181]" office:value-type="float" office:value="525.943396226415" calcext:value-type="float">
            <text:p>525.943396226415</text:p>
          </table:table-cell>
          <table:table-cell table:formula="of:=1/[.D181]" office:value-type="float" office:value="0.0204081632653061" calcext:value-type="float">
            <text:p>0.0204081632653061</text:p>
          </table:table-cell>
          <table:table-cell table:formula="of:=LOG10([.E18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8.9" calcext:value-type="float">
            <text:p>48.9</text:p>
          </table:table-cell>
          <table:table-cell table:formula="of:=[.C182]/[.B182]" office:value-type="float" office:value="469.601677148847" calcext:value-type="float">
            <text:p>469.601677148847</text:p>
          </table:table-cell>
          <table:table-cell table:formula="of:=1/[.D182]" office:value-type="float" office:value="0.0204498977505113" calcext:value-type="float">
            <text:p>0.0204498977505113</text:p>
          </table:table-cell>
          <table:table-cell table:formula="of:=LOG10([.E182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8.8" calcext:value-type="float">
            <text:p>48.8</text:p>
          </table:table-cell>
          <table:table-cell table:formula="of:=[.C183]/[.B183]" office:value-type="float" office:value="467.505241090147" calcext:value-type="float">
            <text:p>467.505241090147</text:p>
          </table:table-cell>
          <table:table-cell table:formula="of:=1/[.D183]" office:value-type="float" office:value="0.0204918032786885" calcext:value-type="float">
            <text:p>0.0204918032786885</text:p>
          </table:table-cell>
          <table:table-cell table:formula="of:=LOG10([.E183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48.8" calcext:value-type="float">
            <text:p>48.8</text:p>
          </table:table-cell>
          <table:table-cell table:formula="of:=[.C184]/[.B184]" office:value-type="float" office:value="384.219554030875" calcext:value-type="float">
            <text:p>384.219554030875</text:p>
          </table:table-cell>
          <table:table-cell table:formula="of:=1/[.D184]" office:value-type="float" office:value="0.0204918032786885" calcext:value-type="float">
            <text:p>0.0204918032786885</text:p>
          </table:table-cell>
          <table:table-cell table:formula="of:=LOG10([.E184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8.7" calcext:value-type="float">
            <text:p>48.7</text:p>
          </table:table-cell>
          <table:table-cell table:formula="of:=[.C185]/[.B185]" office:value-type="float" office:value="467.505241090147" calcext:value-type="float">
            <text:p>467.505241090147</text:p>
          </table:table-cell>
          <table:table-cell table:formula="of:=1/[.D185]" office:value-type="float" office:value="0.0205338809034908" calcext:value-type="float">
            <text:p>0.0205338809034908</text:p>
          </table:table-cell>
          <table:table-cell table:formula="of:=LOG10([.E18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8.7" calcext:value-type="float">
            <text:p>48.7</text:p>
          </table:table-cell>
          <table:table-cell table:formula="of:=[.C186]/[.B186]" office:value-type="float" office:value="528.301886792453" calcext:value-type="float">
            <text:p>528.301886792453</text:p>
          </table:table-cell>
          <table:table-cell table:formula="of:=1/[.D186]" office:value-type="float" office:value="0.0205338809034908" calcext:value-type="float">
            <text:p>0.0205338809034908</text:p>
          </table:table-cell>
          <table:table-cell table:formula="of:=LOG10([.E186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6" calcext:value-type="float">
            <text:p>48.6</text:p>
          </table:table-cell>
          <table:table-cell table:formula="of:=[.C187]/[.B187]" office:value-type="float" office:value="525.943396226415" calcext:value-type="float">
            <text:p>525.943396226415</text:p>
          </table:table-cell>
          <table:table-cell table:formula="of:=1/[.D187]" office:value-type="float" office:value="0.0205761316872428" calcext:value-type="float">
            <text:p>0.0205761316872428</text:p>
          </table:table-cell>
          <table:table-cell table:formula="of:=LOG10([.E187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6" calcext:value-type="float">
            <text:p>48.6</text:p>
          </table:table-cell>
          <table:table-cell table:formula="of:=[.C188]/[.B188]" office:value-type="float" office:value="525.943396226415" calcext:value-type="float">
            <text:p>525.943396226415</text:p>
          </table:table-cell>
          <table:table-cell table:formula="of:=1/[.D188]" office:value-type="float" office:value="0.0205761316872428" calcext:value-type="float">
            <text:p>0.0205761316872428</text:p>
          </table:table-cell>
          <table:table-cell table:formula="of:=LOG10([.E188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5" calcext:value-type="float">
            <text:p>48.5</text:p>
          </table:table-cell>
          <table:table-cell table:formula="of:=[.C189]/[.B189]" office:value-type="float" office:value="525.943396226415" calcext:value-type="float">
            <text:p>525.943396226415</text:p>
          </table:table-cell>
          <table:table-cell table:formula="of:=1/[.D189]" office:value-type="float" office:value="0.0206185567010309" calcext:value-type="float">
            <text:p>0.0206185567010309</text:p>
          </table:table-cell>
          <table:table-cell table:formula="of:=LOG10([.E189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5" calcext:value-type="float">
            <text:p>48.5</text:p>
          </table:table-cell>
          <table:table-cell table:formula="of:=[.C190]/[.B190]" office:value-type="float" office:value="525.943396226415" calcext:value-type="float">
            <text:p>525.943396226415</text:p>
          </table:table-cell>
          <table:table-cell table:formula="of:=1/[.D190]" office:value-type="float" office:value="0.0206185567010309" calcext:value-type="float">
            <text:p>0.0206185567010309</text:p>
          </table:table-cell>
          <table:table-cell table:formula="of:=LOG10([.E190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4" calcext:value-type="float">
            <text:p>48.4</text:p>
          </table:table-cell>
          <table:table-cell table:formula="of:=[.C191]/[.B191]" office:value-type="float" office:value="525.943396226415" calcext:value-type="float">
            <text:p>525.943396226415</text:p>
          </table:table-cell>
          <table:table-cell table:formula="of:=1/[.D191]" office:value-type="float" office:value="0.0206611570247934" calcext:value-type="float">
            <text:p>0.0206611570247934</text:p>
          </table:table-cell>
          <table:table-cell table:formula="of:=LOG10([.E19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8.4" calcext:value-type="float">
            <text:p>48.4</text:p>
          </table:table-cell>
          <table:table-cell table:formula="of:=[.C192]/[.B192]" office:value-type="float" office:value="469.601677148847" calcext:value-type="float">
            <text:p>469.601677148847</text:p>
          </table:table-cell>
          <table:table-cell table:formula="of:=1/[.D192]" office:value-type="float" office:value="0.0206611570247934" calcext:value-type="float">
            <text:p>0.0206611570247934</text:p>
          </table:table-cell>
          <table:table-cell table:formula="of:=LOG10([.E192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3" calcext:value-type="float">
            <text:p>48.3</text:p>
          </table:table-cell>
          <table:table-cell table:formula="of:=[.C193]/[.B193]" office:value-type="float" office:value="525.943396226415" calcext:value-type="float">
            <text:p>525.943396226415</text:p>
          </table:table-cell>
          <table:table-cell table:formula="of:=1/[.D193]" office:value-type="float" office:value="0.020703933747412" calcext:value-type="float">
            <text:p>0.020703933747412</text:p>
          </table:table-cell>
          <table:table-cell table:formula="of:=LOG10([.E193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8.2" calcext:value-type="float">
            <text:p>48.2</text:p>
          </table:table-cell>
          <table:table-cell table:formula="of:=[.C194]/[.B194]" office:value-type="float" office:value="525.943396226415" calcext:value-type="float">
            <text:p>525.943396226415</text:p>
          </table:table-cell>
          <table:table-cell table:formula="of:=1/[.D194]" office:value-type="float" office:value="0.020746887966805" calcext:value-type="float">
            <text:p>0.020746887966805</text:p>
          </table:table-cell>
          <table:table-cell table:formula="of:=LOG10([.E194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8.2" calcext:value-type="float">
            <text:p>48.2</text:p>
          </table:table-cell>
          <table:table-cell table:formula="of:=[.C195]/[.B195]" office:value-type="float" office:value="422.641509433962" calcext:value-type="float">
            <text:p>422.641509433962</text:p>
          </table:table-cell>
          <table:table-cell table:formula="of:=1/[.D195]" office:value-type="float" office:value="0.020746887966805" calcext:value-type="float">
            <text:p>0.020746887966805</text:p>
          </table:table-cell>
          <table:table-cell table:formula="of:=LOG10([.E195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2.24" calcext:value-type="float">
            <text:p>2.24</text:p>
          </table:table-cell>
          <table:table-cell office:value-type="float" office:value="48.1" calcext:value-type="float">
            <text:p>48.1</text:p>
          </table:table-cell>
          <table:table-cell table:formula="of:=[.C196]/[.B196]" office:value-type="float" office:value="301.88679245283" calcext:value-type="float">
            <text:p>301.88679245283</text:p>
          </table:table-cell>
          <table:table-cell table:formula="of:=1/[.D196]" office:value-type="float" office:value="0.0207900207900208" calcext:value-type="float">
            <text:p>0.0207900207900208</text:p>
          </table:table-cell>
          <table:table-cell table:formula="of:=LOG10([.E196])" office:value-type="float" office:value="2.47984411305514" calcext:value-type="float">
            <text:p>2.479844113055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4" calcext:value-type="float">
            <text:p>2.24</text:p>
          </table:table-cell>
          <table:table-cell office:value-type="float" office:value="48.1" calcext:value-type="float">
            <text:p>48.1</text:p>
          </table:table-cell>
          <table:table-cell table:formula="of:=[.C197]/[.B197]" office:value-type="float" office:value="352.201257861635" calcext:value-type="float">
            <text:p>352.201257861635</text:p>
          </table:table-cell>
          <table:table-cell table:formula="of:=1/[.D197]" office:value-type="float" office:value="0.0207900207900208" calcext:value-type="float">
            <text:p>0.0207900207900208</text:p>
          </table:table-cell>
          <table:table-cell table:formula="of:=LOG10([.E197])" office:value-type="float" office:value="2.54679090268575" calcext:value-type="float">
            <text:p>2.546790902685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8" calcext:value-type="float">
            <text:p>48</text:p>
          </table:table-cell>
          <table:table-cell table:formula="of:=[.C198]/[.B198]" office:value-type="float" office:value="528.301886792453" calcext:value-type="float">
            <text:p>528.301886792453</text:p>
          </table:table-cell>
          <table:table-cell table:formula="of:=1/[.D198]" office:value-type="float" office:value="0.0208333333333333" calcext:value-type="float">
            <text:p>0.0208333333333333</text:p>
          </table:table-cell>
          <table:table-cell table:formula="of:=LOG10([.E19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8" calcext:value-type="float">
            <text:p>48</text:p>
          </table:table-cell>
          <table:table-cell table:formula="of:=[.C199]/[.B199]" office:value-type="float" office:value="701.25786163522" calcext:value-type="float">
            <text:p>701.25786163522</text:p>
          </table:table-cell>
          <table:table-cell table:formula="of:=1/[.D199]" office:value-type="float" office:value="0.0208333333333333" calcext:value-type="float">
            <text:p>0.0208333333333333</text:p>
          </table:table-cell>
          <table:table-cell table:formula="of:=LOG10([.E199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8" calcext:value-type="float">
            <text:p>48</text:p>
          </table:table-cell>
          <table:table-cell table:formula="of:=[.C200]/[.B200]" office:value-type="float" office:value="528.301886792453" calcext:value-type="float">
            <text:p>528.301886792453</text:p>
          </table:table-cell>
          <table:table-cell table:formula="of:=1/[.D200]" office:value-type="float" office:value="0.0208333333333333" calcext:value-type="float">
            <text:p>0.0208333333333333</text:p>
          </table:table-cell>
          <table:table-cell table:formula="of:=LOG10([.E20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7.9" calcext:value-type="float">
            <text:p>47.9</text:p>
          </table:table-cell>
          <table:table-cell table:formula="of:=[.C201]/[.B201]" office:value-type="float" office:value="422.641509433962" calcext:value-type="float">
            <text:p>422.641509433962</text:p>
          </table:table-cell>
          <table:table-cell table:formula="of:=1/[.D201]" office:value-type="float" office:value="0.0208768267223382" calcext:value-type="float">
            <text:p>0.0208768267223382</text:p>
          </table:table-cell>
          <table:table-cell table:formula="of:=LOG10([.E201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7.8" calcext:value-type="float">
            <text:p>47.8</text:p>
          </table:table-cell>
          <table:table-cell table:formula="of:=[.C202]/[.B202]" office:value-type="float" office:value="469.601677148847" calcext:value-type="float">
            <text:p>469.601677148847</text:p>
          </table:table-cell>
          <table:table-cell table:formula="of:=1/[.D202]" office:value-type="float" office:value="0.0209205020920502" calcext:value-type="float">
            <text:p>0.0209205020920502</text:p>
          </table:table-cell>
          <table:table-cell table:formula="of:=LOG10([.E202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.8" calcext:value-type="float">
            <text:p>47.8</text:p>
          </table:table-cell>
          <table:table-cell table:formula="of:=[.C203]/[.B203]" office:value-type="float" office:value="528.301886792453" calcext:value-type="float">
            <text:p>528.301886792453</text:p>
          </table:table-cell>
          <table:table-cell table:formula="of:=1/[.D203]" office:value-type="float" office:value="0.0209205020920502" calcext:value-type="float">
            <text:p>0.0209205020920502</text:p>
          </table:table-cell>
          <table:table-cell table:formula="of:=LOG10([.E20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7.7" calcext:value-type="float">
            <text:p>47.7</text:p>
          </table:table-cell>
          <table:table-cell table:formula="of:=[.C204]/[.B204]" office:value-type="float" office:value="469.601677148847" calcext:value-type="float">
            <text:p>469.601677148847</text:p>
          </table:table-cell>
          <table:table-cell table:formula="of:=1/[.D204]" office:value-type="float" office:value="0.0209643605870021" calcext:value-type="float">
            <text:p>0.0209643605870021</text:p>
          </table:table-cell>
          <table:table-cell table:formula="of:=LOG10([.E204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7.7" calcext:value-type="float">
            <text:p>47.7</text:p>
          </table:table-cell>
          <table:table-cell table:formula="of:=[.C205]/[.B205]" office:value-type="float" office:value="469.601677148847" calcext:value-type="float">
            <text:p>469.601677148847</text:p>
          </table:table-cell>
          <table:table-cell table:formula="of:=1/[.D205]" office:value-type="float" office:value="0.0209643605870021" calcext:value-type="float">
            <text:p>0.0209643605870021</text:p>
          </table:table-cell>
          <table:table-cell table:formula="of:=LOG10([.E20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3" calcext:value-type="float">
            <text:p>2.23</text:p>
          </table:table-cell>
          <table:table-cell office:value-type="float" office:value="47.6" calcext:value-type="float">
            <text:p>47.6</text:p>
          </table:table-cell>
          <table:table-cell table:formula="of:=[.C206]/[.B206]" office:value-type="float" office:value="420.754716981132" calcext:value-type="float">
            <text:p>420.754716981132</text:p>
          </table:table-cell>
          <table:table-cell table:formula="of:=1/[.D206]" office:value-type="float" office:value="0.0210084033613445" calcext:value-type="float">
            <text:p>0.0210084033613445</text:p>
          </table:table-cell>
          <table:table-cell table:formula="of:=LOG10([.E206])" office:value-type="float" office:value="2.62402899344737" calcext:value-type="float">
            <text:p>2.624028993447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7.6" calcext:value-type="float">
            <text:p>47.6</text:p>
          </table:table-cell>
          <table:table-cell table:formula="of:=[.C207]/[.B207]" office:value-type="float" office:value="469.601677148847" calcext:value-type="float">
            <text:p>469.601677148847</text:p>
          </table:table-cell>
          <table:table-cell table:formula="of:=1/[.D207]" office:value-type="float" office:value="0.0210084033613445" calcext:value-type="float">
            <text:p>0.0210084033613445</text:p>
          </table:table-cell>
          <table:table-cell table:formula="of:=LOG10([.E207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.5" calcext:value-type="float">
            <text:p>47.5</text:p>
          </table:table-cell>
          <table:table-cell table:formula="of:=[.C208]/[.B208]" office:value-type="float" office:value="528.301886792453" calcext:value-type="float">
            <text:p>528.301886792453</text:p>
          </table:table-cell>
          <table:table-cell table:formula="of:=1/[.D208]" office:value-type="float" office:value="0.0210526315789474" calcext:value-type="float">
            <text:p>0.0210526315789474</text:p>
          </table:table-cell>
          <table:table-cell table:formula="of:=LOG10([.E20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7.5" calcext:value-type="float">
            <text:p>47.5</text:p>
          </table:table-cell>
          <table:table-cell table:formula="of:=[.C209]/[.B209]" office:value-type="float" office:value="701.25786163522" calcext:value-type="float">
            <text:p>701.25786163522</text:p>
          </table:table-cell>
          <table:table-cell table:formula="of:=1/[.D209]" office:value-type="float" office:value="0.0210526315789474" calcext:value-type="float">
            <text:p>0.0210526315789474</text:p>
          </table:table-cell>
          <table:table-cell table:formula="of:=LOG10([.E209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7.4" calcext:value-type="float">
            <text:p>47.4</text:p>
          </table:table-cell>
          <table:table-cell table:formula="of:=[.C210]/[.B210]" office:value-type="float" office:value="469.601677148847" calcext:value-type="float">
            <text:p>469.601677148847</text:p>
          </table:table-cell>
          <table:table-cell table:formula="of:=1/[.D210]" office:value-type="float" office:value="0.0210970464135021" calcext:value-type="float">
            <text:p>0.0210970464135021</text:p>
          </table:table-cell>
          <table:table-cell table:formula="of:=LOG10([.E210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5" calcext:value-type="float">
            <text:p>2.25</text:p>
          </table:table-cell>
          <table:table-cell office:value-type="float" office:value="47.4" calcext:value-type="float">
            <text:p>47.4</text:p>
          </table:table-cell>
          <table:table-cell table:formula="of:=[.C211]/[.B211]" office:value-type="float" office:value="353.77358490566" calcext:value-type="float">
            <text:p>353.77358490566</text:p>
          </table:table-cell>
          <table:table-cell table:formula="of:=1/[.D211]" office:value-type="float" office:value="0.0210970464135021" calcext:value-type="float">
            <text:p>0.0210970464135021</text:p>
          </table:table-cell>
          <table:table-cell table:formula="of:=LOG10([.E211])" office:value-type="float" office:value="2.54872540246295" calcext:value-type="float">
            <text:p>2.548725402462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47.4" calcext:value-type="float">
            <text:p>47.4</text:p>
          </table:table-cell>
          <table:table-cell table:formula="of:=[.C212]/[.B212]" office:value-type="float" office:value="384.219554030875" calcext:value-type="float">
            <text:p>384.219554030875</text:p>
          </table:table-cell>
          <table:table-cell table:formula="of:=1/[.D212]" office:value-type="float" office:value="0.0210970464135021" calcext:value-type="float">
            <text:p>0.0210970464135021</text:p>
          </table:table-cell>
          <table:table-cell table:formula="of:=LOG10([.E212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.3" calcext:value-type="float">
            <text:p>47.3</text:p>
          </table:table-cell>
          <table:table-cell table:formula="of:=[.C213]/[.B213]" office:value-type="float" office:value="528.301886792453" calcext:value-type="float">
            <text:p>528.301886792453</text:p>
          </table:table-cell>
          <table:table-cell table:formula="of:=1/[.D213]" office:value-type="float" office:value="0.0211416490486258" calcext:value-type="float">
            <text:p>0.0211416490486258</text:p>
          </table:table-cell>
          <table:table-cell table:formula="of:=LOG10([.E21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.3" calcext:value-type="float">
            <text:p>47.3</text:p>
          </table:table-cell>
          <table:table-cell table:formula="of:=[.C214]/[.B214]" office:value-type="float" office:value="528.301886792453" calcext:value-type="float">
            <text:p>528.301886792453</text:p>
          </table:table-cell>
          <table:table-cell table:formula="of:=1/[.D214]" office:value-type="float" office:value="0.0211416490486258" calcext:value-type="float">
            <text:p>0.0211416490486258</text:p>
          </table:table-cell>
          <table:table-cell table:formula="of:=LOG10([.E214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7.3" calcext:value-type="float">
            <text:p>47.3</text:p>
          </table:table-cell>
          <table:table-cell table:formula="of:=[.C215]/[.B215]" office:value-type="float" office:value="467.505241090147" calcext:value-type="float">
            <text:p>467.505241090147</text:p>
          </table:table-cell>
          <table:table-cell table:formula="of:=1/[.D215]" office:value-type="float" office:value="0.0211416490486258" calcext:value-type="float">
            <text:p>0.0211416490486258</text:p>
          </table:table-cell>
          <table:table-cell table:formula="of:=LOG10([.E215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.2" calcext:value-type="float">
            <text:p>47.2</text:p>
          </table:table-cell>
          <table:table-cell table:formula="of:=[.C216]/[.B216]" office:value-type="float" office:value="528.301886792453" calcext:value-type="float">
            <text:p>528.301886792453</text:p>
          </table:table-cell>
          <table:table-cell table:formula="of:=1/[.D216]" office:value-type="float" office:value="0.0211864406779661" calcext:value-type="float">
            <text:p>0.0211864406779661</text:p>
          </table:table-cell>
          <table:table-cell table:formula="of:=LOG10([.E216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7.2" calcext:value-type="float">
            <text:p>47.2</text:p>
          </table:table-cell>
          <table:table-cell table:formula="of:=[.C217]/[.B217]" office:value-type="float" office:value="601.078167115903" calcext:value-type="float">
            <text:p>601.078167115903</text:p>
          </table:table-cell>
          <table:table-cell table:formula="of:=1/[.D217]" office:value-type="float" office:value="0.0211864406779661" calcext:value-type="float">
            <text:p>0.0211864406779661</text:p>
          </table:table-cell>
          <table:table-cell table:formula="of:=LOG10([.E217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7.1" calcext:value-type="float">
            <text:p>47.1</text:p>
          </table:table-cell>
          <table:table-cell table:formula="of:=[.C218]/[.B218]" office:value-type="float" office:value="422.641509433962" calcext:value-type="float">
            <text:p>422.641509433962</text:p>
          </table:table-cell>
          <table:table-cell table:formula="of:=1/[.D218]" office:value-type="float" office:value="0.0212314225053079" calcext:value-type="float">
            <text:p>0.0212314225053079</text:p>
          </table:table-cell>
          <table:table-cell table:formula="of:=LOG10([.E218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.1" calcext:value-type="float">
            <text:p>47.1</text:p>
          </table:table-cell>
          <table:table-cell table:formula="of:=[.C219]/[.B219]" office:value-type="float" office:value="528.301886792453" calcext:value-type="float">
            <text:p>528.301886792453</text:p>
          </table:table-cell>
          <table:table-cell table:formula="of:=1/[.D219]" office:value-type="float" office:value="0.0212314225053079" calcext:value-type="float">
            <text:p>0.0212314225053079</text:p>
          </table:table-cell>
          <table:table-cell table:formula="of:=LOG10([.E219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7" calcext:value-type="float">
            <text:p>47</text:p>
          </table:table-cell>
          <table:table-cell table:formula="of:=[.C220]/[.B220]" office:value-type="float" office:value="525.943396226415" calcext:value-type="float">
            <text:p>525.943396226415</text:p>
          </table:table-cell>
          <table:table-cell table:formula="of:=1/[.D220]" office:value-type="float" office:value="0.0212765957446809" calcext:value-type="float">
            <text:p>0.0212765957446809</text:p>
          </table:table-cell>
          <table:table-cell table:formula="of:=LOG10([.E220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7" calcext:value-type="float">
            <text:p>47</text:p>
          </table:table-cell>
          <table:table-cell table:formula="of:=[.C221]/[.B221]" office:value-type="float" office:value="704.402515723271" calcext:value-type="float">
            <text:p>704.402515723271</text:p>
          </table:table-cell>
          <table:table-cell table:formula="of:=1/[.D221]" office:value-type="float" office:value="0.0212765957446809" calcext:value-type="float">
            <text:p>0.0212765957446809</text:p>
          </table:table-cell>
          <table:table-cell table:formula="of:=LOG10([.E22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7" calcext:value-type="float">
            <text:p>47</text:p>
          </table:table-cell>
          <table:table-cell table:formula="of:=[.C222]/[.B222]" office:value-type="float" office:value="528.301886792453" calcext:value-type="float">
            <text:p>528.301886792453</text:p>
          </table:table-cell>
          <table:table-cell table:formula="of:=1/[.D222]" office:value-type="float" office:value="0.0212765957446809" calcext:value-type="float">
            <text:p>0.0212765957446809</text:p>
          </table:table-cell>
          <table:table-cell table:formula="of:=LOG10([.E22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6.9" calcext:value-type="float">
            <text:p>46.9</text:p>
          </table:table-cell>
          <table:table-cell table:formula="of:=[.C223]/[.B223]" office:value-type="float" office:value="528.301886792453" calcext:value-type="float">
            <text:p>528.301886792453</text:p>
          </table:table-cell>
          <table:table-cell table:formula="of:=1/[.D223]" office:value-type="float" office:value="0.0213219616204691" calcext:value-type="float">
            <text:p>0.0213219616204691</text:p>
          </table:table-cell>
          <table:table-cell table:formula="of:=LOG10([.E22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9" calcext:value-type="float">
            <text:p>46.9</text:p>
          </table:table-cell>
          <table:table-cell table:formula="of:=[.C224]/[.B224]" office:value-type="float" office:value="603.77358490566" calcext:value-type="float">
            <text:p>603.77358490566</text:p>
          </table:table-cell>
          <table:table-cell table:formula="of:=1/[.D224]" office:value-type="float" office:value="0.0213219616204691" calcext:value-type="float">
            <text:p>0.0213219616204691</text:p>
          </table:table-cell>
          <table:table-cell table:formula="of:=LOG10([.E22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9" calcext:value-type="float">
            <text:p>46.9</text:p>
          </table:table-cell>
          <table:table-cell table:formula="of:=[.C225]/[.B225]" office:value-type="float" office:value="603.77358490566" calcext:value-type="float">
            <text:p>603.77358490566</text:p>
          </table:table-cell>
          <table:table-cell table:formula="of:=1/[.D225]" office:value-type="float" office:value="0.0213219616204691" calcext:value-type="float">
            <text:p>0.0213219616204691</text:p>
          </table:table-cell>
          <table:table-cell table:formula="of:=LOG10([.E22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8" calcext:value-type="float">
            <text:p>46.8</text:p>
          </table:table-cell>
          <table:table-cell table:formula="of:=[.C226]/[.B226]" office:value-type="float" office:value="603.77358490566" calcext:value-type="float">
            <text:p>603.77358490566</text:p>
          </table:table-cell>
          <table:table-cell table:formula="of:=1/[.D226]" office:value-type="float" office:value="0.0213675213675214" calcext:value-type="float">
            <text:p>0.0213675213675214</text:p>
          </table:table-cell>
          <table:table-cell table:formula="of:=LOG10([.E22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6.8" calcext:value-type="float">
            <text:p>46.8</text:p>
          </table:table-cell>
          <table:table-cell table:formula="of:=[.C227]/[.B227]" office:value-type="float" office:value="422.641509433962" calcext:value-type="float">
            <text:p>422.641509433962</text:p>
          </table:table-cell>
          <table:table-cell table:formula="of:=1/[.D227]" office:value-type="float" office:value="0.0213675213675214" calcext:value-type="float">
            <text:p>0.0213675213675214</text:p>
          </table:table-cell>
          <table:table-cell table:formula="of:=LOG10([.E227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6.7" calcext:value-type="float">
            <text:p>46.7</text:p>
          </table:table-cell>
          <table:table-cell table:formula="of:=[.C228]/[.B228]" office:value-type="float" office:value="601.078167115903" calcext:value-type="float">
            <text:p>601.078167115903</text:p>
          </table:table-cell>
          <table:table-cell table:formula="of:=1/[.D228]" office:value-type="float" office:value="0.0214132762312634" calcext:value-type="float">
            <text:p>0.0214132762312634</text:p>
          </table:table-cell>
          <table:table-cell table:formula="of:=LOG10([.E228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6.7" calcext:value-type="float">
            <text:p>46.7</text:p>
          </table:table-cell>
          <table:table-cell table:formula="of:=[.C229]/[.B229]" office:value-type="float" office:value="601.078167115903" calcext:value-type="float">
            <text:p>601.078167115903</text:p>
          </table:table-cell>
          <table:table-cell table:formula="of:=1/[.D229]" office:value-type="float" office:value="0.0214132762312634" calcext:value-type="float">
            <text:p>0.0214132762312634</text:p>
          </table:table-cell>
          <table:table-cell table:formula="of:=LOG10([.E229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7" calcext:value-type="float">
            <text:p>46.7</text:p>
          </table:table-cell>
          <table:table-cell table:formula="of:=[.C230]/[.B230]" office:value-type="float" office:value="603.77358490566" calcext:value-type="float">
            <text:p>603.77358490566</text:p>
          </table:table-cell>
          <table:table-cell table:formula="of:=1/[.D230]" office:value-type="float" office:value="0.0214132762312634" calcext:value-type="float">
            <text:p>0.0214132762312634</text:p>
          </table:table-cell>
          <table:table-cell table:formula="of:=LOG10([.E23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6.6" calcext:value-type="float">
            <text:p>46.6</text:p>
          </table:table-cell>
          <table:table-cell table:formula="of:=[.C231]/[.B231]" office:value-type="float" office:value="469.601677148847" calcext:value-type="float">
            <text:p>469.601677148847</text:p>
          </table:table-cell>
          <table:table-cell table:formula="of:=1/[.D231]" office:value-type="float" office:value="0.0214592274678112" calcext:value-type="float">
            <text:p>0.0214592274678112</text:p>
          </table:table-cell>
          <table:table-cell table:formula="of:=LOG10([.E231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6.6" calcext:value-type="float">
            <text:p>46.6</text:p>
          </table:table-cell>
          <table:table-cell table:formula="of:=[.C232]/[.B232]" office:value-type="float" office:value="525.943396226415" calcext:value-type="float">
            <text:p>525.943396226415</text:p>
          </table:table-cell>
          <table:table-cell table:formula="of:=1/[.D232]" office:value-type="float" office:value="0.0214592274678112" calcext:value-type="float">
            <text:p>0.0214592274678112</text:p>
          </table:table-cell>
          <table:table-cell table:formula="of:=LOG10([.E232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6.6" calcext:value-type="float">
            <text:p>46.6</text:p>
          </table:table-cell>
          <table:table-cell table:formula="of:=[.C233]/[.B233]" office:value-type="float" office:value="528.301886792453" calcext:value-type="float">
            <text:p>528.301886792453</text:p>
          </table:table-cell>
          <table:table-cell table:formula="of:=1/[.D233]" office:value-type="float" office:value="0.0214592274678112" calcext:value-type="float">
            <text:p>0.0214592274678112</text:p>
          </table:table-cell>
          <table:table-cell table:formula="of:=LOG10([.E23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6" calcext:value-type="float">
            <text:p>46.6</text:p>
          </table:table-cell>
          <table:table-cell table:formula="of:=[.C234]/[.B234]" office:value-type="float" office:value="603.77358490566" calcext:value-type="float">
            <text:p>603.77358490566</text:p>
          </table:table-cell>
          <table:table-cell table:formula="of:=1/[.D234]" office:value-type="float" office:value="0.0214592274678112" calcext:value-type="float">
            <text:p>0.0214592274678112</text:p>
          </table:table-cell>
          <table:table-cell table:formula="of:=LOG10([.E23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5" calcext:value-type="float">
            <text:p>46.5</text:p>
          </table:table-cell>
          <table:table-cell table:formula="of:=[.C235]/[.B235]" office:value-type="float" office:value="603.77358490566" calcext:value-type="float">
            <text:p>603.77358490566</text:p>
          </table:table-cell>
          <table:table-cell table:formula="of:=1/[.D235]" office:value-type="float" office:value="0.021505376344086" calcext:value-type="float">
            <text:p>0.021505376344086</text:p>
          </table:table-cell>
          <table:table-cell table:formula="of:=LOG10([.E23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5" calcext:value-type="float">
            <text:p>46.5</text:p>
          </table:table-cell>
          <table:table-cell table:formula="of:=[.C236]/[.B236]" office:value-type="float" office:value="603.77358490566" calcext:value-type="float">
            <text:p>603.77358490566</text:p>
          </table:table-cell>
          <table:table-cell table:formula="of:=1/[.D236]" office:value-type="float" office:value="0.021505376344086" calcext:value-type="float">
            <text:p>0.021505376344086</text:p>
          </table:table-cell>
          <table:table-cell table:formula="of:=LOG10([.E23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4" calcext:value-type="float">
            <text:p>46.4</text:p>
          </table:table-cell>
          <table:table-cell table:formula="of:=[.C237]/[.B237]" office:value-type="float" office:value="603.77358490566" calcext:value-type="float">
            <text:p>603.77358490566</text:p>
          </table:table-cell>
          <table:table-cell table:formula="of:=1/[.D237]" office:value-type="float" office:value="0.021551724137931" calcext:value-type="float">
            <text:p>0.021551724137931</text:p>
          </table:table-cell>
          <table:table-cell table:formula="of:=LOG10([.E23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6.4" calcext:value-type="float">
            <text:p>46.4</text:p>
          </table:table-cell>
          <table:table-cell table:formula="of:=[.C238]/[.B238]" office:value-type="float" office:value="528.301886792453" calcext:value-type="float">
            <text:p>528.301886792453</text:p>
          </table:table-cell>
          <table:table-cell table:formula="of:=1/[.D238]" office:value-type="float" office:value="0.021551724137931" calcext:value-type="float">
            <text:p>0.021551724137931</text:p>
          </table:table-cell>
          <table:table-cell table:formula="of:=LOG10([.E23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6.4" calcext:value-type="float">
            <text:p>46.4</text:p>
          </table:table-cell>
          <table:table-cell table:formula="of:=[.C239]/[.B239]" office:value-type="float" office:value="1051.88679245283" calcext:value-type="float">
            <text:p>1051.88679245283</text:p>
          </table:table-cell>
          <table:table-cell table:formula="of:=1/[.D239]" office:value-type="float" office:value="0.021551724137931" calcext:value-type="float">
            <text:p>0.021551724137931</text:p>
          </table:table-cell>
          <table:table-cell table:formula="of:=LOG10([.E239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6.3" calcext:value-type="float">
            <text:p>46.3</text:p>
          </table:table-cell>
          <table:table-cell table:formula="of:=[.C240]/[.B240]" office:value-type="float" office:value="701.25786163522" calcext:value-type="float">
            <text:p>701.25786163522</text:p>
          </table:table-cell>
          <table:table-cell table:formula="of:=1/[.D240]" office:value-type="float" office:value="0.0215982721382289" calcext:value-type="float">
            <text:p>0.0215982721382289</text:p>
          </table:table-cell>
          <table:table-cell table:formula="of:=LOG10([.E240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6.3" calcext:value-type="float">
            <text:p>46.3</text:p>
          </table:table-cell>
          <table:table-cell table:formula="of:=[.C241]/[.B241]" office:value-type="float" office:value="422.641509433962" calcext:value-type="float">
            <text:p>422.641509433962</text:p>
          </table:table-cell>
          <table:table-cell table:formula="of:=1/[.D241]" office:value-type="float" office:value="0.0215982721382289" calcext:value-type="float">
            <text:p>0.0215982721382289</text:p>
          </table:table-cell>
          <table:table-cell table:formula="of:=LOG10([.E241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6.3" calcext:value-type="float">
            <text:p>46.3</text:p>
          </table:table-cell>
          <table:table-cell table:formula="of:=[.C242]/[.B242]" office:value-type="float" office:value="701.25786163522" calcext:value-type="float">
            <text:p>701.25786163522</text:p>
          </table:table-cell>
          <table:table-cell table:formula="of:=1/[.D242]" office:value-type="float" office:value="0.0215982721382289" calcext:value-type="float">
            <text:p>0.0215982721382289</text:p>
          </table:table-cell>
          <table:table-cell table:formula="of:=LOG10([.E242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6.3" calcext:value-type="float">
            <text:p>46.3</text:p>
          </table:table-cell>
          <table:table-cell table:formula="of:=[.C243]/[.B243]" office:value-type="float" office:value="528.301886792453" calcext:value-type="float">
            <text:p>528.301886792453</text:p>
          </table:table-cell>
          <table:table-cell table:formula="of:=1/[.D243]" office:value-type="float" office:value="0.0215982721382289" calcext:value-type="float">
            <text:p>0.0215982721382289</text:p>
          </table:table-cell>
          <table:table-cell table:formula="of:=LOG10([.E24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2.24" calcext:value-type="float">
            <text:p>2.24</text:p>
          </table:table-cell>
          <table:table-cell office:value-type="float" office:value="46.2" calcext:value-type="float">
            <text:p>46.2</text:p>
          </table:table-cell>
          <table:table-cell table:formula="of:=[.C244]/[.B244]" office:value-type="float" office:value="325.10885341074" calcext:value-type="float">
            <text:p>325.10885341074</text:p>
          </table:table-cell>
          <table:table-cell table:formula="of:=1/[.D244]" office:value-type="float" office:value="0.0216450216450216" calcext:value-type="float">
            <text:p>0.0216450216450216</text:p>
          </table:table-cell>
          <table:table-cell table:formula="of:=LOG10([.E244])" office:value-type="float" office:value="2.51202879642654" calcext:value-type="float">
            <text:p>2.512028796426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6.2" calcext:value-type="float">
            <text:p>46.2</text:p>
          </table:table-cell>
          <table:table-cell table:formula="of:=[.C245]/[.B245]" office:value-type="float" office:value="601.078167115903" calcext:value-type="float">
            <text:p>601.078167115903</text:p>
          </table:table-cell>
          <table:table-cell table:formula="of:=1/[.D245]" office:value-type="float" office:value="0.0216450216450216" calcext:value-type="float">
            <text:p>0.0216450216450216</text:p>
          </table:table-cell>
          <table:table-cell table:formula="of:=LOG10([.E245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2" calcext:value-type="float">
            <text:p>46.2</text:p>
          </table:table-cell>
          <table:table-cell table:formula="of:=[.C246]/[.B246]" office:value-type="float" office:value="603.77358490566" calcext:value-type="float">
            <text:p>603.77358490566</text:p>
          </table:table-cell>
          <table:table-cell table:formula="of:=1/[.D246]" office:value-type="float" office:value="0.0216450216450216" calcext:value-type="float">
            <text:p>0.0216450216450216</text:p>
          </table:table-cell>
          <table:table-cell table:formula="of:=LOG10([.E24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6.1" calcext:value-type="float">
            <text:p>46.1</text:p>
          </table:table-cell>
          <table:table-cell table:formula="of:=[.C247]/[.B247]" office:value-type="float" office:value="528.301886792453" calcext:value-type="float">
            <text:p>528.301886792453</text:p>
          </table:table-cell>
          <table:table-cell table:formula="of:=1/[.D247]" office:value-type="float" office:value="0.0216919739696312" calcext:value-type="float">
            <text:p>0.0216919739696312</text:p>
          </table:table-cell>
          <table:table-cell table:formula="of:=LOG10([.E24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.1" calcext:value-type="float">
            <text:p>46.1</text:p>
          </table:table-cell>
          <table:table-cell table:formula="of:=[.C248]/[.B248]" office:value-type="float" office:value="603.77358490566" calcext:value-type="float">
            <text:p>603.77358490566</text:p>
          </table:table-cell>
          <table:table-cell table:formula="of:=1/[.D248]" office:value-type="float" office:value="0.0216919739696312" calcext:value-type="float">
            <text:p>0.0216919739696312</text:p>
          </table:table-cell>
          <table:table-cell table:formula="of:=LOG10([.E24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6.1" calcext:value-type="float">
            <text:p>46.1</text:p>
          </table:table-cell>
          <table:table-cell table:formula="of:=[.C249]/[.B249]" office:value-type="float" office:value="601.078167115903" calcext:value-type="float">
            <text:p>601.078167115903</text:p>
          </table:table-cell>
          <table:table-cell table:formula="of:=1/[.D249]" office:value-type="float" office:value="0.0216919739696312" calcext:value-type="float">
            <text:p>0.0216919739696312</text:p>
          </table:table-cell>
          <table:table-cell table:formula="of:=LOG10([.E249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6" calcext:value-type="float">
            <text:p>46</text:p>
          </table:table-cell>
          <table:table-cell table:formula="of:=[.C250]/[.B250]" office:value-type="float" office:value="603.77358490566" calcext:value-type="float">
            <text:p>603.77358490566</text:p>
          </table:table-cell>
          <table:table-cell table:formula="of:=1/[.D250]" office:value-type="float" office:value="0.0217391304347826" calcext:value-type="float">
            <text:p>0.0217391304347826</text:p>
          </table:table-cell>
          <table:table-cell table:formula="of:=LOG10([.E25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6" calcext:value-type="float">
            <text:p>46</text:p>
          </table:table-cell>
          <table:table-cell table:formula="of:=[.C251]/[.B251]" office:value-type="float" office:value="422.641509433962" calcext:value-type="float">
            <text:p>422.641509433962</text:p>
          </table:table-cell>
          <table:table-cell table:formula="of:=1/[.D251]" office:value-type="float" office:value="0.0217391304347826" calcext:value-type="float">
            <text:p>0.0217391304347826</text:p>
          </table:table-cell>
          <table:table-cell table:formula="of:=LOG10([.E251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6" calcext:value-type="float">
            <text:p>46</text:p>
          </table:table-cell>
          <table:table-cell table:formula="of:=[.C252]/[.B252]" office:value-type="float" office:value="601.078167115903" calcext:value-type="float">
            <text:p>601.078167115903</text:p>
          </table:table-cell>
          <table:table-cell table:formula="of:=1/[.D252]" office:value-type="float" office:value="0.0217391304347826" calcext:value-type="float">
            <text:p>0.0217391304347826</text:p>
          </table:table-cell>
          <table:table-cell table:formula="of:=LOG10([.E252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9" calcext:value-type="float">
            <text:p>45.9</text:p>
          </table:table-cell>
          <table:table-cell table:formula="of:=[.C253]/[.B253]" office:value-type="float" office:value="704.402515723271" calcext:value-type="float">
            <text:p>704.402515723271</text:p>
          </table:table-cell>
          <table:table-cell table:formula="of:=1/[.D253]" office:value-type="float" office:value="0.0217864923747277" calcext:value-type="float">
            <text:p>0.0217864923747277</text:p>
          </table:table-cell>
          <table:table-cell table:formula="of:=LOG10([.E25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9" calcext:value-type="float">
            <text:p>45.9</text:p>
          </table:table-cell>
          <table:table-cell table:formula="of:=[.C254]/[.B254]" office:value-type="float" office:value="704.402515723271" calcext:value-type="float">
            <text:p>704.402515723271</text:p>
          </table:table-cell>
          <table:table-cell table:formula="of:=1/[.D254]" office:value-type="float" office:value="0.0217864923747277" calcext:value-type="float">
            <text:p>0.0217864923747277</text:p>
          </table:table-cell>
          <table:table-cell table:formula="of:=LOG10([.E25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5.8" calcext:value-type="float">
            <text:p>45.8</text:p>
          </table:table-cell>
          <table:table-cell table:formula="of:=[.C255]/[.B255]" office:value-type="float" office:value="601.078167115903" calcext:value-type="float">
            <text:p>601.078167115903</text:p>
          </table:table-cell>
          <table:table-cell table:formula="of:=1/[.D255]" office:value-type="float" office:value="0.0218340611353712" calcext:value-type="float">
            <text:p>0.0218340611353712</text:p>
          </table:table-cell>
          <table:table-cell table:formula="of:=LOG10([.E255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5.8" calcext:value-type="float">
            <text:p>45.8</text:p>
          </table:table-cell>
          <table:table-cell table:formula="of:=[.C256]/[.B256]" office:value-type="float" office:value="603.77358490566" calcext:value-type="float">
            <text:p>603.77358490566</text:p>
          </table:table-cell>
          <table:table-cell table:formula="of:=1/[.D256]" office:value-type="float" office:value="0.0218340611353712" calcext:value-type="float">
            <text:p>0.0218340611353712</text:p>
          </table:table-cell>
          <table:table-cell table:formula="of:=LOG10([.E25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5.8" calcext:value-type="float">
            <text:p>45.8</text:p>
          </table:table-cell>
          <table:table-cell table:formula="of:=[.C257]/[.B257]" office:value-type="float" office:value="601.078167115903" calcext:value-type="float">
            <text:p>601.078167115903</text:p>
          </table:table-cell>
          <table:table-cell table:formula="of:=1/[.D257]" office:value-type="float" office:value="0.0218340611353712" calcext:value-type="float">
            <text:p>0.0218340611353712</text:p>
          </table:table-cell>
          <table:table-cell table:formula="of:=LOG10([.E257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5.8" calcext:value-type="float">
            <text:p>45.8</text:p>
          </table:table-cell>
          <table:table-cell table:formula="of:=[.C258]/[.B258]" office:value-type="float" office:value="701.25786163522" calcext:value-type="float">
            <text:p>701.25786163522</text:p>
          </table:table-cell>
          <table:table-cell table:formula="of:=1/[.D258]" office:value-type="float" office:value="0.0218340611353712" calcext:value-type="float">
            <text:p>0.0218340611353712</text:p>
          </table:table-cell>
          <table:table-cell table:formula="of:=LOG10([.E258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5.7" calcext:value-type="float">
            <text:p>45.7</text:p>
          </table:table-cell>
          <table:table-cell table:formula="of:=[.C259]/[.B259]" office:value-type="float" office:value="601.078167115903" calcext:value-type="float">
            <text:p>601.078167115903</text:p>
          </table:table-cell>
          <table:table-cell table:formula="of:=1/[.D259]" office:value-type="float" office:value="0.0218818380743983" calcext:value-type="float">
            <text:p>0.0218818380743983</text:p>
          </table:table-cell>
          <table:table-cell table:formula="of:=LOG10([.E259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5.7" calcext:value-type="float">
            <text:p>45.7</text:p>
          </table:table-cell>
          <table:table-cell table:formula="of:=[.C260]/[.B260]" office:value-type="float" office:value="528.301886792453" calcext:value-type="float">
            <text:p>528.301886792453</text:p>
          </table:table-cell>
          <table:table-cell table:formula="of:=1/[.D260]" office:value-type="float" office:value="0.0218818380743983" calcext:value-type="float">
            <text:p>0.0218818380743983</text:p>
          </table:table-cell>
          <table:table-cell table:formula="of:=LOG10([.E26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5.7" calcext:value-type="float">
            <text:p>45.7</text:p>
          </table:table-cell>
          <table:table-cell table:formula="of:=[.C261]/[.B261]" office:value-type="float" office:value="525.943396226415" calcext:value-type="float">
            <text:p>525.943396226415</text:p>
          </table:table-cell>
          <table:table-cell table:formula="of:=1/[.D261]" office:value-type="float" office:value="0.0218818380743983" calcext:value-type="float">
            <text:p>0.0218818380743983</text:p>
          </table:table-cell>
          <table:table-cell table:formula="of:=LOG10([.E261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5.6" calcext:value-type="float">
            <text:p>45.6</text:p>
          </table:table-cell>
          <table:table-cell table:formula="of:=[.C262]/[.B262]" office:value-type="float" office:value="528.301886792453" calcext:value-type="float">
            <text:p>528.301886792453</text:p>
          </table:table-cell>
          <table:table-cell table:formula="of:=1/[.D262]" office:value-type="float" office:value="0.0219298245614035" calcext:value-type="float">
            <text:p>0.0219298245614035</text:p>
          </table:table-cell>
          <table:table-cell table:formula="of:=LOG10([.E26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5.6" calcext:value-type="float">
            <text:p>45.6</text:p>
          </table:table-cell>
          <table:table-cell table:formula="of:=[.C263]/[.B263]" office:value-type="float" office:value="528.301886792453" calcext:value-type="float">
            <text:p>528.301886792453</text:p>
          </table:table-cell>
          <table:table-cell table:formula="of:=1/[.D263]" office:value-type="float" office:value="0.0219298245614035" calcext:value-type="float">
            <text:p>0.0219298245614035</text:p>
          </table:table-cell>
          <table:table-cell table:formula="of:=LOG10([.E26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6" calcext:value-type="float">
            <text:p>45.6</text:p>
          </table:table-cell>
          <table:table-cell table:formula="of:=[.C264]/[.B264]" office:value-type="float" office:value="704.402515723271" calcext:value-type="float">
            <text:p>704.402515723271</text:p>
          </table:table-cell>
          <table:table-cell table:formula="of:=1/[.D264]" office:value-type="float" office:value="0.0219298245614035" calcext:value-type="float">
            <text:p>0.0219298245614035</text:p>
          </table:table-cell>
          <table:table-cell table:formula="of:=LOG10([.E26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5.6" calcext:value-type="float">
            <text:p>45.6</text:p>
          </table:table-cell>
          <table:table-cell table:formula="of:=[.C265]/[.B265]" office:value-type="float" office:value="841.509433962264" calcext:value-type="float">
            <text:p>841.509433962264</text:p>
          </table:table-cell>
          <table:table-cell table:formula="of:=1/[.D265]" office:value-type="float" office:value="0.0219298245614035" calcext:value-type="float">
            <text:p>0.0219298245614035</text:p>
          </table:table-cell>
          <table:table-cell table:formula="of:=LOG10([.E265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5.6" calcext:value-type="float">
            <text:p>45.6</text:p>
          </table:table-cell>
          <table:table-cell table:formula="of:=[.C266]/[.B266]" office:value-type="float" office:value="1051.88679245283" calcext:value-type="float">
            <text:p>1051.88679245283</text:p>
          </table:table-cell>
          <table:table-cell table:formula="of:=1/[.D266]" office:value-type="float" office:value="0.0219298245614035" calcext:value-type="float">
            <text:p>0.0219298245614035</text:p>
          </table:table-cell>
          <table:table-cell table:formula="of:=LOG10([.E266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5" calcext:value-type="float">
            <text:p>45.5</text:p>
          </table:table-cell>
          <table:table-cell table:formula="of:=[.C267]/[.B267]" office:value-type="float" office:value="704.402515723271" calcext:value-type="float">
            <text:p>704.402515723271</text:p>
          </table:table-cell>
          <table:table-cell table:formula="of:=1/[.D267]" office:value-type="float" office:value="0.021978021978022" calcext:value-type="float">
            <text:p>0.021978021978022</text:p>
          </table:table-cell>
          <table:table-cell table:formula="of:=LOG10([.E26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5.5" calcext:value-type="float">
            <text:p>45.5</text:p>
          </table:table-cell>
          <table:table-cell table:formula="of:=[.C268]/[.B268]" office:value-type="float" office:value="603.77358490566" calcext:value-type="float">
            <text:p>603.77358490566</text:p>
          </table:table-cell>
          <table:table-cell table:formula="of:=1/[.D268]" office:value-type="float" office:value="0.021978021978022" calcext:value-type="float">
            <text:p>0.021978021978022</text:p>
          </table:table-cell>
          <table:table-cell table:formula="of:=LOG10([.E26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4" calcext:value-type="float">
            <text:p>45.4</text:p>
          </table:table-cell>
          <table:table-cell table:formula="of:=[.C269]/[.B269]" office:value-type="float" office:value="704.402515723271" calcext:value-type="float">
            <text:p>704.402515723271</text:p>
          </table:table-cell>
          <table:table-cell table:formula="of:=1/[.D269]" office:value-type="float" office:value="0.0220264317180617" calcext:value-type="float">
            <text:p>0.0220264317180617</text:p>
          </table:table-cell>
          <table:table-cell table:formula="of:=LOG10([.E26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5.4" calcext:value-type="float">
            <text:p>45.4</text:p>
          </table:table-cell>
          <table:table-cell table:formula="of:=[.C270]/[.B270]" office:value-type="float" office:value="528.301886792453" calcext:value-type="float">
            <text:p>528.301886792453</text:p>
          </table:table-cell>
          <table:table-cell table:formula="of:=1/[.D270]" office:value-type="float" office:value="0.0220264317180617" calcext:value-type="float">
            <text:p>0.0220264317180617</text:p>
          </table:table-cell>
          <table:table-cell table:formula="of:=LOG10([.E27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5.4" calcext:value-type="float">
            <text:p>45.4</text:p>
          </table:table-cell>
          <table:table-cell table:formula="of:=[.C271]/[.B271]" office:value-type="float" office:value="469.601677148847" calcext:value-type="float">
            <text:p>469.601677148847</text:p>
          </table:table-cell>
          <table:table-cell table:formula="of:=1/[.D271]" office:value-type="float" office:value="0.0220264317180617" calcext:value-type="float">
            <text:p>0.0220264317180617</text:p>
          </table:table-cell>
          <table:table-cell table:formula="of:=LOG10([.E271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3" calcext:value-type="float">
            <text:p>2.23</text:p>
          </table:table-cell>
          <table:table-cell office:value-type="float" office:value="45.4" calcext:value-type="float">
            <text:p>45.4</text:p>
          </table:table-cell>
          <table:table-cell table:formula="of:=[.C272]/[.B272]" office:value-type="float" office:value="382.504288164666" calcext:value-type="float">
            <text:p>382.504288164666</text:p>
          </table:table-cell>
          <table:table-cell table:formula="of:=1/[.D272]" office:value-type="float" office:value="0.0220264317180617" calcext:value-type="float">
            <text:p>0.0220264317180617</text:p>
          </table:table-cell>
          <table:table-cell table:formula="of:=LOG10([.E272])" office:value-type="float" office:value="2.58263630828915" calcext:value-type="float">
            <text:p>2.582636308289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5.3" calcext:value-type="float">
            <text:p>45.3</text:p>
          </table:table-cell>
          <table:table-cell table:formula="of:=[.C273]/[.B273]" office:value-type="float" office:value="469.601677148847" calcext:value-type="float">
            <text:p>469.601677148847</text:p>
          </table:table-cell>
          <table:table-cell table:formula="of:=1/[.D273]" office:value-type="float" office:value="0.022075055187638" calcext:value-type="float">
            <text:p>0.022075055187638</text:p>
          </table:table-cell>
          <table:table-cell table:formula="of:=LOG10([.E273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5.3" calcext:value-type="float">
            <text:p>45.3</text:p>
          </table:table-cell>
          <table:table-cell table:formula="of:=[.C274]/[.B274]" office:value-type="float" office:value="422.641509433962" calcext:value-type="float">
            <text:p>422.641509433962</text:p>
          </table:table-cell>
          <table:table-cell table:formula="of:=1/[.D274]" office:value-type="float" office:value="0.022075055187638" calcext:value-type="float">
            <text:p>0.022075055187638</text:p>
          </table:table-cell>
          <table:table-cell table:formula="of:=LOG10([.E274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5.3" calcext:value-type="float">
            <text:p>45.3</text:p>
          </table:table-cell>
          <table:table-cell table:formula="of:=[.C275]/[.B275]" office:value-type="float" office:value="469.601677148847" calcext:value-type="float">
            <text:p>469.601677148847</text:p>
          </table:table-cell>
          <table:table-cell table:formula="of:=1/[.D275]" office:value-type="float" office:value="0.022075055187638" calcext:value-type="float">
            <text:p>0.022075055187638</text:p>
          </table:table-cell>
          <table:table-cell table:formula="of:=LOG10([.E27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3" calcext:value-type="float">
            <text:p>45.3</text:p>
          </table:table-cell>
          <table:table-cell table:formula="of:=[.C276]/[.B276]" office:value-type="float" office:value="704.402515723271" calcext:value-type="float">
            <text:p>704.402515723271</text:p>
          </table:table-cell>
          <table:table-cell table:formula="of:=1/[.D276]" office:value-type="float" office:value="0.022075055187638" calcext:value-type="float">
            <text:p>0.022075055187638</text:p>
          </table:table-cell>
          <table:table-cell table:formula="of:=LOG10([.E27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5.3" calcext:value-type="float">
            <text:p>45.3</text:p>
          </table:table-cell>
          <table:table-cell table:formula="of:=[.C277]/[.B277]" office:value-type="float" office:value="603.77358490566" calcext:value-type="float">
            <text:p>603.77358490566</text:p>
          </table:table-cell>
          <table:table-cell table:formula="of:=1/[.D277]" office:value-type="float" office:value="0.022075055187638" calcext:value-type="float">
            <text:p>0.022075055187638</text:p>
          </table:table-cell>
          <table:table-cell table:formula="of:=LOG10([.E27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2" calcext:value-type="float">
            <text:p>45.2</text:p>
          </table:table-cell>
          <table:table-cell table:formula="of:=[.C278]/[.B278]" office:value-type="float" office:value="704.402515723271" calcext:value-type="float">
            <text:p>704.402515723271</text:p>
          </table:table-cell>
          <table:table-cell table:formula="of:=1/[.D278]" office:value-type="float" office:value="0.0221238938053097" calcext:value-type="float">
            <text:p>0.0221238938053097</text:p>
          </table:table-cell>
          <table:table-cell table:formula="of:=LOG10([.E27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2" calcext:value-type="float">
            <text:p>45.2</text:p>
          </table:table-cell>
          <table:table-cell table:formula="of:=[.C279]/[.B279]" office:value-type="float" office:value="704.402515723271" calcext:value-type="float">
            <text:p>704.402515723271</text:p>
          </table:table-cell>
          <table:table-cell table:formula="of:=1/[.D279]" office:value-type="float" office:value="0.0221238938053097" calcext:value-type="float">
            <text:p>0.0221238938053097</text:p>
          </table:table-cell>
          <table:table-cell table:formula="of:=LOG10([.E27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5.2" calcext:value-type="float">
            <text:p>45.2</text:p>
          </table:table-cell>
          <table:table-cell table:formula="of:=[.C280]/[.B280]" office:value-type="float" office:value="701.25786163522" calcext:value-type="float">
            <text:p>701.25786163522</text:p>
          </table:table-cell>
          <table:table-cell table:formula="of:=1/[.D280]" office:value-type="float" office:value="0.0221238938053097" calcext:value-type="float">
            <text:p>0.0221238938053097</text:p>
          </table:table-cell>
          <table:table-cell table:formula="of:=LOG10([.E280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5.1" calcext:value-type="float">
            <text:p>45.1</text:p>
          </table:table-cell>
          <table:table-cell table:formula="of:=[.C281]/[.B281]" office:value-type="float" office:value="704.402515723271" calcext:value-type="float">
            <text:p>704.402515723271</text:p>
          </table:table-cell>
          <table:table-cell table:formula="of:=1/[.D281]" office:value-type="float" office:value="0.0221729490022173" calcext:value-type="float">
            <text:p>0.0221729490022173</text:p>
          </table:table-cell>
          <table:table-cell table:formula="of:=LOG10([.E28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5.1" calcext:value-type="float">
            <text:p>45.1</text:p>
          </table:table-cell>
          <table:table-cell table:formula="of:=[.C282]/[.B282]" office:value-type="float" office:value="601.078167115903" calcext:value-type="float">
            <text:p>601.078167115903</text:p>
          </table:table-cell>
          <table:table-cell table:formula="of:=1/[.D282]" office:value-type="float" office:value="0.0221729490022173" calcext:value-type="float">
            <text:p>0.0221729490022173</text:p>
          </table:table-cell>
          <table:table-cell table:formula="of:=LOG10([.E282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5.1" calcext:value-type="float">
            <text:p>45.1</text:p>
          </table:table-cell>
          <table:table-cell table:formula="of:=[.C283]/[.B283]" office:value-type="float" office:value="528.301886792453" calcext:value-type="float">
            <text:p>528.301886792453</text:p>
          </table:table-cell>
          <table:table-cell table:formula="of:=1/[.D283]" office:value-type="float" office:value="0.0221729490022173" calcext:value-type="float">
            <text:p>0.0221729490022173</text:p>
          </table:table-cell>
          <table:table-cell table:formula="of:=LOG10([.E28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45.1" calcext:value-type="float">
            <text:p>45.1</text:p>
          </table:table-cell>
          <table:table-cell table:formula="of:=[.C284]/[.B284]" office:value-type="float" office:value="384.219554030875" calcext:value-type="float">
            <text:p>384.219554030875</text:p>
          </table:table-cell>
          <table:table-cell table:formula="of:=1/[.D284]" office:value-type="float" office:value="0.0221729490022173" calcext:value-type="float">
            <text:p>0.0221729490022173</text:p>
          </table:table-cell>
          <table:table-cell table:formula="of:=LOG10([.E284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5.1" calcext:value-type="float">
            <text:p>45.1</text:p>
          </table:table-cell>
          <table:table-cell table:formula="of:=[.C285]/[.B285]" office:value-type="float" office:value="469.601677148847" calcext:value-type="float">
            <text:p>469.601677148847</text:p>
          </table:table-cell>
          <table:table-cell table:formula="of:=1/[.D285]" office:value-type="float" office:value="0.0221729490022173" calcext:value-type="float">
            <text:p>0.0221729490022173</text:p>
          </table:table-cell>
          <table:table-cell table:formula="of:=LOG10([.E28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5" calcext:value-type="float">
            <text:p>45</text:p>
          </table:table-cell>
          <table:table-cell table:formula="of:=[.C286]/[.B286]" office:value-type="float" office:value="601.078167115903" calcext:value-type="float">
            <text:p>601.078167115903</text:p>
          </table:table-cell>
          <table:table-cell table:formula="of:=1/[.D286]" office:value-type="float" office:value="0.0222222222222222" calcext:value-type="float">
            <text:p>0.0222222222222222</text:p>
          </table:table-cell>
          <table:table-cell table:formula="of:=LOG10([.E286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5" calcext:value-type="float">
            <text:p>45</text:p>
          </table:table-cell>
          <table:table-cell table:formula="of:=[.C287]/[.B287]" office:value-type="float" office:value="701.25786163522" calcext:value-type="float">
            <text:p>701.25786163522</text:p>
          </table:table-cell>
          <table:table-cell table:formula="of:=1/[.D287]" office:value-type="float" office:value="0.0222222222222222" calcext:value-type="float">
            <text:p>0.0222222222222222</text:p>
          </table:table-cell>
          <table:table-cell table:formula="of:=LOG10([.E287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5" calcext:value-type="float">
            <text:p>45</text:p>
          </table:table-cell>
          <table:table-cell table:formula="of:=[.C288]/[.B288]" office:value-type="float" office:value="1051.88679245283" calcext:value-type="float">
            <text:p>1051.88679245283</text:p>
          </table:table-cell>
          <table:table-cell table:formula="of:=1/[.D288]" office:value-type="float" office:value="0.0222222222222222" calcext:value-type="float">
            <text:p>0.0222222222222222</text:p>
          </table:table-cell>
          <table:table-cell table:formula="of:=LOG10([.E288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5" calcext:value-type="float">
            <text:p>45</text:p>
          </table:table-cell>
          <table:table-cell table:formula="of:=[.C289]/[.B289]" office:value-type="float" office:value="603.77358490566" calcext:value-type="float">
            <text:p>603.77358490566</text:p>
          </table:table-cell>
          <table:table-cell table:formula="of:=1/[.D289]" office:value-type="float" office:value="0.0222222222222222" calcext:value-type="float">
            <text:p>0.0222222222222222</text:p>
          </table:table-cell>
          <table:table-cell table:formula="of:=LOG10([.E28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5" calcext:value-type="float">
            <text:p>45</text:p>
          </table:table-cell>
          <table:table-cell table:formula="of:=[.C290]/[.B290]" office:value-type="float" office:value="603.77358490566" calcext:value-type="float">
            <text:p>603.77358490566</text:p>
          </table:table-cell>
          <table:table-cell table:formula="of:=1/[.D290]" office:value-type="float" office:value="0.0222222222222222" calcext:value-type="float">
            <text:p>0.0222222222222222</text:p>
          </table:table-cell>
          <table:table-cell table:formula="of:=LOG10([.E29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9" calcext:value-type="float">
            <text:p>44.9</text:p>
          </table:table-cell>
          <table:table-cell table:formula="of:=[.C291]/[.B291]" office:value-type="float" office:value="603.77358490566" calcext:value-type="float">
            <text:p>603.77358490566</text:p>
          </table:table-cell>
          <table:table-cell table:formula="of:=1/[.D291]" office:value-type="float" office:value="0.022271714922049" calcext:value-type="float">
            <text:p>0.022271714922049</text:p>
          </table:table-cell>
          <table:table-cell table:formula="of:=LOG10([.E29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4.9" calcext:value-type="float">
            <text:p>44.9</text:p>
          </table:table-cell>
          <table:table-cell table:formula="of:=[.C292]/[.B292]" office:value-type="float" office:value="528.301886792453" calcext:value-type="float">
            <text:p>528.301886792453</text:p>
          </table:table-cell>
          <table:table-cell table:formula="of:=1/[.D292]" office:value-type="float" office:value="0.022271714922049" calcext:value-type="float">
            <text:p>0.022271714922049</text:p>
          </table:table-cell>
          <table:table-cell table:formula="of:=LOG10([.E29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3" calcext:value-type="float">
            <text:p>2.23</text:p>
          </table:table-cell>
          <table:table-cell office:value-type="float" office:value="44.9" calcext:value-type="float">
            <text:p>44.9</text:p>
          </table:table-cell>
          <table:table-cell table:formula="of:=[.C293]/[.B293]" office:value-type="float" office:value="525.943396226415" calcext:value-type="float">
            <text:p>525.943396226415</text:p>
          </table:table-cell>
          <table:table-cell table:formula="of:=1/[.D293]" office:value-type="float" office:value="0.022271714922049" calcext:value-type="float">
            <text:p>0.022271714922049</text:p>
          </table:table-cell>
          <table:table-cell table:formula="of:=LOG10([.E293])" office:value-type="float" office:value="2.72093900645543" calcext:value-type="float">
            <text:p>2.720939006455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4.9" calcext:value-type="float">
            <text:p>44.9</text:p>
          </table:table-cell>
          <table:table-cell table:formula="of:=[.C294]/[.B294]" office:value-type="float" office:value="601.078167115903" calcext:value-type="float">
            <text:p>601.078167115903</text:p>
          </table:table-cell>
          <table:table-cell table:formula="of:=1/[.D294]" office:value-type="float" office:value="0.022271714922049" calcext:value-type="float">
            <text:p>0.022271714922049</text:p>
          </table:table-cell>
          <table:table-cell table:formula="of:=LOG10([.E294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4.8" calcext:value-type="float">
            <text:p>44.8</text:p>
          </table:table-cell>
          <table:table-cell table:formula="of:=[.C295]/[.B295]" office:value-type="float" office:value="601.078167115903" calcext:value-type="float">
            <text:p>601.078167115903</text:p>
          </table:table-cell>
          <table:table-cell table:formula="of:=1/[.D295]" office:value-type="float" office:value="0.0223214285714286" calcext:value-type="float">
            <text:p>0.0223214285714286</text:p>
          </table:table-cell>
          <table:table-cell table:formula="of:=LOG10([.E295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4.8" calcext:value-type="float">
            <text:p>44.8</text:p>
          </table:table-cell>
          <table:table-cell table:formula="of:=[.C296]/[.B296]" office:value-type="float" office:value="704.402515723271" calcext:value-type="float">
            <text:p>704.402515723271</text:p>
          </table:table-cell>
          <table:table-cell table:formula="of:=1/[.D296]" office:value-type="float" office:value="0.0223214285714286" calcext:value-type="float">
            <text:p>0.0223214285714286</text:p>
          </table:table-cell>
          <table:table-cell table:formula="of:=LOG10([.E29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4.8" calcext:value-type="float">
            <text:p>44.8</text:p>
          </table:table-cell>
          <table:table-cell table:formula="of:=[.C297]/[.B297]" office:value-type="float" office:value="704.402515723271" calcext:value-type="float">
            <text:p>704.402515723271</text:p>
          </table:table-cell>
          <table:table-cell table:formula="of:=1/[.D297]" office:value-type="float" office:value="0.0223214285714286" calcext:value-type="float">
            <text:p>0.0223214285714286</text:p>
          </table:table-cell>
          <table:table-cell table:formula="of:=LOG10([.E29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4.8" calcext:value-type="float">
            <text:p>44.8</text:p>
          </table:table-cell>
          <table:table-cell table:formula="of:=[.C298]/[.B298]" office:value-type="float" office:value="701.25786163522" calcext:value-type="float">
            <text:p>701.25786163522</text:p>
          </table:table-cell>
          <table:table-cell table:formula="of:=1/[.D298]" office:value-type="float" office:value="0.0223214285714286" calcext:value-type="float">
            <text:p>0.0223214285714286</text:p>
          </table:table-cell>
          <table:table-cell table:formula="of:=LOG10([.E298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4.8" calcext:value-type="float">
            <text:p>44.8</text:p>
          </table:table-cell>
          <table:table-cell table:formula="of:=[.C299]/[.B299]" office:value-type="float" office:value="469.601677148847" calcext:value-type="float">
            <text:p>469.601677148847</text:p>
          </table:table-cell>
          <table:table-cell table:formula="of:=1/[.D299]" office:value-type="float" office:value="0.0223214285714286" calcext:value-type="float">
            <text:p>0.0223214285714286</text:p>
          </table:table-cell>
          <table:table-cell table:formula="of:=LOG10([.E299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8" calcext:value-type="float">
            <text:p>44.8</text:p>
          </table:table-cell>
          <table:table-cell table:formula="of:=[.C300]/[.B300]" office:value-type="float" office:value="603.77358490566" calcext:value-type="float">
            <text:p>603.77358490566</text:p>
          </table:table-cell>
          <table:table-cell table:formula="of:=1/[.D300]" office:value-type="float" office:value="0.0223214285714286" calcext:value-type="float">
            <text:p>0.0223214285714286</text:p>
          </table:table-cell>
          <table:table-cell table:formula="of:=LOG10([.E30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7" calcext:value-type="float">
            <text:p>44.7</text:p>
          </table:table-cell>
          <table:table-cell table:formula="of:=[.C301]/[.B301]" office:value-type="float" office:value="603.77358490566" calcext:value-type="float">
            <text:p>603.77358490566</text:p>
          </table:table-cell>
          <table:table-cell table:formula="of:=1/[.D301]" office:value-type="float" office:value="0.0223713646532438" calcext:value-type="float">
            <text:p>0.0223713646532438</text:p>
          </table:table-cell>
          <table:table-cell table:formula="of:=LOG10([.E30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7" calcext:value-type="float">
            <text:p>44.7</text:p>
          </table:table-cell>
          <table:table-cell table:formula="of:=[.C302]/[.B302]" office:value-type="float" office:value="603.77358490566" calcext:value-type="float">
            <text:p>603.77358490566</text:p>
          </table:table-cell>
          <table:table-cell table:formula="of:=1/[.D302]" office:value-type="float" office:value="0.0223713646532438" calcext:value-type="float">
            <text:p>0.0223713646532438</text:p>
          </table:table-cell>
          <table:table-cell table:formula="of:=LOG10([.E30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7" calcext:value-type="float">
            <text:p>44.7</text:p>
          </table:table-cell>
          <table:table-cell table:formula="of:=[.C303]/[.B303]" office:value-type="float" office:value="603.77358490566" calcext:value-type="float">
            <text:p>603.77358490566</text:p>
          </table:table-cell>
          <table:table-cell table:formula="of:=1/[.D303]" office:value-type="float" office:value="0.0223713646532438" calcext:value-type="float">
            <text:p>0.0223713646532438</text:p>
          </table:table-cell>
          <table:table-cell table:formula="of:=LOG10([.E30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6" calcext:value-type="float">
            <text:p>44.6</text:p>
          </table:table-cell>
          <table:table-cell table:formula="of:=[.C304]/[.B304]" office:value-type="float" office:value="603.77358490566" calcext:value-type="float">
            <text:p>603.77358490566</text:p>
          </table:table-cell>
          <table:table-cell table:formula="of:=1/[.D304]" office:value-type="float" office:value="0.0224215246636771" calcext:value-type="float">
            <text:p>0.0224215246636771</text:p>
          </table:table-cell>
          <table:table-cell table:formula="of:=LOG10([.E30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4.6" calcext:value-type="float">
            <text:p>44.6</text:p>
          </table:table-cell>
          <table:table-cell table:formula="of:=[.C305]/[.B305]" office:value-type="float" office:value="528.301886792453" calcext:value-type="float">
            <text:p>528.301886792453</text:p>
          </table:table-cell>
          <table:table-cell table:formula="of:=1/[.D305]" office:value-type="float" office:value="0.0224215246636771" calcext:value-type="float">
            <text:p>0.0224215246636771</text:p>
          </table:table-cell>
          <table:table-cell table:formula="of:=LOG10([.E305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44.6" calcext:value-type="float">
            <text:p>44.6</text:p>
          </table:table-cell>
          <table:table-cell table:formula="of:=[.C306]/[.B306]" office:value-type="float" office:value="384.219554030875" calcext:value-type="float">
            <text:p>384.219554030875</text:p>
          </table:table-cell>
          <table:table-cell table:formula="of:=1/[.D306]" office:value-type="float" office:value="0.0224215246636771" calcext:value-type="float">
            <text:p>0.0224215246636771</text:p>
          </table:table-cell>
          <table:table-cell table:formula="of:=LOG10([.E306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4" calcext:value-type="float">
            <text:p>2.24</text:p>
          </table:table-cell>
          <table:table-cell office:value-type="float" office:value="44.6" calcext:value-type="float">
            <text:p>44.6</text:p>
          </table:table-cell>
          <table:table-cell table:formula="of:=[.C307]/[.B307]" office:value-type="float" office:value="352.201257861635" calcext:value-type="float">
            <text:p>352.201257861635</text:p>
          </table:table-cell>
          <table:table-cell table:formula="of:=1/[.D307]" office:value-type="float" office:value="0.0224215246636771" calcext:value-type="float">
            <text:p>0.0224215246636771</text:p>
          </table:table-cell>
          <table:table-cell table:formula="of:=LOG10([.E307])" office:value-type="float" office:value="2.54679090268575" calcext:value-type="float">
            <text:p>2.5467909026857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4.6" calcext:value-type="float">
            <text:p>44.6</text:p>
          </table:table-cell>
          <table:table-cell table:formula="of:=[.C308]/[.B308]" office:value-type="float" office:value="528.301886792453" calcext:value-type="float">
            <text:p>528.301886792453</text:p>
          </table:table-cell>
          <table:table-cell table:formula="of:=1/[.D308]" office:value-type="float" office:value="0.0224215246636771" calcext:value-type="float">
            <text:p>0.0224215246636771</text:p>
          </table:table-cell>
          <table:table-cell table:formula="of:=LOG10([.E30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4.6" calcext:value-type="float">
            <text:p>44.6</text:p>
          </table:table-cell>
          <table:table-cell table:formula="of:=[.C309]/[.B309]" office:value-type="float" office:value="841.509433962264" calcext:value-type="float">
            <text:p>841.509433962264</text:p>
          </table:table-cell>
          <table:table-cell table:formula="of:=1/[.D309]" office:value-type="float" office:value="0.0224215246636771" calcext:value-type="float">
            <text:p>0.0224215246636771</text:p>
          </table:table-cell>
          <table:table-cell table:formula="of:=LOG10([.E309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4.5" calcext:value-type="float">
            <text:p>44.5</text:p>
          </table:table-cell>
          <table:table-cell table:formula="of:=[.C310]/[.B310]" office:value-type="float" office:value="469.601677148847" calcext:value-type="float">
            <text:p>469.601677148847</text:p>
          </table:table-cell>
          <table:table-cell table:formula="of:=1/[.D310]" office:value-type="float" office:value="0.0224719101123596" calcext:value-type="float">
            <text:p>0.0224719101123596</text:p>
          </table:table-cell>
          <table:table-cell table:formula="of:=LOG10([.E310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5" calcext:value-type="float">
            <text:p>44.5</text:p>
          </table:table-cell>
          <table:table-cell table:formula="of:=[.C311]/[.B311]" office:value-type="float" office:value="603.77358490566" calcext:value-type="float">
            <text:p>603.77358490566</text:p>
          </table:table-cell>
          <table:table-cell table:formula="of:=1/[.D311]" office:value-type="float" office:value="0.0224719101123596" calcext:value-type="float">
            <text:p>0.0224719101123596</text:p>
          </table:table-cell>
          <table:table-cell table:formula="of:=LOG10([.E31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4.5" calcext:value-type="float">
            <text:p>44.5</text:p>
          </table:table-cell>
          <table:table-cell table:formula="of:=[.C312]/[.B312]" office:value-type="float" office:value="701.25786163522" calcext:value-type="float">
            <text:p>701.25786163522</text:p>
          </table:table-cell>
          <table:table-cell table:formula="of:=1/[.D312]" office:value-type="float" office:value="0.0224719101123596" calcext:value-type="float">
            <text:p>0.0224719101123596</text:p>
          </table:table-cell>
          <table:table-cell table:formula="of:=LOG10([.E312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4.5" calcext:value-type="float">
            <text:p>44.5</text:p>
          </table:table-cell>
          <table:table-cell table:formula="of:=[.C313]/[.B313]" office:value-type="float" office:value="1056.60377358491" calcext:value-type="float">
            <text:p>1056.60377358491</text:p>
          </table:table-cell>
          <table:table-cell table:formula="of:=1/[.D313]" office:value-type="float" office:value="0.0224719101123596" calcext:value-type="float">
            <text:p>0.0224719101123596</text:p>
          </table:table-cell>
          <table:table-cell table:formula="of:=LOG10([.E31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4.5" calcext:value-type="float">
            <text:p>44.5</text:p>
          </table:table-cell>
          <table:table-cell table:formula="of:=[.C314]/[.B314]" office:value-type="float" office:value="841.509433962264" calcext:value-type="float">
            <text:p>841.509433962264</text:p>
          </table:table-cell>
          <table:table-cell table:formula="of:=1/[.D314]" office:value-type="float" office:value="0.0224719101123596" calcext:value-type="float">
            <text:p>0.0224719101123596</text:p>
          </table:table-cell>
          <table:table-cell table:formula="of:=LOG10([.E31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4.4" calcext:value-type="float">
            <text:p>44.4</text:p>
          </table:table-cell>
          <table:table-cell table:formula="of:=[.C315]/[.B315]" office:value-type="float" office:value="1051.88679245283" calcext:value-type="float">
            <text:p>1051.88679245283</text:p>
          </table:table-cell>
          <table:table-cell table:formula="of:=1/[.D315]" office:value-type="float" office:value="0.0225225225225225" calcext:value-type="float">
            <text:p>0.0225225225225225</text:p>
          </table:table-cell>
          <table:table-cell table:formula="of:=LOG10([.E315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4.4" calcext:value-type="float">
            <text:p>44.4</text:p>
          </table:table-cell>
          <table:table-cell table:formula="of:=[.C316]/[.B316]" office:value-type="float" office:value="1408.80503144654" calcext:value-type="float">
            <text:p>1408.80503144654</text:p>
          </table:table-cell>
          <table:table-cell table:formula="of:=1/[.D316]" office:value-type="float" office:value="0.0225225225225225" calcext:value-type="float">
            <text:p>0.0225225225225225</text:p>
          </table:table-cell>
          <table:table-cell table:formula="of:=LOG10([.E31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4.4" calcext:value-type="float">
            <text:p>44.4</text:p>
          </table:table-cell>
          <table:table-cell table:formula="of:=[.C317]/[.B317]" office:value-type="float" office:value="1056.60377358491" calcext:value-type="float">
            <text:p>1056.60377358491</text:p>
          </table:table-cell>
          <table:table-cell table:formula="of:=1/[.D317]" office:value-type="float" office:value="0.0225225225225225" calcext:value-type="float">
            <text:p>0.0225225225225225</text:p>
          </table:table-cell>
          <table:table-cell table:formula="of:=LOG10([.E31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4.4" calcext:value-type="float">
            <text:p>44.4</text:p>
          </table:table-cell>
          <table:table-cell table:formula="of:=[.C318]/[.B318]" office:value-type="float" office:value="704.402515723271" calcext:value-type="float">
            <text:p>704.402515723271</text:p>
          </table:table-cell>
          <table:table-cell table:formula="of:=1/[.D318]" office:value-type="float" office:value="0.0225225225225225" calcext:value-type="float">
            <text:p>0.0225225225225225</text:p>
          </table:table-cell>
          <table:table-cell table:formula="of:=LOG10([.E31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3" calcext:value-type="float">
            <text:p>44.3</text:p>
          </table:table-cell>
          <table:table-cell table:formula="of:=[.C319]/[.B319]" office:value-type="float" office:value="603.77358490566" calcext:value-type="float">
            <text:p>603.77358490566</text:p>
          </table:table-cell>
          <table:table-cell table:formula="of:=1/[.D319]" office:value-type="float" office:value="0.0225733634311512" calcext:value-type="float">
            <text:p>0.0225733634311512</text:p>
          </table:table-cell>
          <table:table-cell table:formula="of:=LOG10([.E31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3" calcext:value-type="float">
            <text:p>44.3</text:p>
          </table:table-cell>
          <table:table-cell table:formula="of:=[.C320]/[.B320]" office:value-type="float" office:value="603.77358490566" calcext:value-type="float">
            <text:p>603.77358490566</text:p>
          </table:table-cell>
          <table:table-cell table:formula="of:=1/[.D320]" office:value-type="float" office:value="0.0225733634311512" calcext:value-type="float">
            <text:p>0.0225733634311512</text:p>
          </table:table-cell>
          <table:table-cell table:formula="of:=LOG10([.E32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3" calcext:value-type="float">
            <text:p>44.3</text:p>
          </table:table-cell>
          <table:table-cell table:formula="of:=[.C321]/[.B321]" office:value-type="float" office:value="603.77358490566" calcext:value-type="float">
            <text:p>603.77358490566</text:p>
          </table:table-cell>
          <table:table-cell table:formula="of:=1/[.D321]" office:value-type="float" office:value="0.0225733634311512" calcext:value-type="float">
            <text:p>0.0225733634311512</text:p>
          </table:table-cell>
          <table:table-cell table:formula="of:=LOG10([.E32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4.3" calcext:value-type="float">
            <text:p>44.3</text:p>
          </table:table-cell>
          <table:table-cell table:formula="of:=[.C322]/[.B322]" office:value-type="float" office:value="704.402515723271" calcext:value-type="float">
            <text:p>704.402515723271</text:p>
          </table:table-cell>
          <table:table-cell table:formula="of:=1/[.D322]" office:value-type="float" office:value="0.0225733634311512" calcext:value-type="float">
            <text:p>0.0225733634311512</text:p>
          </table:table-cell>
          <table:table-cell table:formula="of:=LOG10([.E32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3" calcext:value-type="float">
            <text:p>44.3</text:p>
          </table:table-cell>
          <table:table-cell table:formula="of:=[.C323]/[.B323]" office:value-type="float" office:value="603.77358490566" calcext:value-type="float">
            <text:p>603.77358490566</text:p>
          </table:table-cell>
          <table:table-cell table:formula="of:=1/[.D323]" office:value-type="float" office:value="0.0225733634311512" calcext:value-type="float">
            <text:p>0.0225733634311512</text:p>
          </table:table-cell>
          <table:table-cell table:formula="of:=LOG10([.E32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4.3" calcext:value-type="float">
            <text:p>44.3</text:p>
          </table:table-cell>
          <table:table-cell table:formula="of:=[.C324]/[.B324]" office:value-type="float" office:value="845.283018867925" calcext:value-type="float">
            <text:p>845.283018867925</text:p>
          </table:table-cell>
          <table:table-cell table:formula="of:=1/[.D324]" office:value-type="float" office:value="0.0225733634311512" calcext:value-type="float">
            <text:p>0.0225733634311512</text:p>
          </table:table-cell>
          <table:table-cell table:formula="of:=LOG10([.E32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2" calcext:value-type="float">
            <text:p>44.2</text:p>
          </table:table-cell>
          <table:table-cell table:formula="of:=[.C325]/[.B325]" office:value-type="float" office:value="603.77358490566" calcext:value-type="float">
            <text:p>603.77358490566</text:p>
          </table:table-cell>
          <table:table-cell table:formula="of:=1/[.D325]" office:value-type="float" office:value="0.0226244343891403" calcext:value-type="float">
            <text:p>0.0226244343891403</text:p>
          </table:table-cell>
          <table:table-cell table:formula="of:=LOG10([.E32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2" calcext:value-type="float">
            <text:p>44.2</text:p>
          </table:table-cell>
          <table:table-cell table:formula="of:=[.C326]/[.B326]" office:value-type="float" office:value="603.77358490566" calcext:value-type="float">
            <text:p>603.77358490566</text:p>
          </table:table-cell>
          <table:table-cell table:formula="of:=1/[.D326]" office:value-type="float" office:value="0.0226244343891403" calcext:value-type="float">
            <text:p>0.0226244343891403</text:p>
          </table:table-cell>
          <table:table-cell table:formula="of:=LOG10([.E32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4.2" calcext:value-type="float">
            <text:p>44.2</text:p>
          </table:table-cell>
          <table:table-cell table:formula="of:=[.C327]/[.B327]" office:value-type="float" office:value="701.25786163522" calcext:value-type="float">
            <text:p>701.25786163522</text:p>
          </table:table-cell>
          <table:table-cell table:formula="of:=1/[.D327]" office:value-type="float" office:value="0.0226244343891403" calcext:value-type="float">
            <text:p>0.0226244343891403</text:p>
          </table:table-cell>
          <table:table-cell table:formula="of:=LOG10([.E327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2" calcext:value-type="float">
            <text:p>44.2</text:p>
          </table:table-cell>
          <table:table-cell table:formula="of:=[.C328]/[.B328]" office:value-type="float" office:value="603.77358490566" calcext:value-type="float">
            <text:p>603.77358490566</text:p>
          </table:table-cell>
          <table:table-cell table:formula="of:=1/[.D328]" office:value-type="float" office:value="0.0226244343891403" calcext:value-type="float">
            <text:p>0.0226244343891403</text:p>
          </table:table-cell>
          <table:table-cell table:formula="of:=LOG10([.E32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2" calcext:value-type="float">
            <text:p>44.2</text:p>
          </table:table-cell>
          <table:table-cell table:formula="of:=[.C329]/[.B329]" office:value-type="float" office:value="603.77358490566" calcext:value-type="float">
            <text:p>603.77358490566</text:p>
          </table:table-cell>
          <table:table-cell table:formula="of:=1/[.D329]" office:value-type="float" office:value="0.0226244343891403" calcext:value-type="float">
            <text:p>0.0226244343891403</text:p>
          </table:table-cell>
          <table:table-cell table:formula="of:=LOG10([.E32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4.1" calcext:value-type="float">
            <text:p>44.1</text:p>
          </table:table-cell>
          <table:table-cell table:formula="of:=[.C330]/[.B330]" office:value-type="float" office:value="701.25786163522" calcext:value-type="float">
            <text:p>701.25786163522</text:p>
          </table:table-cell>
          <table:table-cell table:formula="of:=1/[.D330]" office:value-type="float" office:value="0.0226757369614512" calcext:value-type="float">
            <text:p>0.0226757369614512</text:p>
          </table:table-cell>
          <table:table-cell table:formula="of:=LOG10([.E330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1" calcext:value-type="float">
            <text:p>44.1</text:p>
          </table:table-cell>
          <table:table-cell table:formula="of:=[.C331]/[.B331]" office:value-type="float" office:value="603.77358490566" calcext:value-type="float">
            <text:p>603.77358490566</text:p>
          </table:table-cell>
          <table:table-cell table:formula="of:=1/[.D331]" office:value-type="float" office:value="0.0226757369614512" calcext:value-type="float">
            <text:p>0.0226757369614512</text:p>
          </table:table-cell>
          <table:table-cell table:formula="of:=LOG10([.E33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1" calcext:value-type="float">
            <text:p>44.1</text:p>
          </table:table-cell>
          <table:table-cell table:formula="of:=[.C332]/[.B332]" office:value-type="float" office:value="603.77358490566" calcext:value-type="float">
            <text:p>603.77358490566</text:p>
          </table:table-cell>
          <table:table-cell table:formula="of:=1/[.D332]" office:value-type="float" office:value="0.0226757369614512" calcext:value-type="float">
            <text:p>0.0226757369614512</text:p>
          </table:table-cell>
          <table:table-cell table:formula="of:=LOG10([.E33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4.1" calcext:value-type="float">
            <text:p>44.1</text:p>
          </table:table-cell>
          <table:table-cell table:formula="of:=[.C333]/[.B333]" office:value-type="float" office:value="704.402515723271" calcext:value-type="float">
            <text:p>704.402515723271</text:p>
          </table:table-cell>
          <table:table-cell table:formula="of:=1/[.D333]" office:value-type="float" office:value="0.0226757369614512" calcext:value-type="float">
            <text:p>0.0226757369614512</text:p>
          </table:table-cell>
          <table:table-cell table:formula="of:=LOG10([.E33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1" calcext:value-type="float">
            <text:p>44.1</text:p>
          </table:table-cell>
          <table:table-cell table:formula="of:=[.C334]/[.B334]" office:value-type="float" office:value="603.77358490566" calcext:value-type="float">
            <text:p>603.77358490566</text:p>
          </table:table-cell>
          <table:table-cell table:formula="of:=1/[.D334]" office:value-type="float" office:value="0.0226757369614512" calcext:value-type="float">
            <text:p>0.0226757369614512</text:p>
          </table:table-cell>
          <table:table-cell table:formula="of:=LOG10([.E33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4.1" calcext:value-type="float">
            <text:p>44.1</text:p>
          </table:table-cell>
          <table:table-cell table:formula="of:=[.C335]/[.B335]" office:value-type="float" office:value="704.402515723271" calcext:value-type="float">
            <text:p>704.402515723271</text:p>
          </table:table-cell>
          <table:table-cell table:formula="of:=1/[.D335]" office:value-type="float" office:value="0.0226757369614512" calcext:value-type="float">
            <text:p>0.0226757369614512</text:p>
          </table:table-cell>
          <table:table-cell table:formula="of:=LOG10([.E33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.1" calcext:value-type="float">
            <text:p>44.1</text:p>
          </table:table-cell>
          <table:table-cell table:formula="of:=[.C336]/[.B336]" office:value-type="float" office:value="603.77358490566" calcext:value-type="float">
            <text:p>603.77358490566</text:p>
          </table:table-cell>
          <table:table-cell table:formula="of:=1/[.D336]" office:value-type="float" office:value="0.0226757369614512" calcext:value-type="float">
            <text:p>0.0226757369614512</text:p>
          </table:table-cell>
          <table:table-cell table:formula="of:=LOG10([.E33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4" calcext:value-type="float">
            <text:p>44</text:p>
          </table:table-cell>
          <table:table-cell table:formula="of:=[.C337]/[.B337]" office:value-type="float" office:value="528.301886792453" calcext:value-type="float">
            <text:p>528.301886792453</text:p>
          </table:table-cell>
          <table:table-cell table:formula="of:=1/[.D337]" office:value-type="float" office:value="0.0227272727272727" calcext:value-type="float">
            <text:p>0.0227272727272727</text:p>
          </table:table-cell>
          <table:table-cell table:formula="of:=LOG10([.E33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4" calcext:value-type="float">
            <text:p>44</text:p>
          </table:table-cell>
          <table:table-cell table:formula="of:=[.C338]/[.B338]" office:value-type="float" office:value="603.77358490566" calcext:value-type="float">
            <text:p>603.77358490566</text:p>
          </table:table-cell>
          <table:table-cell table:formula="of:=1/[.D338]" office:value-type="float" office:value="0.0227272727272727" calcext:value-type="float">
            <text:p>0.0227272727272727</text:p>
          </table:table-cell>
          <table:table-cell table:formula="of:=LOG10([.E33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4" calcext:value-type="float">
            <text:p>44</text:p>
          </table:table-cell>
          <table:table-cell table:formula="of:=[.C339]/[.B339]" office:value-type="float" office:value="701.25786163522" calcext:value-type="float">
            <text:p>701.25786163522</text:p>
          </table:table-cell>
          <table:table-cell table:formula="of:=1/[.D339]" office:value-type="float" office:value="0.0227272727272727" calcext:value-type="float">
            <text:p>0.0227272727272727</text:p>
          </table:table-cell>
          <table:table-cell table:formula="of:=LOG10([.E339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9" calcext:value-type="float">
            <text:p>43.9</text:p>
          </table:table-cell>
          <table:table-cell table:formula="of:=[.C340]/[.B340]" office:value-type="float" office:value="603.77358490566" calcext:value-type="float">
            <text:p>603.77358490566</text:p>
          </table:table-cell>
          <table:table-cell table:formula="of:=1/[.D340]" office:value-type="float" office:value="0.0227790432801822" calcext:value-type="float">
            <text:p>0.0227790432801822</text:p>
          </table:table-cell>
          <table:table-cell table:formula="of:=LOG10([.E34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9" calcext:value-type="float">
            <text:p>43.9</text:p>
          </table:table-cell>
          <table:table-cell table:formula="of:=[.C341]/[.B341]" office:value-type="float" office:value="603.77358490566" calcext:value-type="float">
            <text:p>603.77358490566</text:p>
          </table:table-cell>
          <table:table-cell table:formula="of:=1/[.D341]" office:value-type="float" office:value="0.0227790432801822" calcext:value-type="float">
            <text:p>0.0227790432801822</text:p>
          </table:table-cell>
          <table:table-cell table:formula="of:=LOG10([.E34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3.9" calcext:value-type="float">
            <text:p>43.9</text:p>
          </table:table-cell>
          <table:table-cell table:formula="of:=[.C342]/[.B342]" office:value-type="float" office:value="841.509433962264" calcext:value-type="float">
            <text:p>841.509433962264</text:p>
          </table:table-cell>
          <table:table-cell table:formula="of:=1/[.D342]" office:value-type="float" office:value="0.0227790432801822" calcext:value-type="float">
            <text:p>0.0227790432801822</text:p>
          </table:table-cell>
          <table:table-cell table:formula="of:=LOG10([.E342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9" calcext:value-type="float">
            <text:p>43.9</text:p>
          </table:table-cell>
          <table:table-cell table:formula="of:=[.C343]/[.B343]" office:value-type="float" office:value="603.77358490566" calcext:value-type="float">
            <text:p>603.77358490566</text:p>
          </table:table-cell>
          <table:table-cell table:formula="of:=1/[.D343]" office:value-type="float" office:value="0.0227790432801822" calcext:value-type="float">
            <text:p>0.0227790432801822</text:p>
          </table:table-cell>
          <table:table-cell table:formula="of:=LOG10([.E34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9" calcext:value-type="float">
            <text:p>43.9</text:p>
          </table:table-cell>
          <table:table-cell table:formula="of:=[.C344]/[.B344]" office:value-type="float" office:value="603.77358490566" calcext:value-type="float">
            <text:p>603.77358490566</text:p>
          </table:table-cell>
          <table:table-cell table:formula="of:=1/[.D344]" office:value-type="float" office:value="0.0227790432801822" calcext:value-type="float">
            <text:p>0.0227790432801822</text:p>
          </table:table-cell>
          <table:table-cell table:formula="of:=LOG10([.E34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9" calcext:value-type="float">
            <text:p>43.9</text:p>
          </table:table-cell>
          <table:table-cell table:formula="of:=[.C345]/[.B345]" office:value-type="float" office:value="704.402515723271" calcext:value-type="float">
            <text:p>704.402515723271</text:p>
          </table:table-cell>
          <table:table-cell table:formula="of:=1/[.D345]" office:value-type="float" office:value="0.0227790432801822" calcext:value-type="float">
            <text:p>0.0227790432801822</text:p>
          </table:table-cell>
          <table:table-cell table:formula="of:=LOG10([.E34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9" calcext:value-type="float">
            <text:p>43.9</text:p>
          </table:table-cell>
          <table:table-cell table:formula="of:=[.C346]/[.B346]" office:value-type="float" office:value="704.402515723271" calcext:value-type="float">
            <text:p>704.402515723271</text:p>
          </table:table-cell>
          <table:table-cell table:formula="of:=1/[.D346]" office:value-type="float" office:value="0.0227790432801822" calcext:value-type="float">
            <text:p>0.0227790432801822</text:p>
          </table:table-cell>
          <table:table-cell table:formula="of:=LOG10([.E34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3.8" calcext:value-type="float">
            <text:p>43.8</text:p>
          </table:table-cell>
          <table:table-cell table:formula="of:=[.C347]/[.B347]" office:value-type="float" office:value="701.25786163522" calcext:value-type="float">
            <text:p>701.25786163522</text:p>
          </table:table-cell>
          <table:table-cell table:formula="of:=1/[.D347]" office:value-type="float" office:value="0.0228310502283105" calcext:value-type="float">
            <text:p>0.0228310502283105</text:p>
          </table:table-cell>
          <table:table-cell table:formula="of:=LOG10([.E347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3.8" calcext:value-type="float">
            <text:p>43.8</text:p>
          </table:table-cell>
          <table:table-cell table:formula="of:=[.C348]/[.B348]" office:value-type="float" office:value="845.283018867925" calcext:value-type="float">
            <text:p>845.283018867925</text:p>
          </table:table-cell>
          <table:table-cell table:formula="of:=1/[.D348]" office:value-type="float" office:value="0.0228310502283105" calcext:value-type="float">
            <text:p>0.0228310502283105</text:p>
          </table:table-cell>
          <table:table-cell table:formula="of:=LOG10([.E34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8" calcext:value-type="float">
            <text:p>43.8</text:p>
          </table:table-cell>
          <table:table-cell table:formula="of:=[.C349]/[.B349]" office:value-type="float" office:value="603.77358490566" calcext:value-type="float">
            <text:p>603.77358490566</text:p>
          </table:table-cell>
          <table:table-cell table:formula="of:=1/[.D349]" office:value-type="float" office:value="0.0228310502283105" calcext:value-type="float">
            <text:p>0.0228310502283105</text:p>
          </table:table-cell>
          <table:table-cell table:formula="of:=LOG10([.E34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3.8" calcext:value-type="float">
            <text:p>43.8</text:p>
          </table:table-cell>
          <table:table-cell table:formula="of:=[.C350]/[.B350]" office:value-type="float" office:value="845.283018867925" calcext:value-type="float">
            <text:p>845.283018867925</text:p>
          </table:table-cell>
          <table:table-cell table:formula="of:=1/[.D350]" office:value-type="float" office:value="0.0228310502283105" calcext:value-type="float">
            <text:p>0.0228310502283105</text:p>
          </table:table-cell>
          <table:table-cell table:formula="of:=LOG10([.E35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8" calcext:value-type="float">
            <text:p>43.8</text:p>
          </table:table-cell>
          <table:table-cell table:formula="of:=[.C351]/[.B351]" office:value-type="float" office:value="704.402515723271" calcext:value-type="float">
            <text:p>704.402515723271</text:p>
          </table:table-cell>
          <table:table-cell table:formula="of:=1/[.D351]" office:value-type="float" office:value="0.0228310502283105" calcext:value-type="float">
            <text:p>0.0228310502283105</text:p>
          </table:table-cell>
          <table:table-cell table:formula="of:=LOG10([.E35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8" calcext:value-type="float">
            <text:p>43.8</text:p>
          </table:table-cell>
          <table:table-cell table:formula="of:=[.C352]/[.B352]" office:value-type="float" office:value="704.402515723271" calcext:value-type="float">
            <text:p>704.402515723271</text:p>
          </table:table-cell>
          <table:table-cell table:formula="of:=1/[.D352]" office:value-type="float" office:value="0.0228310502283105" calcext:value-type="float">
            <text:p>0.0228310502283105</text:p>
          </table:table-cell>
          <table:table-cell table:formula="of:=LOG10([.E35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7" calcext:value-type="float">
            <text:p>43.7</text:p>
          </table:table-cell>
          <table:table-cell table:formula="of:=[.C353]/[.B353]" office:value-type="float" office:value="704.402515723271" calcext:value-type="float">
            <text:p>704.402515723271</text:p>
          </table:table-cell>
          <table:table-cell table:formula="of:=1/[.D353]" office:value-type="float" office:value="0.022883295194508" calcext:value-type="float">
            <text:p>0.022883295194508</text:p>
          </table:table-cell>
          <table:table-cell table:formula="of:=LOG10([.E35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7" calcext:value-type="float">
            <text:p>43.7</text:p>
          </table:table-cell>
          <table:table-cell table:formula="of:=[.C354]/[.B354]" office:value-type="float" office:value="603.77358490566" calcext:value-type="float">
            <text:p>603.77358490566</text:p>
          </table:table-cell>
          <table:table-cell table:formula="of:=1/[.D354]" office:value-type="float" office:value="0.022883295194508" calcext:value-type="float">
            <text:p>0.022883295194508</text:p>
          </table:table-cell>
          <table:table-cell table:formula="of:=LOG10([.E35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7" calcext:value-type="float">
            <text:p>43.7</text:p>
          </table:table-cell>
          <table:table-cell table:formula="of:=[.C355]/[.B355]" office:value-type="float" office:value="603.77358490566" calcext:value-type="float">
            <text:p>603.77358490566</text:p>
          </table:table-cell>
          <table:table-cell table:formula="of:=1/[.D355]" office:value-type="float" office:value="0.022883295194508" calcext:value-type="float">
            <text:p>0.022883295194508</text:p>
          </table:table-cell>
          <table:table-cell table:formula="of:=LOG10([.E35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3.7" calcext:value-type="float">
            <text:p>43.7</text:p>
          </table:table-cell>
          <table:table-cell table:formula="of:=[.C356]/[.B356]" office:value-type="float" office:value="601.078167115903" calcext:value-type="float">
            <text:p>601.078167115903</text:p>
          </table:table-cell>
          <table:table-cell table:formula="of:=1/[.D356]" office:value-type="float" office:value="0.022883295194508" calcext:value-type="float">
            <text:p>0.022883295194508</text:p>
          </table:table-cell>
          <table:table-cell table:formula="of:=LOG10([.E356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3.7" calcext:value-type="float">
            <text:p>43.7</text:p>
          </table:table-cell>
          <table:table-cell table:formula="of:=[.C357]/[.B357]" office:value-type="float" office:value="841.509433962264" calcext:value-type="float">
            <text:p>841.509433962264</text:p>
          </table:table-cell>
          <table:table-cell table:formula="of:=1/[.D357]" office:value-type="float" office:value="0.022883295194508" calcext:value-type="float">
            <text:p>0.022883295194508</text:p>
          </table:table-cell>
          <table:table-cell table:formula="of:=LOG10([.E357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7" calcext:value-type="float">
            <text:p>43.7</text:p>
          </table:table-cell>
          <table:table-cell table:formula="of:=[.C358]/[.B358]" office:value-type="float" office:value="704.402515723271" calcext:value-type="float">
            <text:p>704.402515723271</text:p>
          </table:table-cell>
          <table:table-cell table:formula="of:=1/[.D358]" office:value-type="float" office:value="0.022883295194508" calcext:value-type="float">
            <text:p>0.022883295194508</text:p>
          </table:table-cell>
          <table:table-cell table:formula="of:=LOG10([.E35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3.6" calcext:value-type="float">
            <text:p>43.6</text:p>
          </table:table-cell>
          <table:table-cell table:formula="of:=[.C359]/[.B359]" office:value-type="float" office:value="845.283018867925" calcext:value-type="float">
            <text:p>845.283018867925</text:p>
          </table:table-cell>
          <table:table-cell table:formula="of:=1/[.D359]" office:value-type="float" office:value="0.0229357798165138" calcext:value-type="float">
            <text:p>0.0229357798165138</text:p>
          </table:table-cell>
          <table:table-cell table:formula="of:=LOG10([.E35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6" calcext:value-type="float">
            <text:p>43.6</text:p>
          </table:table-cell>
          <table:table-cell table:formula="of:=[.C360]/[.B360]" office:value-type="float" office:value="704.402515723271" calcext:value-type="float">
            <text:p>704.402515723271</text:p>
          </table:table-cell>
          <table:table-cell table:formula="of:=1/[.D360]" office:value-type="float" office:value="0.0229357798165138" calcext:value-type="float">
            <text:p>0.0229357798165138</text:p>
          </table:table-cell>
          <table:table-cell table:formula="of:=LOG10([.E36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3.6" calcext:value-type="float">
            <text:p>43.6</text:p>
          </table:table-cell>
          <table:table-cell table:formula="of:=[.C361]/[.B361]" office:value-type="float" office:value="467.505241090147" calcext:value-type="float">
            <text:p>467.505241090147</text:p>
          </table:table-cell>
          <table:table-cell table:formula="of:=1/[.D361]" office:value-type="float" office:value="0.0229357798165138" calcext:value-type="float">
            <text:p>0.0229357798165138</text:p>
          </table:table-cell>
          <table:table-cell table:formula="of:=LOG10([.E361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6" calcext:value-type="float">
            <text:p>43.6</text:p>
          </table:table-cell>
          <table:table-cell table:formula="of:=[.C362]/[.B362]" office:value-type="float" office:value="704.402515723271" calcext:value-type="float">
            <text:p>704.402515723271</text:p>
          </table:table-cell>
          <table:table-cell table:formula="of:=1/[.D362]" office:value-type="float" office:value="0.0229357798165138" calcext:value-type="float">
            <text:p>0.0229357798165138</text:p>
          </table:table-cell>
          <table:table-cell table:formula="of:=LOG10([.E36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43.6" calcext:value-type="float">
            <text:p>43.6</text:p>
          </table:table-cell>
          <table:table-cell table:formula="of:=[.C363]/[.B363]" office:value-type="float" office:value="2113.20754716981" calcext:value-type="float">
            <text:p>2113.20754716981</text:p>
          </table:table-cell>
          <table:table-cell table:formula="of:=1/[.D363]" office:value-type="float" office:value="0.0229357798165138" calcext:value-type="float">
            <text:p>0.0229357798165138</text:p>
          </table:table-cell>
          <table:table-cell table:formula="of:=LOG10([.E363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6" calcext:value-type="float">
            <text:p>43.6</text:p>
          </table:table-cell>
          <table:table-cell table:formula="of:=[.C364]/[.B364]" office:value-type="float" office:value="603.77358490566" calcext:value-type="float">
            <text:p>603.77358490566</text:p>
          </table:table-cell>
          <table:table-cell table:formula="of:=1/[.D364]" office:value-type="float" office:value="0.0229357798165138" calcext:value-type="float">
            <text:p>0.0229357798165138</text:p>
          </table:table-cell>
          <table:table-cell table:formula="of:=LOG10([.E36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3.6" calcext:value-type="float">
            <text:p>43.6</text:p>
          </table:table-cell>
          <table:table-cell table:formula="of:=[.C365]/[.B365]" office:value-type="float" office:value="841.509433962264" calcext:value-type="float">
            <text:p>841.509433962264</text:p>
          </table:table-cell>
          <table:table-cell table:formula="of:=1/[.D365]" office:value-type="float" office:value="0.0229357798165138" calcext:value-type="float">
            <text:p>0.0229357798165138</text:p>
          </table:table-cell>
          <table:table-cell table:formula="of:=LOG10([.E365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66]/[.B366]" office:value-type="float" office:value="704.402515723271" calcext:value-type="float">
            <text:p>704.402515723271</text:p>
          </table:table-cell>
          <table:table-cell table:formula="of:=1/[.D366]" office:value-type="float" office:value="0.0229885057471264" calcext:value-type="float">
            <text:p>0.0229885057471264</text:p>
          </table:table-cell>
          <table:table-cell table:formula="of:=LOG10([.E36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67]/[.B367]" office:value-type="float" office:value="603.77358490566" calcext:value-type="float">
            <text:p>603.77358490566</text:p>
          </table:table-cell>
          <table:table-cell table:formula="of:=1/[.D367]" office:value-type="float" office:value="0.0229885057471264" calcext:value-type="float">
            <text:p>0.0229885057471264</text:p>
          </table:table-cell>
          <table:table-cell table:formula="of:=LOG10([.E36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68]/[.B368]" office:value-type="float" office:value="603.77358490566" calcext:value-type="float">
            <text:p>603.77358490566</text:p>
          </table:table-cell>
          <table:table-cell table:formula="of:=1/[.D368]" office:value-type="float" office:value="0.0229885057471264" calcext:value-type="float">
            <text:p>0.0229885057471264</text:p>
          </table:table-cell>
          <table:table-cell table:formula="of:=LOG10([.E36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69]/[.B369]" office:value-type="float" office:value="704.402515723271" calcext:value-type="float">
            <text:p>704.402515723271</text:p>
          </table:table-cell>
          <table:table-cell table:formula="of:=1/[.D369]" office:value-type="float" office:value="0.0229885057471264" calcext:value-type="float">
            <text:p>0.0229885057471264</text:p>
          </table:table-cell>
          <table:table-cell table:formula="of:=LOG10([.E36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70]/[.B370]" office:value-type="float" office:value="704.402515723271" calcext:value-type="float">
            <text:p>704.402515723271</text:p>
          </table:table-cell>
          <table:table-cell table:formula="of:=1/[.D370]" office:value-type="float" office:value="0.0229885057471264" calcext:value-type="float">
            <text:p>0.0229885057471264</text:p>
          </table:table-cell>
          <table:table-cell table:formula="of:=LOG10([.E37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71]/[.B371]" office:value-type="float" office:value="704.402515723271" calcext:value-type="float">
            <text:p>704.402515723271</text:p>
          </table:table-cell>
          <table:table-cell table:formula="of:=1/[.D371]" office:value-type="float" office:value="0.0229885057471264" calcext:value-type="float">
            <text:p>0.0229885057471264</text:p>
          </table:table-cell>
          <table:table-cell table:formula="of:=LOG10([.E37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3.5" calcext:value-type="float">
            <text:p>43.5</text:p>
          </table:table-cell>
          <table:table-cell table:formula="of:=[.C372]/[.B372]" office:value-type="float" office:value="528.301886792453" calcext:value-type="float">
            <text:p>528.301886792453</text:p>
          </table:table-cell>
          <table:table-cell table:formula="of:=1/[.D372]" office:value-type="float" office:value="0.0229885057471264" calcext:value-type="float">
            <text:p>0.0229885057471264</text:p>
          </table:table-cell>
          <table:table-cell table:formula="of:=LOG10([.E37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3" calcext:value-type="float">
            <text:p>2.23</text:p>
          </table:table-cell>
          <table:table-cell office:value-type="float" office:value="43.4" calcext:value-type="float">
            <text:p>43.4</text:p>
          </table:table-cell>
          <table:table-cell table:formula="of:=[.C373]/[.B373]" office:value-type="float" office:value="467.505241090147" calcext:value-type="float">
            <text:p>467.505241090147</text:p>
          </table:table-cell>
          <table:table-cell table:formula="of:=1/[.D373]" office:value-type="float" office:value="0.0230414746543779" calcext:value-type="float">
            <text:p>0.0230414746543779</text:p>
          </table:table-cell>
          <table:table-cell table:formula="of:=LOG10([.E373])" office:value-type="float" office:value="2.66978648400805" calcext:value-type="float">
            <text:p>2.669786484008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4" calcext:value-type="float">
            <text:p>43.4</text:p>
          </table:table-cell>
          <table:table-cell table:formula="of:=[.C374]/[.B374]" office:value-type="float" office:value="704.402515723271" calcext:value-type="float">
            <text:p>704.402515723271</text:p>
          </table:table-cell>
          <table:table-cell table:formula="of:=1/[.D374]" office:value-type="float" office:value="0.0230414746543779" calcext:value-type="float">
            <text:p>0.0230414746543779</text:p>
          </table:table-cell>
          <table:table-cell table:formula="of:=LOG10([.E37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4" calcext:value-type="float">
            <text:p>43.4</text:p>
          </table:table-cell>
          <table:table-cell table:formula="of:=[.C375]/[.B375]" office:value-type="float" office:value="603.77358490566" calcext:value-type="float">
            <text:p>603.77358490566</text:p>
          </table:table-cell>
          <table:table-cell table:formula="of:=1/[.D375]" office:value-type="float" office:value="0.0230414746543779" calcext:value-type="float">
            <text:p>0.0230414746543779</text:p>
          </table:table-cell>
          <table:table-cell table:formula="of:=LOG10([.E37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4" calcext:value-type="float">
            <text:p>43.4</text:p>
          </table:table-cell>
          <table:table-cell table:formula="of:=[.C376]/[.B376]" office:value-type="float" office:value="704.402515723271" calcext:value-type="float">
            <text:p>704.402515723271</text:p>
          </table:table-cell>
          <table:table-cell table:formula="of:=1/[.D376]" office:value-type="float" office:value="0.0230414746543779" calcext:value-type="float">
            <text:p>0.0230414746543779</text:p>
          </table:table-cell>
          <table:table-cell table:formula="of:=LOG10([.E37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3.4" calcext:value-type="float">
            <text:p>43.4</text:p>
          </table:table-cell>
          <table:table-cell table:formula="of:=[.C377]/[.B377]" office:value-type="float" office:value="528.301886792453" calcext:value-type="float">
            <text:p>528.301886792453</text:p>
          </table:table-cell>
          <table:table-cell table:formula="of:=1/[.D377]" office:value-type="float" office:value="0.0230414746543779" calcext:value-type="float">
            <text:p>0.0230414746543779</text:p>
          </table:table-cell>
          <table:table-cell table:formula="of:=LOG10([.E37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3.4" calcext:value-type="float">
            <text:p>43.4</text:p>
          </table:table-cell>
          <table:table-cell table:formula="of:=[.C378]/[.B378]" office:value-type="float" office:value="528.301886792453" calcext:value-type="float">
            <text:p>528.301886792453</text:p>
          </table:table-cell>
          <table:table-cell table:formula="of:=1/[.D378]" office:value-type="float" office:value="0.0230414746543779" calcext:value-type="float">
            <text:p>0.0230414746543779</text:p>
          </table:table-cell>
          <table:table-cell table:formula="of:=LOG10([.E37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3.3" calcext:value-type="float">
            <text:p>43.3</text:p>
          </table:table-cell>
          <table:table-cell table:formula="of:=[.C379]/[.B379]" office:value-type="float" office:value="1402.51572327044" calcext:value-type="float">
            <text:p>1402.51572327044</text:p>
          </table:table-cell>
          <table:table-cell table:formula="of:=1/[.D379]" office:value-type="float" office:value="0.023094688221709" calcext:value-type="float">
            <text:p>0.023094688221709</text:p>
          </table:table-cell>
          <table:table-cell table:formula="of:=LOG10([.E379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3.3" calcext:value-type="float">
            <text:p>43.3</text:p>
          </table:table-cell>
          <table:table-cell table:formula="of:=[.C380]/[.B380]" office:value-type="float" office:value="601.078167115903" calcext:value-type="float">
            <text:p>601.078167115903</text:p>
          </table:table-cell>
          <table:table-cell table:formula="of:=1/[.D380]" office:value-type="float" office:value="0.023094688221709" calcext:value-type="float">
            <text:p>0.023094688221709</text:p>
          </table:table-cell>
          <table:table-cell table:formula="of:=LOG10([.E380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3" calcext:value-type="float">
            <text:p>43.3</text:p>
          </table:table-cell>
          <table:table-cell table:formula="of:=[.C381]/[.B381]" office:value-type="float" office:value="704.402515723271" calcext:value-type="float">
            <text:p>704.402515723271</text:p>
          </table:table-cell>
          <table:table-cell table:formula="of:=1/[.D381]" office:value-type="float" office:value="0.023094688221709" calcext:value-type="float">
            <text:p>0.023094688221709</text:p>
          </table:table-cell>
          <table:table-cell table:formula="of:=LOG10([.E38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3.3" calcext:value-type="float">
            <text:p>43.3</text:p>
          </table:table-cell>
          <table:table-cell table:formula="of:=[.C382]/[.B382]" office:value-type="float" office:value="601.078167115903" calcext:value-type="float">
            <text:p>601.078167115903</text:p>
          </table:table-cell>
          <table:table-cell table:formula="of:=1/[.D382]" office:value-type="float" office:value="0.023094688221709" calcext:value-type="float">
            <text:p>0.023094688221709</text:p>
          </table:table-cell>
          <table:table-cell table:formula="of:=LOG10([.E382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3" calcext:value-type="float">
            <text:p>43.3</text:p>
          </table:table-cell>
          <table:table-cell table:formula="of:=[.C383]/[.B383]" office:value-type="float" office:value="603.77358490566" calcext:value-type="float">
            <text:p>603.77358490566</text:p>
          </table:table-cell>
          <table:table-cell table:formula="of:=1/[.D383]" office:value-type="float" office:value="0.023094688221709" calcext:value-type="float">
            <text:p>0.023094688221709</text:p>
          </table:table-cell>
          <table:table-cell table:formula="of:=LOG10([.E38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3.3" calcext:value-type="float">
            <text:p>43.3</text:p>
          </table:table-cell>
          <table:table-cell table:formula="of:=[.C384]/[.B384]" office:value-type="float" office:value="841.509433962264" calcext:value-type="float">
            <text:p>841.509433962264</text:p>
          </table:table-cell>
          <table:table-cell table:formula="of:=1/[.D384]" office:value-type="float" office:value="0.023094688221709" calcext:value-type="float">
            <text:p>0.023094688221709</text:p>
          </table:table-cell>
          <table:table-cell table:formula="of:=LOG10([.E38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3" calcext:value-type="float">
            <text:p>43.3</text:p>
          </table:table-cell>
          <table:table-cell table:formula="of:=[.C385]/[.B385]" office:value-type="float" office:value="704.402515723271" calcext:value-type="float">
            <text:p>704.402515723271</text:p>
          </table:table-cell>
          <table:table-cell table:formula="of:=1/[.D385]" office:value-type="float" office:value="0.023094688221709" calcext:value-type="float">
            <text:p>0.023094688221709</text:p>
          </table:table-cell>
          <table:table-cell table:formula="of:=LOG10([.E38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2" calcext:value-type="float">
            <text:p>43.2</text:p>
          </table:table-cell>
          <table:table-cell table:formula="of:=[.C386]/[.B386]" office:value-type="float" office:value="704.402515723271" calcext:value-type="float">
            <text:p>704.402515723271</text:p>
          </table:table-cell>
          <table:table-cell table:formula="of:=1/[.D386]" office:value-type="float" office:value="0.0231481481481481" calcext:value-type="float">
            <text:p>0.0231481481481481</text:p>
          </table:table-cell>
          <table:table-cell table:formula="of:=LOG10([.E38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2" calcext:value-type="float">
            <text:p>43.2</text:p>
          </table:table-cell>
          <table:table-cell table:formula="of:=[.C387]/[.B387]" office:value-type="float" office:value="603.77358490566" calcext:value-type="float">
            <text:p>603.77358490566</text:p>
          </table:table-cell>
          <table:table-cell table:formula="of:=1/[.D387]" office:value-type="float" office:value="0.0231481481481481" calcext:value-type="float">
            <text:p>0.0231481481481481</text:p>
          </table:table-cell>
          <table:table-cell table:formula="of:=LOG10([.E38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3.2" calcext:value-type="float">
            <text:p>43.2</text:p>
          </table:table-cell>
          <table:table-cell table:formula="of:=[.C388]/[.B388]" office:value-type="float" office:value="1051.88679245283" calcext:value-type="float">
            <text:p>1051.88679245283</text:p>
          </table:table-cell>
          <table:table-cell table:formula="of:=1/[.D388]" office:value-type="float" office:value="0.0231481481481481" calcext:value-type="float">
            <text:p>0.0231481481481481</text:p>
          </table:table-cell>
          <table:table-cell table:formula="of:=LOG10([.E388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2" calcext:value-type="float">
            <text:p>43.2</text:p>
          </table:table-cell>
          <table:table-cell table:formula="of:=[.C389]/[.B389]" office:value-type="float" office:value="704.402515723271" calcext:value-type="float">
            <text:p>704.402515723271</text:p>
          </table:table-cell>
          <table:table-cell table:formula="of:=1/[.D389]" office:value-type="float" office:value="0.0231481481481481" calcext:value-type="float">
            <text:p>0.0231481481481481</text:p>
          </table:table-cell>
          <table:table-cell table:formula="of:=LOG10([.E38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2" calcext:value-type="float">
            <text:p>43.2</text:p>
          </table:table-cell>
          <table:table-cell table:formula="of:=[.C390]/[.B390]" office:value-type="float" office:value="704.402515723271" calcext:value-type="float">
            <text:p>704.402515723271</text:p>
          </table:table-cell>
          <table:table-cell table:formula="of:=1/[.D390]" office:value-type="float" office:value="0.0231481481481481" calcext:value-type="float">
            <text:p>0.0231481481481481</text:p>
          </table:table-cell>
          <table:table-cell table:formula="of:=LOG10([.E39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2" calcext:value-type="float">
            <text:p>43.2</text:p>
          </table:table-cell>
          <table:table-cell table:formula="of:=[.C391]/[.B391]" office:value-type="float" office:value="704.402515723271" calcext:value-type="float">
            <text:p>704.402515723271</text:p>
          </table:table-cell>
          <table:table-cell table:formula="of:=1/[.D391]" office:value-type="float" office:value="0.0231481481481481" calcext:value-type="float">
            <text:p>0.0231481481481481</text:p>
          </table:table-cell>
          <table:table-cell table:formula="of:=LOG10([.E39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3.2" calcext:value-type="float">
            <text:p>43.2</text:p>
          </table:table-cell>
          <table:table-cell table:formula="of:=[.C392]/[.B392]" office:value-type="float" office:value="845.283018867925" calcext:value-type="float">
            <text:p>845.283018867925</text:p>
          </table:table-cell>
          <table:table-cell table:formula="of:=1/[.D392]" office:value-type="float" office:value="0.0231481481481481" calcext:value-type="float">
            <text:p>0.0231481481481481</text:p>
          </table:table-cell>
          <table:table-cell table:formula="of:=LOG10([.E39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3]/[.B393]" office:value-type="float" office:value="528.301886792453" calcext:value-type="float">
            <text:p>528.301886792453</text:p>
          </table:table-cell>
          <table:table-cell table:formula="of:=1/[.D393]" office:value-type="float" office:value="0.0232018561484919" calcext:value-type="float">
            <text:p>0.0232018561484919</text:p>
          </table:table-cell>
          <table:table-cell table:formula="of:=LOG10([.E39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4]/[.B394]" office:value-type="float" office:value="704.402515723271" calcext:value-type="float">
            <text:p>704.402515723271</text:p>
          </table:table-cell>
          <table:table-cell table:formula="of:=1/[.D394]" office:value-type="float" office:value="0.0232018561484919" calcext:value-type="float">
            <text:p>0.0232018561484919</text:p>
          </table:table-cell>
          <table:table-cell table:formula="of:=LOG10([.E39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5]/[.B395]" office:value-type="float" office:value="384.219554030875" calcext:value-type="float">
            <text:p>384.219554030875</text:p>
          </table:table-cell>
          <table:table-cell table:formula="of:=1/[.D395]" office:value-type="float" office:value="0.0232018561484919" calcext:value-type="float">
            <text:p>0.0232018561484919</text:p>
          </table:table-cell>
          <table:table-cell table:formula="of:=LOG10([.E395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6]/[.B396]" office:value-type="float" office:value="1056.60377358491" calcext:value-type="float">
            <text:p>1056.60377358491</text:p>
          </table:table-cell>
          <table:table-cell table:formula="of:=1/[.D396]" office:value-type="float" office:value="0.0232018561484919" calcext:value-type="float">
            <text:p>0.0232018561484919</text:p>
          </table:table-cell>
          <table:table-cell table:formula="of:=LOG10([.E39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7]/[.B397]" office:value-type="float" office:value="845.283018867925" calcext:value-type="float">
            <text:p>845.283018867925</text:p>
          </table:table-cell>
          <table:table-cell table:formula="of:=1/[.D397]" office:value-type="float" office:value="0.0232018561484919" calcext:value-type="float">
            <text:p>0.0232018561484919</text:p>
          </table:table-cell>
          <table:table-cell table:formula="of:=LOG10([.E39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8]/[.B398]" office:value-type="float" office:value="704.402515723271" calcext:value-type="float">
            <text:p>704.402515723271</text:p>
          </table:table-cell>
          <table:table-cell table:formula="of:=1/[.D398]" office:value-type="float" office:value="0.0232018561484919" calcext:value-type="float">
            <text:p>0.0232018561484919</text:p>
          </table:table-cell>
          <table:table-cell table:formula="of:=LOG10([.E39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399]/[.B399]" office:value-type="float" office:value="704.402515723271" calcext:value-type="float">
            <text:p>704.402515723271</text:p>
          </table:table-cell>
          <table:table-cell table:formula="of:=1/[.D399]" office:value-type="float" office:value="0.0232018561484919" calcext:value-type="float">
            <text:p>0.0232018561484919</text:p>
          </table:table-cell>
          <table:table-cell table:formula="of:=LOG10([.E39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400]/[.B400]" office:value-type="float" office:value="603.77358490566" calcext:value-type="float">
            <text:p>603.77358490566</text:p>
          </table:table-cell>
          <table:table-cell table:formula="of:=1/[.D400]" office:value-type="float" office:value="0.0232018561484919" calcext:value-type="float">
            <text:p>0.0232018561484919</text:p>
          </table:table-cell>
          <table:table-cell table:formula="of:=LOG10([.E40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3.1" calcext:value-type="float">
            <text:p>43.1</text:p>
          </table:table-cell>
          <table:table-cell table:formula="of:=[.C401]/[.B401]" office:value-type="float" office:value="845.283018867925" calcext:value-type="float">
            <text:p>845.283018867925</text:p>
          </table:table-cell>
          <table:table-cell table:formula="of:=1/[.D401]" office:value-type="float" office:value="0.0232018561484919" calcext:value-type="float">
            <text:p>0.0232018561484919</text:p>
          </table:table-cell>
          <table:table-cell table:formula="of:=LOG10([.E40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3.1" calcext:value-type="float">
            <text:p>43.1</text:p>
          </table:table-cell>
          <table:table-cell table:formula="of:=[.C402]/[.B402]" office:value-type="float" office:value="841.509433962264" calcext:value-type="float">
            <text:p>841.509433962264</text:p>
          </table:table-cell>
          <table:table-cell table:formula="of:=1/[.D402]" office:value-type="float" office:value="0.0232018561484919" calcext:value-type="float">
            <text:p>0.0232018561484919</text:p>
          </table:table-cell>
          <table:table-cell table:formula="of:=LOG10([.E402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" calcext:value-type="float">
            <text:p>43</text:p>
          </table:table-cell>
          <table:table-cell table:formula="of:=[.C403]/[.B403]" office:value-type="float" office:value="704.402515723271" calcext:value-type="float">
            <text:p>704.402515723271</text:p>
          </table:table-cell>
          <table:table-cell table:formula="of:=1/[.D403]" office:value-type="float" office:value="0.0232558139534884" calcext:value-type="float">
            <text:p>0.0232558139534884</text:p>
          </table:table-cell>
          <table:table-cell table:formula="of:=LOG10([.E40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3" calcext:value-type="float">
            <text:p>43</text:p>
          </table:table-cell>
          <table:table-cell table:formula="of:=[.C404]/[.B404]" office:value-type="float" office:value="422.641509433962" calcext:value-type="float">
            <text:p>422.641509433962</text:p>
          </table:table-cell>
          <table:table-cell table:formula="of:=1/[.D404]" office:value-type="float" office:value="0.0232558139534884" calcext:value-type="float">
            <text:p>0.0232558139534884</text:p>
          </table:table-cell>
          <table:table-cell table:formula="of:=LOG10([.E404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3" calcext:value-type="float">
            <text:p>43</text:p>
          </table:table-cell>
          <table:table-cell table:formula="of:=[.C405]/[.B405]" office:value-type="float" office:value="841.509433962264" calcext:value-type="float">
            <text:p>841.509433962264</text:p>
          </table:table-cell>
          <table:table-cell table:formula="of:=1/[.D405]" office:value-type="float" office:value="0.0232558139534884" calcext:value-type="float">
            <text:p>0.0232558139534884</text:p>
          </table:table-cell>
          <table:table-cell table:formula="of:=LOG10([.E405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" calcext:value-type="float">
            <text:p>43</text:p>
          </table:table-cell>
          <table:table-cell table:formula="of:=[.C406]/[.B406]" office:value-type="float" office:value="704.402515723271" calcext:value-type="float">
            <text:p>704.402515723271</text:p>
          </table:table-cell>
          <table:table-cell table:formula="of:=1/[.D406]" office:value-type="float" office:value="0.0232558139534884" calcext:value-type="float">
            <text:p>0.0232558139534884</text:p>
          </table:table-cell>
          <table:table-cell table:formula="of:=LOG10([.E40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3" calcext:value-type="float">
            <text:p>43</text:p>
          </table:table-cell>
          <table:table-cell table:formula="of:=[.C407]/[.B407]" office:value-type="float" office:value="704.402515723271" calcext:value-type="float">
            <text:p>704.402515723271</text:p>
          </table:table-cell>
          <table:table-cell table:formula="of:=1/[.D407]" office:value-type="float" office:value="0.0232558139534884" calcext:value-type="float">
            <text:p>0.0232558139534884</text:p>
          </table:table-cell>
          <table:table-cell table:formula="of:=LOG10([.E40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3" calcext:value-type="float">
            <text:p>43</text:p>
          </table:table-cell>
          <table:table-cell table:formula="of:=[.C408]/[.B408]" office:value-type="float" office:value="603.77358490566" calcext:value-type="float">
            <text:p>603.77358490566</text:p>
          </table:table-cell>
          <table:table-cell table:formula="of:=1/[.D408]" office:value-type="float" office:value="0.0232558139534884" calcext:value-type="float">
            <text:p>0.0232558139534884</text:p>
          </table:table-cell>
          <table:table-cell table:formula="of:=LOG10([.E40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09]/[.B409]" office:value-type="float" office:value="528.301886792453" calcext:value-type="float">
            <text:p>528.301886792453</text:p>
          </table:table-cell>
          <table:table-cell table:formula="of:=1/[.D409]" office:value-type="float" office:value="0.0233100233100233" calcext:value-type="float">
            <text:p>0.0233100233100233</text:p>
          </table:table-cell>
          <table:table-cell table:formula="of:=LOG10([.E409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10]/[.B410]" office:value-type="float" office:value="845.283018867925" calcext:value-type="float">
            <text:p>845.283018867925</text:p>
          </table:table-cell>
          <table:table-cell table:formula="of:=1/[.D410]" office:value-type="float" office:value="0.0233100233100233" calcext:value-type="float">
            <text:p>0.0233100233100233</text:p>
          </table:table-cell>
          <table:table-cell table:formula="of:=LOG10([.E41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11]/[.B411]" office:value-type="float" office:value="384.219554030875" calcext:value-type="float">
            <text:p>384.219554030875</text:p>
          </table:table-cell>
          <table:table-cell table:formula="of:=1/[.D411]" office:value-type="float" office:value="0.0233100233100233" calcext:value-type="float">
            <text:p>0.0233100233100233</text:p>
          </table:table-cell>
          <table:table-cell table:formula="of:=LOG10([.E411])" office:value-type="float" office:value="2.58457946357515" calcext:value-type="float">
            <text:p>2.584579463575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12]/[.B412]" office:value-type="float" office:value="528.301886792453" calcext:value-type="float">
            <text:p>528.301886792453</text:p>
          </table:table-cell>
          <table:table-cell table:formula="of:=1/[.D412]" office:value-type="float" office:value="0.0233100233100233" calcext:value-type="float">
            <text:p>0.0233100233100233</text:p>
          </table:table-cell>
          <table:table-cell table:formula="of:=LOG10([.E41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13]/[.B413]" office:value-type="float" office:value="1056.60377358491" calcext:value-type="float">
            <text:p>1056.60377358491</text:p>
          </table:table-cell>
          <table:table-cell table:formula="of:=1/[.D413]" office:value-type="float" office:value="0.0233100233100233" calcext:value-type="float">
            <text:p>0.0233100233100233</text:p>
          </table:table-cell>
          <table:table-cell table:formula="of:=LOG10([.E41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2.9" calcext:value-type="float">
            <text:p>42.9</text:p>
          </table:table-cell>
          <table:table-cell table:formula="of:=[.C414]/[.B414]" office:value-type="float" office:value="841.509433962264" calcext:value-type="float">
            <text:p>841.509433962264</text:p>
          </table:table-cell>
          <table:table-cell table:formula="of:=1/[.D414]" office:value-type="float" office:value="0.0233100233100233" calcext:value-type="float">
            <text:p>0.0233100233100233</text:p>
          </table:table-cell>
          <table:table-cell table:formula="of:=LOG10([.E41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2.9" calcext:value-type="float">
            <text:p>42.9</text:p>
          </table:table-cell>
          <table:table-cell table:formula="of:=[.C415]/[.B415]" office:value-type="float" office:value="601.078167115903" calcext:value-type="float">
            <text:p>601.078167115903</text:p>
          </table:table-cell>
          <table:table-cell table:formula="of:=1/[.D415]" office:value-type="float" office:value="0.0233100233100233" calcext:value-type="float">
            <text:p>0.0233100233100233</text:p>
          </table:table-cell>
          <table:table-cell table:formula="of:=LOG10([.E415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16]/[.B416]" office:value-type="float" office:value="603.77358490566" calcext:value-type="float">
            <text:p>603.77358490566</text:p>
          </table:table-cell>
          <table:table-cell table:formula="of:=1/[.D416]" office:value-type="float" office:value="0.0233100233100233" calcext:value-type="float">
            <text:p>0.0233100233100233</text:p>
          </table:table-cell>
          <table:table-cell table:formula="of:=LOG10([.E41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9" calcext:value-type="float">
            <text:p>42.9</text:p>
          </table:table-cell>
          <table:table-cell table:formula="of:=[.C417]/[.B417]" office:value-type="float" office:value="603.77358490566" calcext:value-type="float">
            <text:p>603.77358490566</text:p>
          </table:table-cell>
          <table:table-cell table:formula="of:=1/[.D417]" office:value-type="float" office:value="0.0233100233100233" calcext:value-type="float">
            <text:p>0.0233100233100233</text:p>
          </table:table-cell>
          <table:table-cell table:formula="of:=LOG10([.E41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8" calcext:value-type="float">
            <text:p>42.8</text:p>
          </table:table-cell>
          <table:table-cell table:formula="of:=[.C418]/[.B418]" office:value-type="float" office:value="528.301886792453" calcext:value-type="float">
            <text:p>528.301886792453</text:p>
          </table:table-cell>
          <table:table-cell table:formula="of:=1/[.D418]" office:value-type="float" office:value="0.0233644859813084" calcext:value-type="float">
            <text:p>0.0233644859813084</text:p>
          </table:table-cell>
          <table:table-cell table:formula="of:=LOG10([.E41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2.8" calcext:value-type="float">
            <text:p>42.8</text:p>
          </table:table-cell>
          <table:table-cell table:formula="of:=[.C419]/[.B419]" office:value-type="float" office:value="1056.60377358491" calcext:value-type="float">
            <text:p>1056.60377358491</text:p>
          </table:table-cell>
          <table:table-cell table:formula="of:=1/[.D419]" office:value-type="float" office:value="0.0233644859813084" calcext:value-type="float">
            <text:p>0.0233644859813084</text:p>
          </table:table-cell>
          <table:table-cell table:formula="of:=LOG10([.E41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8" calcext:value-type="float">
            <text:p>42.8</text:p>
          </table:table-cell>
          <table:table-cell table:formula="of:=[.C420]/[.B420]" office:value-type="float" office:value="704.402515723271" calcext:value-type="float">
            <text:p>704.402515723271</text:p>
          </table:table-cell>
          <table:table-cell table:formula="of:=1/[.D420]" office:value-type="float" office:value="0.0233644859813084" calcext:value-type="float">
            <text:p>0.0233644859813084</text:p>
          </table:table-cell>
          <table:table-cell table:formula="of:=LOG10([.E42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8" calcext:value-type="float">
            <text:p>42.8</text:p>
          </table:table-cell>
          <table:table-cell table:formula="of:=[.C421]/[.B421]" office:value-type="float" office:value="704.402515723271" calcext:value-type="float">
            <text:p>704.402515723271</text:p>
          </table:table-cell>
          <table:table-cell table:formula="of:=1/[.D421]" office:value-type="float" office:value="0.0233644859813084" calcext:value-type="float">
            <text:p>0.0233644859813084</text:p>
          </table:table-cell>
          <table:table-cell table:formula="of:=LOG10([.E42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8" calcext:value-type="float">
            <text:p>42.8</text:p>
          </table:table-cell>
          <table:table-cell table:formula="of:=[.C422]/[.B422]" office:value-type="float" office:value="603.77358490566" calcext:value-type="float">
            <text:p>603.77358490566</text:p>
          </table:table-cell>
          <table:table-cell table:formula="of:=1/[.D422]" office:value-type="float" office:value="0.0233644859813084" calcext:value-type="float">
            <text:p>0.0233644859813084</text:p>
          </table:table-cell>
          <table:table-cell table:formula="of:=LOG10([.E42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8" calcext:value-type="float">
            <text:p>42.8</text:p>
          </table:table-cell>
          <table:table-cell table:formula="of:=[.C423]/[.B423]" office:value-type="float" office:value="704.402515723271" calcext:value-type="float">
            <text:p>704.402515723271</text:p>
          </table:table-cell>
          <table:table-cell table:formula="of:=1/[.D423]" office:value-type="float" office:value="0.0233644859813084" calcext:value-type="float">
            <text:p>0.0233644859813084</text:p>
          </table:table-cell>
          <table:table-cell table:formula="of:=LOG10([.E42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2.8" calcext:value-type="float">
            <text:p>42.8</text:p>
          </table:table-cell>
          <table:table-cell table:formula="of:=[.C424]/[.B424]" office:value-type="float" office:value="701.25786163522" calcext:value-type="float">
            <text:p>701.25786163522</text:p>
          </table:table-cell>
          <table:table-cell table:formula="of:=1/[.D424]" office:value-type="float" office:value="0.0233644859813084" calcext:value-type="float">
            <text:p>0.0233644859813084</text:p>
          </table:table-cell>
          <table:table-cell table:formula="of:=LOG10([.E424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2.7" calcext:value-type="float">
            <text:p>42.7</text:p>
          </table:table-cell>
          <table:table-cell table:formula="of:=[.C425]/[.B425]" office:value-type="float" office:value="701.25786163522" calcext:value-type="float">
            <text:p>701.25786163522</text:p>
          </table:table-cell>
          <table:table-cell table:formula="of:=1/[.D425]" office:value-type="float" office:value="0.0234192037470726" calcext:value-type="float">
            <text:p>0.0234192037470726</text:p>
          </table:table-cell>
          <table:table-cell table:formula="of:=LOG10([.E425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2.7" calcext:value-type="float">
            <text:p>42.7</text:p>
          </table:table-cell>
          <table:table-cell table:formula="of:=[.C426]/[.B426]" office:value-type="float" office:value="422.641509433962" calcext:value-type="float">
            <text:p>422.641509433962</text:p>
          </table:table-cell>
          <table:table-cell table:formula="of:=1/[.D426]" office:value-type="float" office:value="0.0234192037470726" calcext:value-type="float">
            <text:p>0.0234192037470726</text:p>
          </table:table-cell>
          <table:table-cell table:formula="of:=LOG10([.E426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7" calcext:value-type="float">
            <text:p>42.7</text:p>
          </table:table-cell>
          <table:table-cell table:formula="of:=[.C427]/[.B427]" office:value-type="float" office:value="603.77358490566" calcext:value-type="float">
            <text:p>603.77358490566</text:p>
          </table:table-cell>
          <table:table-cell table:formula="of:=1/[.D427]" office:value-type="float" office:value="0.0234192037470726" calcext:value-type="float">
            <text:p>0.0234192037470726</text:p>
          </table:table-cell>
          <table:table-cell table:formula="of:=LOG10([.E42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2.7" calcext:value-type="float">
            <text:p>42.7</text:p>
          </table:table-cell>
          <table:table-cell table:formula="of:=[.C428]/[.B428]" office:value-type="float" office:value="1051.88679245283" calcext:value-type="float">
            <text:p>1051.88679245283</text:p>
          </table:table-cell>
          <table:table-cell table:formula="of:=1/[.D428]" office:value-type="float" office:value="0.0234192037470726" calcext:value-type="float">
            <text:p>0.0234192037470726</text:p>
          </table:table-cell>
          <table:table-cell table:formula="of:=LOG10([.E428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7" calcext:value-type="float">
            <text:p>42.7</text:p>
          </table:table-cell>
          <table:table-cell table:formula="of:=[.C429]/[.B429]" office:value-type="float" office:value="704.402515723271" calcext:value-type="float">
            <text:p>704.402515723271</text:p>
          </table:table-cell>
          <table:table-cell table:formula="of:=1/[.D429]" office:value-type="float" office:value="0.0234192037470726" calcext:value-type="float">
            <text:p>0.0234192037470726</text:p>
          </table:table-cell>
          <table:table-cell table:formula="of:=LOG10([.E42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2.7" calcext:value-type="float">
            <text:p>42.7</text:p>
          </table:table-cell>
          <table:table-cell table:formula="of:=[.C430]/[.B430]" office:value-type="float" office:value="841.509433962264" calcext:value-type="float">
            <text:p>841.509433962264</text:p>
          </table:table-cell>
          <table:table-cell table:formula="of:=1/[.D430]" office:value-type="float" office:value="0.0234192037470726" calcext:value-type="float">
            <text:p>0.0234192037470726</text:p>
          </table:table-cell>
          <table:table-cell table:formula="of:=LOG10([.E430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7" calcext:value-type="float">
            <text:p>42.7</text:p>
          </table:table-cell>
          <table:table-cell table:formula="of:=[.C431]/[.B431]" office:value-type="float" office:value="704.402515723271" calcext:value-type="float">
            <text:p>704.402515723271</text:p>
          </table:table-cell>
          <table:table-cell table:formula="of:=1/[.D431]" office:value-type="float" office:value="0.0234192037470726" calcext:value-type="float">
            <text:p>0.0234192037470726</text:p>
          </table:table-cell>
          <table:table-cell table:formula="of:=LOG10([.E43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7" calcext:value-type="float">
            <text:p>42.7</text:p>
          </table:table-cell>
          <table:table-cell table:formula="of:=[.C432]/[.B432]" office:value-type="float" office:value="603.77358490566" calcext:value-type="float">
            <text:p>603.77358490566</text:p>
          </table:table-cell>
          <table:table-cell table:formula="of:=1/[.D432]" office:value-type="float" office:value="0.0234192037470726" calcext:value-type="float">
            <text:p>0.0234192037470726</text:p>
          </table:table-cell>
          <table:table-cell table:formula="of:=LOG10([.E43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5" calcext:value-type="float">
            <text:p>2.25</text:p>
          </table:table-cell>
          <table:table-cell office:value-type="float" office:value="42.7" calcext:value-type="float">
            <text:p>42.7</text:p>
          </table:table-cell>
          <table:table-cell table:formula="of:=[.C433]/[.B433]" office:value-type="float" office:value="471.698113207547" calcext:value-type="float">
            <text:p>471.698113207547</text:p>
          </table:table-cell>
          <table:table-cell table:formula="of:=1/[.D433]" office:value-type="float" office:value="0.0234192037470726" calcext:value-type="float">
            <text:p>0.0234192037470726</text:p>
          </table:table-cell>
          <table:table-cell table:formula="of:=LOG10([.E433])" office:value-type="float" office:value="2.67366413907125" calcext:value-type="float">
            <text:p>2.673664139071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2.6" calcext:value-type="float">
            <text:p>42.6</text:p>
          </table:table-cell>
          <table:table-cell table:formula="of:=[.C434]/[.B434]" office:value-type="float" office:value="841.509433962264" calcext:value-type="float">
            <text:p>841.509433962264</text:p>
          </table:table-cell>
          <table:table-cell table:formula="of:=1/[.D434]" office:value-type="float" office:value="0.0234741784037559" calcext:value-type="float">
            <text:p>0.0234741784037559</text:p>
          </table:table-cell>
          <table:table-cell table:formula="of:=LOG10([.E43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6" calcext:value-type="float">
            <text:p>42.6</text:p>
          </table:table-cell>
          <table:table-cell table:formula="of:=[.C435]/[.B435]" office:value-type="float" office:value="845.283018867925" calcext:value-type="float">
            <text:p>845.283018867925</text:p>
          </table:table-cell>
          <table:table-cell table:formula="of:=1/[.D435]" office:value-type="float" office:value="0.0234741784037559" calcext:value-type="float">
            <text:p>0.0234741784037559</text:p>
          </table:table-cell>
          <table:table-cell table:formula="of:=LOG10([.E43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6" calcext:value-type="float">
            <text:p>42.6</text:p>
          </table:table-cell>
          <table:table-cell table:formula="of:=[.C436]/[.B436]" office:value-type="float" office:value="603.77358490566" calcext:value-type="float">
            <text:p>603.77358490566</text:p>
          </table:table-cell>
          <table:table-cell table:formula="of:=1/[.D436]" office:value-type="float" office:value="0.0234741784037559" calcext:value-type="float">
            <text:p>0.0234741784037559</text:p>
          </table:table-cell>
          <table:table-cell table:formula="of:=LOG10([.E43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6" calcext:value-type="float">
            <text:p>42.6</text:p>
          </table:table-cell>
          <table:table-cell table:formula="of:=[.C437]/[.B437]" office:value-type="float" office:value="845.283018867925" calcext:value-type="float">
            <text:p>845.283018867925</text:p>
          </table:table-cell>
          <table:table-cell table:formula="of:=1/[.D437]" office:value-type="float" office:value="0.0234741784037559" calcext:value-type="float">
            <text:p>0.0234741784037559</text:p>
          </table:table-cell>
          <table:table-cell table:formula="of:=LOG10([.E43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42.6" calcext:value-type="float">
            <text:p>42.6</text:p>
          </table:table-cell>
          <table:table-cell table:formula="of:=[.C438]/[.B438]" office:value-type="float" office:value="4207.54716981132" calcext:value-type="float">
            <text:p>4207.54716981132</text:p>
          </table:table-cell>
          <table:table-cell table:formula="of:=1/[.D438]" office:value-type="float" office:value="0.0234741784037559" calcext:value-type="float">
            <text:p>0.0234741784037559</text:p>
          </table:table-cell>
          <table:table-cell table:formula="of:=LOG10([.E438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6" calcext:value-type="float">
            <text:p>42.6</text:p>
          </table:table-cell>
          <table:table-cell table:formula="of:=[.C439]/[.B439]" office:value-type="float" office:value="704.402515723271" calcext:value-type="float">
            <text:p>704.402515723271</text:p>
          </table:table-cell>
          <table:table-cell table:formula="of:=1/[.D439]" office:value-type="float" office:value="0.0234741784037559" calcext:value-type="float">
            <text:p>0.0234741784037559</text:p>
          </table:table-cell>
          <table:table-cell table:formula="of:=LOG10([.E43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6" calcext:value-type="float">
            <text:p>42.6</text:p>
          </table:table-cell>
          <table:table-cell table:formula="of:=[.C440]/[.B440]" office:value-type="float" office:value="704.402515723271" calcext:value-type="float">
            <text:p>704.402515723271</text:p>
          </table:table-cell>
          <table:table-cell table:formula="of:=1/[.D440]" office:value-type="float" office:value="0.0234741784037559" calcext:value-type="float">
            <text:p>0.0234741784037559</text:p>
          </table:table-cell>
          <table:table-cell table:formula="of:=LOG10([.E44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6" calcext:value-type="float">
            <text:p>42.6</text:p>
          </table:table-cell>
          <table:table-cell table:formula="of:=[.C441]/[.B441]" office:value-type="float" office:value="704.402515723271" calcext:value-type="float">
            <text:p>704.402515723271</text:p>
          </table:table-cell>
          <table:table-cell table:formula="of:=1/[.D441]" office:value-type="float" office:value="0.0234741784037559" calcext:value-type="float">
            <text:p>0.0234741784037559</text:p>
          </table:table-cell>
          <table:table-cell table:formula="of:=LOG10([.E44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2]/[.B442]" office:value-type="float" office:value="528.301886792453" calcext:value-type="float">
            <text:p>528.301886792453</text:p>
          </table:table-cell>
          <table:table-cell table:formula="of:=1/[.D442]" office:value-type="float" office:value="0.0235294117647059" calcext:value-type="float">
            <text:p>0.0235294117647059</text:p>
          </table:table-cell>
          <table:table-cell table:formula="of:=LOG10([.E44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3]/[.B443]" office:value-type="float" office:value="845.283018867925" calcext:value-type="float">
            <text:p>845.283018867925</text:p>
          </table:table-cell>
          <table:table-cell table:formula="of:=1/[.D443]" office:value-type="float" office:value="0.0235294117647059" calcext:value-type="float">
            <text:p>0.0235294117647059</text:p>
          </table:table-cell>
          <table:table-cell table:formula="of:=LOG10([.E44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4]/[.B444]" office:value-type="float" office:value="845.283018867925" calcext:value-type="float">
            <text:p>845.283018867925</text:p>
          </table:table-cell>
          <table:table-cell table:formula="of:=1/[.D444]" office:value-type="float" office:value="0.0235294117647059" calcext:value-type="float">
            <text:p>0.0235294117647059</text:p>
          </table:table-cell>
          <table:table-cell table:formula="of:=LOG10([.E44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5]/[.B445]" office:value-type="float" office:value="704.402515723271" calcext:value-type="float">
            <text:p>704.402515723271</text:p>
          </table:table-cell>
          <table:table-cell table:formula="of:=1/[.D445]" office:value-type="float" office:value="0.0235294117647059" calcext:value-type="float">
            <text:p>0.0235294117647059</text:p>
          </table:table-cell>
          <table:table-cell table:formula="of:=LOG10([.E44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6]/[.B446]" office:value-type="float" office:value="704.402515723271" calcext:value-type="float">
            <text:p>704.402515723271</text:p>
          </table:table-cell>
          <table:table-cell table:formula="of:=1/[.D446]" office:value-type="float" office:value="0.0235294117647059" calcext:value-type="float">
            <text:p>0.0235294117647059</text:p>
          </table:table-cell>
          <table:table-cell table:formula="of:=LOG10([.E44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7]/[.B447]" office:value-type="float" office:value="704.402515723271" calcext:value-type="float">
            <text:p>704.402515723271</text:p>
          </table:table-cell>
          <table:table-cell table:formula="of:=1/[.D447]" office:value-type="float" office:value="0.0235294117647059" calcext:value-type="float">
            <text:p>0.0235294117647059</text:p>
          </table:table-cell>
          <table:table-cell table:formula="of:=LOG10([.E44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8]/[.B448]" office:value-type="float" office:value="603.77358490566" calcext:value-type="float">
            <text:p>603.77358490566</text:p>
          </table:table-cell>
          <table:table-cell table:formula="of:=1/[.D448]" office:value-type="float" office:value="0.0235294117647059" calcext:value-type="float">
            <text:p>0.0235294117647059</text:p>
          </table:table-cell>
          <table:table-cell table:formula="of:=LOG10([.E44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49]/[.B449]" office:value-type="float" office:value="704.402515723271" calcext:value-type="float">
            <text:p>704.402515723271</text:p>
          </table:table-cell>
          <table:table-cell table:formula="of:=1/[.D449]" office:value-type="float" office:value="0.0235294117647059" calcext:value-type="float">
            <text:p>0.0235294117647059</text:p>
          </table:table-cell>
          <table:table-cell table:formula="of:=LOG10([.E44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50]/[.B450]" office:value-type="float" office:value="845.283018867925" calcext:value-type="float">
            <text:p>845.283018867925</text:p>
          </table:table-cell>
          <table:table-cell table:formula="of:=1/[.D450]" office:value-type="float" office:value="0.0235294117647059" calcext:value-type="float">
            <text:p>0.0235294117647059</text:p>
          </table:table-cell>
          <table:table-cell table:formula="of:=LOG10([.E45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5" calcext:value-type="float">
            <text:p>42.5</text:p>
          </table:table-cell>
          <table:table-cell table:formula="of:=[.C451]/[.B451]" office:value-type="float" office:value="704.402515723271" calcext:value-type="float">
            <text:p>704.402515723271</text:p>
          </table:table-cell>
          <table:table-cell table:formula="of:=1/[.D451]" office:value-type="float" office:value="0.0235294117647059" calcext:value-type="float">
            <text:p>0.0235294117647059</text:p>
          </table:table-cell>
          <table:table-cell table:formula="of:=LOG10([.E45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2.4" calcext:value-type="float">
            <text:p>42.4</text:p>
          </table:table-cell>
          <table:table-cell table:formula="of:=[.C452]/[.B452]" office:value-type="float" office:value="841.509433962264" calcext:value-type="float">
            <text:p>841.509433962264</text:p>
          </table:table-cell>
          <table:table-cell table:formula="of:=1/[.D452]" office:value-type="float" office:value="0.0235849056603774" calcext:value-type="float">
            <text:p>0.0235849056603774</text:p>
          </table:table-cell>
          <table:table-cell table:formula="of:=LOG10([.E452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2.4" calcext:value-type="float">
            <text:p>42.4</text:p>
          </table:table-cell>
          <table:table-cell table:formula="of:=[.C453]/[.B453]" office:value-type="float" office:value="701.25786163522" calcext:value-type="float">
            <text:p>701.25786163522</text:p>
          </table:table-cell>
          <table:table-cell table:formula="of:=1/[.D453]" office:value-type="float" office:value="0.0235849056603774" calcext:value-type="float">
            <text:p>0.0235849056603774</text:p>
          </table:table-cell>
          <table:table-cell table:formula="of:=LOG10([.E453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2.4" calcext:value-type="float">
            <text:p>42.4</text:p>
          </table:table-cell>
          <table:table-cell table:formula="of:=[.C454]/[.B454]" office:value-type="float" office:value="701.25786163522" calcext:value-type="float">
            <text:p>701.25786163522</text:p>
          </table:table-cell>
          <table:table-cell table:formula="of:=1/[.D454]" office:value-type="float" office:value="0.0235849056603774" calcext:value-type="float">
            <text:p>0.0235849056603774</text:p>
          </table:table-cell>
          <table:table-cell table:formula="of:=LOG10([.E454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4" calcext:value-type="float">
            <text:p>42.4</text:p>
          </table:table-cell>
          <table:table-cell table:formula="of:=[.C455]/[.B455]" office:value-type="float" office:value="704.402515723271" calcext:value-type="float">
            <text:p>704.402515723271</text:p>
          </table:table-cell>
          <table:table-cell table:formula="of:=1/[.D455]" office:value-type="float" office:value="0.0235849056603774" calcext:value-type="float">
            <text:p>0.0235849056603774</text:p>
          </table:table-cell>
          <table:table-cell table:formula="of:=LOG10([.E45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4" calcext:value-type="float">
            <text:p>42.4</text:p>
          </table:table-cell>
          <table:table-cell table:formula="of:=[.C456]/[.B456]" office:value-type="float" office:value="845.283018867925" calcext:value-type="float">
            <text:p>845.283018867925</text:p>
          </table:table-cell>
          <table:table-cell table:formula="of:=1/[.D456]" office:value-type="float" office:value="0.0235849056603774" calcext:value-type="float">
            <text:p>0.0235849056603774</text:p>
          </table:table-cell>
          <table:table-cell table:formula="of:=LOG10([.E45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4" calcext:value-type="float">
            <text:p>42.4</text:p>
          </table:table-cell>
          <table:table-cell table:formula="of:=[.C457]/[.B457]" office:value-type="float" office:value="845.283018867925" calcext:value-type="float">
            <text:p>845.283018867925</text:p>
          </table:table-cell>
          <table:table-cell table:formula="of:=1/[.D457]" office:value-type="float" office:value="0.0235849056603774" calcext:value-type="float">
            <text:p>0.0235849056603774</text:p>
          </table:table-cell>
          <table:table-cell table:formula="of:=LOG10([.E45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4" calcext:value-type="float">
            <text:p>42.4</text:p>
          </table:table-cell>
          <table:table-cell table:formula="of:=[.C458]/[.B458]" office:value-type="float" office:value="704.402515723271" calcext:value-type="float">
            <text:p>704.402515723271</text:p>
          </table:table-cell>
          <table:table-cell table:formula="of:=1/[.D458]" office:value-type="float" office:value="0.0235849056603774" calcext:value-type="float">
            <text:p>0.0235849056603774</text:p>
          </table:table-cell>
          <table:table-cell table:formula="of:=LOG10([.E45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59]/[.B459]" office:value-type="float" office:value="704.402515723271" calcext:value-type="float">
            <text:p>704.402515723271</text:p>
          </table:table-cell>
          <table:table-cell table:formula="of:=1/[.D459]" office:value-type="float" office:value="0.0236406619385343" calcext:value-type="float">
            <text:p>0.0236406619385343</text:p>
          </table:table-cell>
          <table:table-cell table:formula="of:=LOG10([.E45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0]/[.B460]" office:value-type="float" office:value="528.301886792453" calcext:value-type="float">
            <text:p>528.301886792453</text:p>
          </table:table-cell>
          <table:table-cell table:formula="of:=1/[.D460]" office:value-type="float" office:value="0.0236406619385343" calcext:value-type="float">
            <text:p>0.0236406619385343</text:p>
          </table:table-cell>
          <table:table-cell table:formula="of:=LOG10([.E46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1]/[.B461]" office:value-type="float" office:value="528.301886792453" calcext:value-type="float">
            <text:p>528.301886792453</text:p>
          </table:table-cell>
          <table:table-cell table:formula="of:=1/[.D461]" office:value-type="float" office:value="0.0236406619385343" calcext:value-type="float">
            <text:p>0.0236406619385343</text:p>
          </table:table-cell>
          <table:table-cell table:formula="of:=LOG10([.E461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2]/[.B462]" office:value-type="float" office:value="603.77358490566" calcext:value-type="float">
            <text:p>603.77358490566</text:p>
          </table:table-cell>
          <table:table-cell table:formula="of:=1/[.D462]" office:value-type="float" office:value="0.0236406619385343" calcext:value-type="float">
            <text:p>0.0236406619385343</text:p>
          </table:table-cell>
          <table:table-cell table:formula="of:=LOG10([.E46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3]/[.B463]" office:value-type="float" office:value="469.601677148847" calcext:value-type="float">
            <text:p>469.601677148847</text:p>
          </table:table-cell>
          <table:table-cell table:formula="of:=1/[.D463]" office:value-type="float" office:value="0.0236406619385343" calcext:value-type="float">
            <text:p>0.0236406619385343</text:p>
          </table:table-cell>
          <table:table-cell table:formula="of:=LOG10([.E463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4]/[.B464]" office:value-type="float" office:value="469.601677148847" calcext:value-type="float">
            <text:p>469.601677148847</text:p>
          </table:table-cell>
          <table:table-cell table:formula="of:=1/[.D464]" office:value-type="float" office:value="0.0236406619385343" calcext:value-type="float">
            <text:p>0.0236406619385343</text:p>
          </table:table-cell>
          <table:table-cell table:formula="of:=LOG10([.E464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5]/[.B465]" office:value-type="float" office:value="422.641509433962" calcext:value-type="float">
            <text:p>422.641509433962</text:p>
          </table:table-cell>
          <table:table-cell table:formula="of:=1/[.D465]" office:value-type="float" office:value="0.0236406619385343" calcext:value-type="float">
            <text:p>0.0236406619385343</text:p>
          </table:table-cell>
          <table:table-cell table:formula="of:=LOG10([.E465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6]/[.B466]" office:value-type="float" office:value="422.641509433962" calcext:value-type="float">
            <text:p>422.641509433962</text:p>
          </table:table-cell>
          <table:table-cell table:formula="of:=1/[.D466]" office:value-type="float" office:value="0.0236406619385343" calcext:value-type="float">
            <text:p>0.0236406619385343</text:p>
          </table:table-cell>
          <table:table-cell table:formula="of:=LOG10([.E466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7]/[.B467]" office:value-type="float" office:value="352.201257861635" calcext:value-type="float">
            <text:p>352.201257861635</text:p>
          </table:table-cell>
          <table:table-cell table:formula="of:=1/[.D467]" office:value-type="float" office:value="0.0236406619385343" calcext:value-type="float">
            <text:p>0.0236406619385343</text:p>
          </table:table-cell>
          <table:table-cell table:formula="of:=LOG10([.E467])" office:value-type="float" office:value="2.54679090268575" calcext:value-type="float">
            <text:p>2.546790902685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8]/[.B468]" office:value-type="float" office:value="422.641509433962" calcext:value-type="float">
            <text:p>422.641509433962</text:p>
          </table:table-cell>
          <table:table-cell table:formula="of:=1/[.D468]" office:value-type="float" office:value="0.0236406619385343" calcext:value-type="float">
            <text:p>0.0236406619385343</text:p>
          </table:table-cell>
          <table:table-cell table:formula="of:=LOG10([.E468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2.3" calcext:value-type="float">
            <text:p>42.3</text:p>
          </table:table-cell>
          <table:table-cell table:formula="of:=[.C469]/[.B469]" office:value-type="float" office:value="469.601677148847" calcext:value-type="float">
            <text:p>469.601677148847</text:p>
          </table:table-cell>
          <table:table-cell table:formula="of:=1/[.D469]" office:value-type="float" office:value="0.0236406619385343" calcext:value-type="float">
            <text:p>0.0236406619385343</text:p>
          </table:table-cell>
          <table:table-cell table:formula="of:=LOG10([.E469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.2" calcext:value-type="float">
            <text:p>42.2</text:p>
          </table:table-cell>
          <table:table-cell table:formula="of:=[.C470]/[.B470]" office:value-type="float" office:value="603.77358490566" calcext:value-type="float">
            <text:p>603.77358490566</text:p>
          </table:table-cell>
          <table:table-cell table:formula="of:=1/[.D470]" office:value-type="float" office:value="0.023696682464455" calcext:value-type="float">
            <text:p>0.023696682464455</text:p>
          </table:table-cell>
          <table:table-cell table:formula="of:=LOG10([.E47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.2" calcext:value-type="float">
            <text:p>42.2</text:p>
          </table:table-cell>
          <table:table-cell table:formula="of:=[.C471]/[.B471]" office:value-type="float" office:value="528.301886792453" calcext:value-type="float">
            <text:p>528.301886792453</text:p>
          </table:table-cell>
          <table:table-cell table:formula="of:=1/[.D471]" office:value-type="float" office:value="0.023696682464455" calcext:value-type="float">
            <text:p>0.023696682464455</text:p>
          </table:table-cell>
          <table:table-cell table:formula="of:=LOG10([.E471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2" calcext:value-type="float">
            <text:p>42.2</text:p>
          </table:table-cell>
          <table:table-cell table:formula="of:=[.C472]/[.B472]" office:value-type="float" office:value="704.402515723271" calcext:value-type="float">
            <text:p>704.402515723271</text:p>
          </table:table-cell>
          <table:table-cell table:formula="of:=1/[.D472]" office:value-type="float" office:value="0.023696682464455" calcext:value-type="float">
            <text:p>0.023696682464455</text:p>
          </table:table-cell>
          <table:table-cell table:formula="of:=LOG10([.E47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.2" calcext:value-type="float">
            <text:p>42.2</text:p>
          </table:table-cell>
          <table:table-cell table:formula="of:=[.C473]/[.B473]" office:value-type="float" office:value="704.402515723271" calcext:value-type="float">
            <text:p>704.402515723271</text:p>
          </table:table-cell>
          <table:table-cell table:formula="of:=1/[.D473]" office:value-type="float" office:value="0.023696682464455" calcext:value-type="float">
            <text:p>0.023696682464455</text:p>
          </table:table-cell>
          <table:table-cell table:formula="of:=LOG10([.E47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5" calcext:value-type="float">
            <text:p>2.25</text:p>
          </table:table-cell>
          <table:table-cell office:value-type="float" office:value="42.2" calcext:value-type="float">
            <text:p>42.2</text:p>
          </table:table-cell>
          <table:table-cell table:formula="of:=[.C474]/[.B474]" office:value-type="float" office:value="849.056603773585" calcext:value-type="float">
            <text:p>849.056603773585</text:p>
          </table:table-cell>
          <table:table-cell table:formula="of:=1/[.D474]" office:value-type="float" office:value="0.023696682464455" calcext:value-type="float">
            <text:p>0.023696682464455</text:p>
          </table:table-cell>
          <table:table-cell table:formula="of:=LOG10([.E474])" office:value-type="float" office:value="2.92893664417456" calcext:value-type="float">
            <text:p>2.928936644174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.2" calcext:value-type="float">
            <text:p>42.2</text:p>
          </table:table-cell>
          <table:table-cell table:formula="of:=[.C475]/[.B475]" office:value-type="float" office:value="845.283018867925" calcext:value-type="float">
            <text:p>845.283018867925</text:p>
          </table:table-cell>
          <table:table-cell table:formula="of:=1/[.D475]" office:value-type="float" office:value="0.023696682464455" calcext:value-type="float">
            <text:p>0.023696682464455</text:p>
          </table:table-cell>
          <table:table-cell table:formula="of:=LOG10([.E47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2.2" calcext:value-type="float">
            <text:p>42.2</text:p>
          </table:table-cell>
          <table:table-cell table:formula="of:=[.C476]/[.B476]" office:value-type="float" office:value="1051.88679245283" calcext:value-type="float">
            <text:p>1051.88679245283</text:p>
          </table:table-cell>
          <table:table-cell table:formula="of:=1/[.D476]" office:value-type="float" office:value="0.023696682464455" calcext:value-type="float">
            <text:p>0.023696682464455</text:p>
          </table:table-cell>
          <table:table-cell table:formula="of:=LOG10([.E476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77]/[.B477]" office:value-type="float" office:value="1051.88679245283" calcext:value-type="float">
            <text:p>1051.88679245283</text:p>
          </table:table-cell>
          <table:table-cell table:formula="of:=1/[.D477]" office:value-type="float" office:value="0.0237529691211401" calcext:value-type="float">
            <text:p>0.0237529691211401</text:p>
          </table:table-cell>
          <table:table-cell table:formula="of:=LOG10([.E477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78]/[.B478]" office:value-type="float" office:value="1051.88679245283" calcext:value-type="float">
            <text:p>1051.88679245283</text:p>
          </table:table-cell>
          <table:table-cell table:formula="of:=1/[.D478]" office:value-type="float" office:value="0.0237529691211401" calcext:value-type="float">
            <text:p>0.0237529691211401</text:p>
          </table:table-cell>
          <table:table-cell table:formula="of:=LOG10([.E478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79]/[.B479]" office:value-type="float" office:value="1402.51572327044" calcext:value-type="float">
            <text:p>1402.51572327044</text:p>
          </table:table-cell>
          <table:table-cell table:formula="of:=1/[.D479]" office:value-type="float" office:value="0.0237529691211401" calcext:value-type="float">
            <text:p>0.0237529691211401</text:p>
          </table:table-cell>
          <table:table-cell table:formula="of:=LOG10([.E479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80]/[.B480]" office:value-type="float" office:value="1051.88679245283" calcext:value-type="float">
            <text:p>1051.88679245283</text:p>
          </table:table-cell>
          <table:table-cell table:formula="of:=1/[.D480]" office:value-type="float" office:value="0.0237529691211401" calcext:value-type="float">
            <text:p>0.0237529691211401</text:p>
          </table:table-cell>
          <table:table-cell table:formula="of:=LOG10([.E480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2.1" calcext:value-type="float">
            <text:p>42.1</text:p>
          </table:table-cell>
          <table:table-cell table:formula="of:=[.C481]/[.B481]" office:value-type="float" office:value="1408.80503144654" calcext:value-type="float">
            <text:p>1408.80503144654</text:p>
          </table:table-cell>
          <table:table-cell table:formula="of:=1/[.D481]" office:value-type="float" office:value="0.0237529691211401" calcext:value-type="float">
            <text:p>0.0237529691211401</text:p>
          </table:table-cell>
          <table:table-cell table:formula="of:=LOG10([.E481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82]/[.B482]" office:value-type="float" office:value="1402.51572327044" calcext:value-type="float">
            <text:p>1402.51572327044</text:p>
          </table:table-cell>
          <table:table-cell table:formula="of:=1/[.D482]" office:value-type="float" office:value="0.0237529691211401" calcext:value-type="float">
            <text:p>0.0237529691211401</text:p>
          </table:table-cell>
          <table:table-cell table:formula="of:=LOG10([.E482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2.1" calcext:value-type="float">
            <text:p>42.1</text:p>
          </table:table-cell>
          <table:table-cell table:formula="of:=[.C483]/[.B483]" office:value-type="float" office:value="1056.60377358491" calcext:value-type="float">
            <text:p>1056.60377358491</text:p>
          </table:table-cell>
          <table:table-cell table:formula="of:=1/[.D483]" office:value-type="float" office:value="0.0237529691211401" calcext:value-type="float">
            <text:p>0.0237529691211401</text:p>
          </table:table-cell>
          <table:table-cell table:formula="of:=LOG10([.E48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84]/[.B484]" office:value-type="float" office:value="1402.51572327044" calcext:value-type="float">
            <text:p>1402.51572327044</text:p>
          </table:table-cell>
          <table:table-cell table:formula="of:=1/[.D484]" office:value-type="float" office:value="0.0237529691211401" calcext:value-type="float">
            <text:p>0.0237529691211401</text:p>
          </table:table-cell>
          <table:table-cell table:formula="of:=LOG10([.E484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2.1" calcext:value-type="float">
            <text:p>42.1</text:p>
          </table:table-cell>
          <table:table-cell table:formula="of:=[.C485]/[.B485]" office:value-type="float" office:value="1402.51572327044" calcext:value-type="float">
            <text:p>1402.51572327044</text:p>
          </table:table-cell>
          <table:table-cell table:formula="of:=1/[.D485]" office:value-type="float" office:value="0.0237529691211401" calcext:value-type="float">
            <text:p>0.0237529691211401</text:p>
          </table:table-cell>
          <table:table-cell table:formula="of:=LOG10([.E485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2" calcext:value-type="float">
            <text:p>42</text:p>
          </table:table-cell>
          <table:table-cell table:formula="of:=[.C486]/[.B486]" office:value-type="float" office:value="1402.51572327044" calcext:value-type="float">
            <text:p>1402.51572327044</text:p>
          </table:table-cell>
          <table:table-cell table:formula="of:=1/[.D486]" office:value-type="float" office:value="0.0238095238095238" calcext:value-type="float">
            <text:p>0.0238095238095238</text:p>
          </table:table-cell>
          <table:table-cell table:formula="of:=LOG10([.E486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2" calcext:value-type="float">
            <text:p>42</text:p>
          </table:table-cell>
          <table:table-cell table:formula="of:=[.C487]/[.B487]" office:value-type="float" office:value="1051.88679245283" calcext:value-type="float">
            <text:p>1051.88679245283</text:p>
          </table:table-cell>
          <table:table-cell table:formula="of:=1/[.D487]" office:value-type="float" office:value="0.0238095238095238" calcext:value-type="float">
            <text:p>0.0238095238095238</text:p>
          </table:table-cell>
          <table:table-cell table:formula="of:=LOG10([.E487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88]/[.B488]" office:value-type="float" office:value="845.283018867925" calcext:value-type="float">
            <text:p>845.283018867925</text:p>
          </table:table-cell>
          <table:table-cell table:formula="of:=1/[.D488]" office:value-type="float" office:value="0.0238095238095238" calcext:value-type="float">
            <text:p>0.0238095238095238</text:p>
          </table:table-cell>
          <table:table-cell table:formula="of:=LOG10([.E48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89]/[.B489]" office:value-type="float" office:value="603.77358490566" calcext:value-type="float">
            <text:p>603.77358490566</text:p>
          </table:table-cell>
          <table:table-cell table:formula="of:=1/[.D489]" office:value-type="float" office:value="0.0238095238095238" calcext:value-type="float">
            <text:p>0.0238095238095238</text:p>
          </table:table-cell>
          <table:table-cell table:formula="of:=LOG10([.E48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90]/[.B490]" office:value-type="float" office:value="528.301886792453" calcext:value-type="float">
            <text:p>528.301886792453</text:p>
          </table:table-cell>
          <table:table-cell table:formula="of:=1/[.D490]" office:value-type="float" office:value="0.0238095238095238" calcext:value-type="float">
            <text:p>0.0238095238095238</text:p>
          </table:table-cell>
          <table:table-cell table:formula="of:=LOG10([.E49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91]/[.B491]" office:value-type="float" office:value="603.77358490566" calcext:value-type="float">
            <text:p>603.77358490566</text:p>
          </table:table-cell>
          <table:table-cell table:formula="of:=1/[.D491]" office:value-type="float" office:value="0.0238095238095238" calcext:value-type="float">
            <text:p>0.0238095238095238</text:p>
          </table:table-cell>
          <table:table-cell table:formula="of:=LOG10([.E49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92]/[.B492]" office:value-type="float" office:value="603.77358490566" calcext:value-type="float">
            <text:p>603.77358490566</text:p>
          </table:table-cell>
          <table:table-cell table:formula="of:=1/[.D492]" office:value-type="float" office:value="0.0238095238095238" calcext:value-type="float">
            <text:p>0.0238095238095238</text:p>
          </table:table-cell>
          <table:table-cell table:formula="of:=LOG10([.E49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93]/[.B493]" office:value-type="float" office:value="704.402515723271" calcext:value-type="float">
            <text:p>704.402515723271</text:p>
          </table:table-cell>
          <table:table-cell table:formula="of:=1/[.D493]" office:value-type="float" office:value="0.0238095238095238" calcext:value-type="float">
            <text:p>0.0238095238095238</text:p>
          </table:table-cell>
          <table:table-cell table:formula="of:=LOG10([.E49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94]/[.B494]" office:value-type="float" office:value="845.283018867925" calcext:value-type="float">
            <text:p>845.283018867925</text:p>
          </table:table-cell>
          <table:table-cell table:formula="of:=1/[.D494]" office:value-type="float" office:value="0.0238095238095238" calcext:value-type="float">
            <text:p>0.0238095238095238</text:p>
          </table:table-cell>
          <table:table-cell table:formula="of:=LOG10([.E49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2" calcext:value-type="float">
            <text:p>42</text:p>
          </table:table-cell>
          <table:table-cell table:formula="of:=[.C495]/[.B495]" office:value-type="float" office:value="845.283018867925" calcext:value-type="float">
            <text:p>845.283018867925</text:p>
          </table:table-cell>
          <table:table-cell table:formula="of:=1/[.D495]" office:value-type="float" office:value="0.0238095238095238" calcext:value-type="float">
            <text:p>0.0238095238095238</text:p>
          </table:table-cell>
          <table:table-cell table:formula="of:=LOG10([.E49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9" calcext:value-type="float">
            <text:p>41.9</text:p>
          </table:table-cell>
          <table:table-cell table:formula="of:=[.C496]/[.B496]" office:value-type="float" office:value="845.283018867925" calcext:value-type="float">
            <text:p>845.283018867925</text:p>
          </table:table-cell>
          <table:table-cell table:formula="of:=1/[.D496]" office:value-type="float" office:value="0.0238663484486874" calcext:value-type="float">
            <text:p>0.0238663484486874</text:p>
          </table:table-cell>
          <table:table-cell table:formula="of:=LOG10([.E49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9" calcext:value-type="float">
            <text:p>41.9</text:p>
          </table:table-cell>
          <table:table-cell table:formula="of:=[.C497]/[.B497]" office:value-type="float" office:value="845.283018867925" calcext:value-type="float">
            <text:p>845.283018867925</text:p>
          </table:table-cell>
          <table:table-cell table:formula="of:=1/[.D497]" office:value-type="float" office:value="0.0238663484486874" calcext:value-type="float">
            <text:p>0.0238663484486874</text:p>
          </table:table-cell>
          <table:table-cell table:formula="of:=LOG10([.E49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1.9" calcext:value-type="float">
            <text:p>41.9</text:p>
          </table:table-cell>
          <table:table-cell table:formula="of:=[.C498]/[.B498]" office:value-type="float" office:value="601.078167115903" calcext:value-type="float">
            <text:p>601.078167115903</text:p>
          </table:table-cell>
          <table:table-cell table:formula="of:=1/[.D498]" office:value-type="float" office:value="0.0238663484486874" calcext:value-type="float">
            <text:p>0.0238663484486874</text:p>
          </table:table-cell>
          <table:table-cell table:formula="of:=LOG10([.E498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9" calcext:value-type="float">
            <text:p>41.9</text:p>
          </table:table-cell>
          <table:table-cell table:formula="of:=[.C499]/[.B499]" office:value-type="float" office:value="704.402515723271" calcext:value-type="float">
            <text:p>704.402515723271</text:p>
          </table:table-cell>
          <table:table-cell table:formula="of:=1/[.D499]" office:value-type="float" office:value="0.0238663484486874" calcext:value-type="float">
            <text:p>0.0238663484486874</text:p>
          </table:table-cell>
          <table:table-cell table:formula="of:=LOG10([.E49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9" calcext:value-type="float">
            <text:p>41.9</text:p>
          </table:table-cell>
          <table:table-cell table:formula="of:=[.C500]/[.B500]" office:value-type="float" office:value="603.77358490566" calcext:value-type="float">
            <text:p>603.77358490566</text:p>
          </table:table-cell>
          <table:table-cell table:formula="of:=1/[.D500]" office:value-type="float" office:value="0.0238663484486874" calcext:value-type="float">
            <text:p>0.0238663484486874</text:p>
          </table:table-cell>
          <table:table-cell table:formula="of:=LOG10([.E50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9" calcext:value-type="float">
            <text:p>41.9</text:p>
          </table:table-cell>
          <table:table-cell table:formula="of:=[.C501]/[.B501]" office:value-type="float" office:value="603.77358490566" calcext:value-type="float">
            <text:p>603.77358490566</text:p>
          </table:table-cell>
          <table:table-cell table:formula="of:=1/[.D501]" office:value-type="float" office:value="0.0238663484486874" calcext:value-type="float">
            <text:p>0.0238663484486874</text:p>
          </table:table-cell>
          <table:table-cell table:formula="of:=LOG10([.E50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9" calcext:value-type="float">
            <text:p>41.9</text:p>
          </table:table-cell>
          <table:table-cell table:formula="of:=[.C502]/[.B502]" office:value-type="float" office:value="603.77358490566" calcext:value-type="float">
            <text:p>603.77358490566</text:p>
          </table:table-cell>
          <table:table-cell table:formula="of:=1/[.D502]" office:value-type="float" office:value="0.0238663484486874" calcext:value-type="float">
            <text:p>0.0238663484486874</text:p>
          </table:table-cell>
          <table:table-cell table:formula="of:=LOG10([.E50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1.9" calcext:value-type="float">
            <text:p>41.9</text:p>
          </table:table-cell>
          <table:table-cell table:formula="of:=[.C503]/[.B503]" office:value-type="float" office:value="1402.51572327044" calcext:value-type="float">
            <text:p>1402.51572327044</text:p>
          </table:table-cell>
          <table:table-cell table:formula="of:=1/[.D503]" office:value-type="float" office:value="0.0238663484486874" calcext:value-type="float">
            <text:p>0.0238663484486874</text:p>
          </table:table-cell>
          <table:table-cell table:formula="of:=LOG10([.E503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04]/[.B504]" office:value-type="float" office:value="1056.60377358491" calcext:value-type="float">
            <text:p>1056.60377358491</text:p>
          </table:table-cell>
          <table:table-cell table:formula="of:=1/[.D504]" office:value-type="float" office:value="0.0239234449760766" calcext:value-type="float">
            <text:p>0.0239234449760766</text:p>
          </table:table-cell>
          <table:table-cell table:formula="of:=LOG10([.E50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05]/[.B505]" office:value-type="float" office:value="469.601677148847" calcext:value-type="float">
            <text:p>469.601677148847</text:p>
          </table:table-cell>
          <table:table-cell table:formula="of:=1/[.D505]" office:value-type="float" office:value="0.0239234449760766" calcext:value-type="float">
            <text:p>0.0239234449760766</text:p>
          </table:table-cell>
          <table:table-cell table:formula="of:=LOG10([.E50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53" calcext:value-type="float">
            <text:p>0.0053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06]/[.B506]" office:value-type="float" office:value="422.641509433962" calcext:value-type="float">
            <text:p>422.641509433962</text:p>
          </table:table-cell>
          <table:table-cell table:formula="of:=1/[.D506]" office:value-type="float" office:value="0.0239234449760766" calcext:value-type="float">
            <text:p>0.0239234449760766</text:p>
          </table:table-cell>
          <table:table-cell table:formula="of:=LOG10([.E506])" office:value-type="float" office:value="2.62597214873337" calcext:value-type="float">
            <text:p>2.6259721487333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07]/[.B507]" office:value-type="float" office:value="845.283018867925" calcext:value-type="float">
            <text:p>845.283018867925</text:p>
          </table:table-cell>
          <table:table-cell table:formula="of:=1/[.D507]" office:value-type="float" office:value="0.0239234449760766" calcext:value-type="float">
            <text:p>0.0239234449760766</text:p>
          </table:table-cell>
          <table:table-cell table:formula="of:=LOG10([.E50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08]/[.B508]" office:value-type="float" office:value="845.283018867925" calcext:value-type="float">
            <text:p>845.283018867925</text:p>
          </table:table-cell>
          <table:table-cell table:formula="of:=1/[.D508]" office:value-type="float" office:value="0.0239234449760766" calcext:value-type="float">
            <text:p>0.0239234449760766</text:p>
          </table:table-cell>
          <table:table-cell table:formula="of:=LOG10([.E50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09]/[.B509]" office:value-type="float" office:value="845.283018867925" calcext:value-type="float">
            <text:p>845.283018867925</text:p>
          </table:table-cell>
          <table:table-cell table:formula="of:=1/[.D509]" office:value-type="float" office:value="0.0239234449760766" calcext:value-type="float">
            <text:p>0.0239234449760766</text:p>
          </table:table-cell>
          <table:table-cell table:formula="of:=LOG10([.E50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10]/[.B510]" office:value-type="float" office:value="603.77358490566" calcext:value-type="float">
            <text:p>603.77358490566</text:p>
          </table:table-cell>
          <table:table-cell table:formula="of:=1/[.D510]" office:value-type="float" office:value="0.0239234449760766" calcext:value-type="float">
            <text:p>0.0239234449760766</text:p>
          </table:table-cell>
          <table:table-cell table:formula="of:=LOG10([.E51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11]/[.B511]" office:value-type="float" office:value="845.283018867925" calcext:value-type="float">
            <text:p>845.283018867925</text:p>
          </table:table-cell>
          <table:table-cell table:formula="of:=1/[.D511]" office:value-type="float" office:value="0.0239234449760766" calcext:value-type="float">
            <text:p>0.0239234449760766</text:p>
          </table:table-cell>
          <table:table-cell table:formula="of:=LOG10([.E51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12]/[.B512]" office:value-type="float" office:value="845.283018867925" calcext:value-type="float">
            <text:p>845.283018867925</text:p>
          </table:table-cell>
          <table:table-cell table:formula="of:=1/[.D512]" office:value-type="float" office:value="0.0239234449760766" calcext:value-type="float">
            <text:p>0.0239234449760766</text:p>
          </table:table-cell>
          <table:table-cell table:formula="of:=LOG10([.E51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1.8" calcext:value-type="float">
            <text:p>41.8</text:p>
          </table:table-cell>
          <table:table-cell table:formula="of:=[.C513]/[.B513]" office:value-type="float" office:value="701.25786163522" calcext:value-type="float">
            <text:p>701.25786163522</text:p>
          </table:table-cell>
          <table:table-cell table:formula="of:=1/[.D513]" office:value-type="float" office:value="0.0239234449760766" calcext:value-type="float">
            <text:p>0.0239234449760766</text:p>
          </table:table-cell>
          <table:table-cell table:formula="of:=LOG10([.E513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1.8" calcext:value-type="float">
            <text:p>41.8</text:p>
          </table:table-cell>
          <table:table-cell table:formula="of:=[.C514]/[.B514]" office:value-type="float" office:value="841.509433962264" calcext:value-type="float">
            <text:p>841.509433962264</text:p>
          </table:table-cell>
          <table:table-cell table:formula="of:=1/[.D514]" office:value-type="float" office:value="0.0239234449760766" calcext:value-type="float">
            <text:p>0.0239234449760766</text:p>
          </table:table-cell>
          <table:table-cell table:formula="of:=LOG10([.E51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8" calcext:value-type="float">
            <text:p>41.8</text:p>
          </table:table-cell>
          <table:table-cell table:formula="of:=[.C515]/[.B515]" office:value-type="float" office:value="603.77358490566" calcext:value-type="float">
            <text:p>603.77358490566</text:p>
          </table:table-cell>
          <table:table-cell table:formula="of:=1/[.D515]" office:value-type="float" office:value="0.0239234449760766" calcext:value-type="float">
            <text:p>0.0239234449760766</text:p>
          </table:table-cell>
          <table:table-cell table:formula="of:=LOG10([.E51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41.7" calcext:value-type="float">
            <text:p>41.7</text:p>
          </table:table-cell>
          <table:table-cell table:formula="of:=[.C516]/[.B516]" office:value-type="float" office:value="601.078167115903" calcext:value-type="float">
            <text:p>601.078167115903</text:p>
          </table:table-cell>
          <table:table-cell table:formula="of:=1/[.D516]" office:value-type="float" office:value="0.0239808153477218" calcext:value-type="float">
            <text:p>0.0239808153477218</text:p>
          </table:table-cell>
          <table:table-cell table:formula="of:=LOG10([.E516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1.7" calcext:value-type="float">
            <text:p>41.7</text:p>
          </table:table-cell>
          <table:table-cell table:formula="of:=[.C517]/[.B517]" office:value-type="float" office:value="1051.88679245283" calcext:value-type="float">
            <text:p>1051.88679245283</text:p>
          </table:table-cell>
          <table:table-cell table:formula="of:=1/[.D517]" office:value-type="float" office:value="0.0239808153477218" calcext:value-type="float">
            <text:p>0.0239808153477218</text:p>
          </table:table-cell>
          <table:table-cell table:formula="of:=LOG10([.E517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18]/[.B518]" office:value-type="float" office:value="845.283018867925" calcext:value-type="float">
            <text:p>845.283018867925</text:p>
          </table:table-cell>
          <table:table-cell table:formula="of:=1/[.D518]" office:value-type="float" office:value="0.0239808153477218" calcext:value-type="float">
            <text:p>0.0239808153477218</text:p>
          </table:table-cell>
          <table:table-cell table:formula="of:=LOG10([.E51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19]/[.B519]" office:value-type="float" office:value="528.301886792453" calcext:value-type="float">
            <text:p>528.301886792453</text:p>
          </table:table-cell>
          <table:table-cell table:formula="of:=1/[.D519]" office:value-type="float" office:value="0.0239808153477218" calcext:value-type="float">
            <text:p>0.0239808153477218</text:p>
          </table:table-cell>
          <table:table-cell table:formula="of:=LOG10([.E519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0]/[.B520]" office:value-type="float" office:value="845.283018867925" calcext:value-type="float">
            <text:p>845.283018867925</text:p>
          </table:table-cell>
          <table:table-cell table:formula="of:=1/[.D520]" office:value-type="float" office:value="0.0239808153477218" calcext:value-type="float">
            <text:p>0.0239808153477218</text:p>
          </table:table-cell>
          <table:table-cell table:formula="of:=LOG10([.E52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1]/[.B521]" office:value-type="float" office:value="845.283018867925" calcext:value-type="float">
            <text:p>845.283018867925</text:p>
          </table:table-cell>
          <table:table-cell table:formula="of:=1/[.D521]" office:value-type="float" office:value="0.0239808153477218" calcext:value-type="float">
            <text:p>0.0239808153477218</text:p>
          </table:table-cell>
          <table:table-cell table:formula="of:=LOG10([.E52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2]/[.B522]" office:value-type="float" office:value="845.283018867925" calcext:value-type="float">
            <text:p>845.283018867925</text:p>
          </table:table-cell>
          <table:table-cell table:formula="of:=1/[.D522]" office:value-type="float" office:value="0.0239808153477218" calcext:value-type="float">
            <text:p>0.0239808153477218</text:p>
          </table:table-cell>
          <table:table-cell table:formula="of:=LOG10([.E52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3]/[.B523]" office:value-type="float" office:value="704.402515723271" calcext:value-type="float">
            <text:p>704.402515723271</text:p>
          </table:table-cell>
          <table:table-cell table:formula="of:=1/[.D523]" office:value-type="float" office:value="0.0239808153477218" calcext:value-type="float">
            <text:p>0.0239808153477218</text:p>
          </table:table-cell>
          <table:table-cell table:formula="of:=LOG10([.E52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4]/[.B524]" office:value-type="float" office:value="704.402515723271" calcext:value-type="float">
            <text:p>704.402515723271</text:p>
          </table:table-cell>
          <table:table-cell table:formula="of:=1/[.D524]" office:value-type="float" office:value="0.0239808153477218" calcext:value-type="float">
            <text:p>0.0239808153477218</text:p>
          </table:table-cell>
          <table:table-cell table:formula="of:=LOG10([.E52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5]/[.B525]" office:value-type="float" office:value="1056.60377358491" calcext:value-type="float">
            <text:p>1056.60377358491</text:p>
          </table:table-cell>
          <table:table-cell table:formula="of:=1/[.D525]" office:value-type="float" office:value="0.0239808153477218" calcext:value-type="float">
            <text:p>0.0239808153477218</text:p>
          </table:table-cell>
          <table:table-cell table:formula="of:=LOG10([.E52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7" calcext:value-type="float">
            <text:p>41.7</text:p>
          </table:table-cell>
          <table:table-cell table:formula="of:=[.C526]/[.B526]" office:value-type="float" office:value="704.402515723271" calcext:value-type="float">
            <text:p>704.402515723271</text:p>
          </table:table-cell>
          <table:table-cell table:formula="of:=1/[.D526]" office:value-type="float" office:value="0.0239808153477218" calcext:value-type="float">
            <text:p>0.0239808153477218</text:p>
          </table:table-cell>
          <table:table-cell table:formula="of:=LOG10([.E52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27]/[.B527]" office:value-type="float" office:value="1056.60377358491" calcext:value-type="float">
            <text:p>1056.60377358491</text:p>
          </table:table-cell>
          <table:table-cell table:formula="of:=1/[.D527]" office:value-type="float" office:value="0.0240384615384615" calcext:value-type="float">
            <text:p>0.0240384615384615</text:p>
          </table:table-cell>
          <table:table-cell table:formula="of:=LOG10([.E52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1.6" calcext:value-type="float">
            <text:p>41.6</text:p>
          </table:table-cell>
          <table:table-cell table:formula="of:=[.C528]/[.B528]" office:value-type="float" office:value="841.509433962264" calcext:value-type="float">
            <text:p>841.509433962264</text:p>
          </table:table-cell>
          <table:table-cell table:formula="of:=1/[.D528]" office:value-type="float" office:value="0.0240384615384615" calcext:value-type="float">
            <text:p>0.0240384615384615</text:p>
          </table:table-cell>
          <table:table-cell table:formula="of:=LOG10([.E528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29]/[.B529]" office:value-type="float" office:value="1408.80503144654" calcext:value-type="float">
            <text:p>1408.80503144654</text:p>
          </table:table-cell>
          <table:table-cell table:formula="of:=1/[.D529]" office:value-type="float" office:value="0.0240384615384615" calcext:value-type="float">
            <text:p>0.0240384615384615</text:p>
          </table:table-cell>
          <table:table-cell table:formula="of:=LOG10([.E52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3" calcext:value-type="float">
            <text:p>2.23</text:p>
          </table:table-cell>
          <table:table-cell office:value-type="float" office:value="41.6" calcext:value-type="float">
            <text:p>41.6</text:p>
          </table:table-cell>
          <table:table-cell table:formula="of:=[.C530]/[.B530]" office:value-type="float" office:value="2103.77358490566" calcext:value-type="float">
            <text:p>2103.77358490566</text:p>
          </table:table-cell>
          <table:table-cell table:formula="of:=1/[.D530]" office:value-type="float" office:value="0.0240384615384615" calcext:value-type="float">
            <text:p>0.0240384615384615</text:p>
          </table:table-cell>
          <table:table-cell table:formula="of:=LOG10([.E530])" office:value-type="float" office:value="3.32299899778339" calcext:value-type="float">
            <text:p>3.3229989977833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31]/[.B531]" office:value-type="float" office:value="603.77358490566" calcext:value-type="float">
            <text:p>603.77358490566</text:p>
          </table:table-cell>
          <table:table-cell table:formula="of:=1/[.D531]" office:value-type="float" office:value="0.0240384615384615" calcext:value-type="float">
            <text:p>0.0240384615384615</text:p>
          </table:table-cell>
          <table:table-cell table:formula="of:=LOG10([.E53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32]/[.B532]" office:value-type="float" office:value="1408.80503144654" calcext:value-type="float">
            <text:p>1408.80503144654</text:p>
          </table:table-cell>
          <table:table-cell table:formula="of:=1/[.D532]" office:value-type="float" office:value="0.0240384615384615" calcext:value-type="float">
            <text:p>0.0240384615384615</text:p>
          </table:table-cell>
          <table:table-cell table:formula="of:=LOG10([.E53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33]/[.B533]" office:value-type="float" office:value="528.301886792453" calcext:value-type="float">
            <text:p>528.301886792453</text:p>
          </table:table-cell>
          <table:table-cell table:formula="of:=1/[.D533]" office:value-type="float" office:value="0.0240384615384615" calcext:value-type="float">
            <text:p>0.0240384615384615</text:p>
          </table:table-cell>
          <table:table-cell table:formula="of:=LOG10([.E53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34]/[.B534]" office:value-type="float" office:value="603.77358490566" calcext:value-type="float">
            <text:p>603.77358490566</text:p>
          </table:table-cell>
          <table:table-cell table:formula="of:=1/[.D534]" office:value-type="float" office:value="0.0240384615384615" calcext:value-type="float">
            <text:p>0.0240384615384615</text:p>
          </table:table-cell>
          <table:table-cell table:formula="of:=LOG10([.E53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35]/[.B535]" office:value-type="float" office:value="704.402515723271" calcext:value-type="float">
            <text:p>704.402515723271</text:p>
          </table:table-cell>
          <table:table-cell table:formula="of:=1/[.D535]" office:value-type="float" office:value="0.0240384615384615" calcext:value-type="float">
            <text:p>0.0240384615384615</text:p>
          </table:table-cell>
          <table:table-cell table:formula="of:=LOG10([.E53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6" calcext:value-type="float">
            <text:p>41.6</text:p>
          </table:table-cell>
          <table:table-cell table:formula="of:=[.C536]/[.B536]" office:value-type="float" office:value="845.283018867925" calcext:value-type="float">
            <text:p>845.283018867925</text:p>
          </table:table-cell>
          <table:table-cell table:formula="of:=1/[.D536]" office:value-type="float" office:value="0.0240384615384615" calcext:value-type="float">
            <text:p>0.0240384615384615</text:p>
          </table:table-cell>
          <table:table-cell table:formula="of:=LOG10([.E53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37]/[.B537]" office:value-type="float" office:value="704.402515723271" calcext:value-type="float">
            <text:p>704.402515723271</text:p>
          </table:table-cell>
          <table:table-cell table:formula="of:=1/[.D537]" office:value-type="float" office:value="0.0240963855421687" calcext:value-type="float">
            <text:p>0.0240963855421687</text:p>
          </table:table-cell>
          <table:table-cell table:formula="of:=LOG10([.E53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38]/[.B538]" office:value-type="float" office:value="704.402515723271" calcext:value-type="float">
            <text:p>704.402515723271</text:p>
          </table:table-cell>
          <table:table-cell table:formula="of:=1/[.D538]" office:value-type="float" office:value="0.0240963855421687" calcext:value-type="float">
            <text:p>0.0240963855421687</text:p>
          </table:table-cell>
          <table:table-cell table:formula="of:=LOG10([.E53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39]/[.B539]" office:value-type="float" office:value="528.301886792453" calcext:value-type="float">
            <text:p>528.301886792453</text:p>
          </table:table-cell>
          <table:table-cell table:formula="of:=1/[.D539]" office:value-type="float" office:value="0.0240963855421687" calcext:value-type="float">
            <text:p>0.0240963855421687</text:p>
          </table:table-cell>
          <table:table-cell table:formula="of:=LOG10([.E539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0]/[.B540]" office:value-type="float" office:value="704.402515723271" calcext:value-type="float">
            <text:p>704.402515723271</text:p>
          </table:table-cell>
          <table:table-cell table:formula="of:=1/[.D540]" office:value-type="float" office:value="0.0240963855421687" calcext:value-type="float">
            <text:p>0.0240963855421687</text:p>
          </table:table-cell>
          <table:table-cell table:formula="of:=LOG10([.E54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1]/[.B541]" office:value-type="float" office:value="845.283018867925" calcext:value-type="float">
            <text:p>845.283018867925</text:p>
          </table:table-cell>
          <table:table-cell table:formula="of:=1/[.D541]" office:value-type="float" office:value="0.0240963855421687" calcext:value-type="float">
            <text:p>0.0240963855421687</text:p>
          </table:table-cell>
          <table:table-cell table:formula="of:=LOG10([.E54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2]/[.B542]" office:value-type="float" office:value="704.402515723271" calcext:value-type="float">
            <text:p>704.402515723271</text:p>
          </table:table-cell>
          <table:table-cell table:formula="of:=1/[.D542]" office:value-type="float" office:value="0.0240963855421687" calcext:value-type="float">
            <text:p>0.0240963855421687</text:p>
          </table:table-cell>
          <table:table-cell table:formula="of:=LOG10([.E54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3]/[.B543]" office:value-type="float" office:value="603.77358490566" calcext:value-type="float">
            <text:p>603.77358490566</text:p>
          </table:table-cell>
          <table:table-cell table:formula="of:=1/[.D543]" office:value-type="float" office:value="0.0240963855421687" calcext:value-type="float">
            <text:p>0.0240963855421687</text:p>
          </table:table-cell>
          <table:table-cell table:formula="of:=LOG10([.E54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4]/[.B544]" office:value-type="float" office:value="845.283018867925" calcext:value-type="float">
            <text:p>845.283018867925</text:p>
          </table:table-cell>
          <table:table-cell table:formula="of:=1/[.D544]" office:value-type="float" office:value="0.0240963855421687" calcext:value-type="float">
            <text:p>0.0240963855421687</text:p>
          </table:table-cell>
          <table:table-cell table:formula="of:=LOG10([.E54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5]/[.B545]" office:value-type="float" office:value="704.402515723271" calcext:value-type="float">
            <text:p>704.402515723271</text:p>
          </table:table-cell>
          <table:table-cell table:formula="of:=1/[.D545]" office:value-type="float" office:value="0.0240963855421687" calcext:value-type="float">
            <text:p>0.0240963855421687</text:p>
          </table:table-cell>
          <table:table-cell table:formula="of:=LOG10([.E54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6]/[.B546]" office:value-type="float" office:value="845.283018867925" calcext:value-type="float">
            <text:p>845.283018867925</text:p>
          </table:table-cell>
          <table:table-cell table:formula="of:=1/[.D546]" office:value-type="float" office:value="0.0240963855421687" calcext:value-type="float">
            <text:p>0.0240963855421687</text:p>
          </table:table-cell>
          <table:table-cell table:formula="of:=LOG10([.E54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 table:formula="of:=[.C547]/[.B547]" office:value-type="float" office:value="845.283018867925" calcext:value-type="float">
            <text:p>845.283018867925</text:p>
          </table:table-cell>
          <table:table-cell table:formula="of:=1/[.D547]" office:value-type="float" office:value="0.0240963855421687" calcext:value-type="float">
            <text:p>0.0240963855421687</text:p>
          </table:table-cell>
          <table:table-cell table:formula="of:=LOG10([.E54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48]/[.B548]" office:value-type="float" office:value="845.283018867925" calcext:value-type="float">
            <text:p>845.283018867925</text:p>
          </table:table-cell>
          <table:table-cell table:formula="of:=1/[.D548]" office:value-type="float" office:value="0.0241545893719807" calcext:value-type="float">
            <text:p>0.0241545893719807</text:p>
          </table:table-cell>
          <table:table-cell table:formula="of:=LOG10([.E54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49]/[.B549]" office:value-type="float" office:value="1056.60377358491" calcext:value-type="float">
            <text:p>1056.60377358491</text:p>
          </table:table-cell>
          <table:table-cell table:formula="of:=1/[.D549]" office:value-type="float" office:value="0.0241545893719807" calcext:value-type="float">
            <text:p>0.0241545893719807</text:p>
          </table:table-cell>
          <table:table-cell table:formula="of:=LOG10([.E54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50]/[.B550]" office:value-type="float" office:value="603.77358490566" calcext:value-type="float">
            <text:p>603.77358490566</text:p>
          </table:table-cell>
          <table:table-cell table:formula="of:=1/[.D550]" office:value-type="float" office:value="0.0241545893719807" calcext:value-type="float">
            <text:p>0.0241545893719807</text:p>
          </table:table-cell>
          <table:table-cell table:formula="of:=LOG10([.E55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51]/[.B551]" office:value-type="float" office:value="704.402515723271" calcext:value-type="float">
            <text:p>704.402515723271</text:p>
          </table:table-cell>
          <table:table-cell table:formula="of:=1/[.D551]" office:value-type="float" office:value="0.0241545893719807" calcext:value-type="float">
            <text:p>0.0241545893719807</text:p>
          </table:table-cell>
          <table:table-cell table:formula="of:=LOG10([.E55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52]/[.B552]" office:value-type="float" office:value="845.283018867925" calcext:value-type="float">
            <text:p>845.283018867925</text:p>
          </table:table-cell>
          <table:table-cell table:formula="of:=1/[.D552]" office:value-type="float" office:value="0.0241545893719807" calcext:value-type="float">
            <text:p>0.0241545893719807</text:p>
          </table:table-cell>
          <table:table-cell table:formula="of:=LOG10([.E55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1.4" calcext:value-type="float">
            <text:p>41.4</text:p>
          </table:table-cell>
          <table:table-cell table:formula="of:=[.C553]/[.B553]" office:value-type="float" office:value="841.509433962264" calcext:value-type="float">
            <text:p>841.509433962264</text:p>
          </table:table-cell>
          <table:table-cell table:formula="of:=1/[.D553]" office:value-type="float" office:value="0.0241545893719807" calcext:value-type="float">
            <text:p>0.0241545893719807</text:p>
          </table:table-cell>
          <table:table-cell table:formula="of:=LOG10([.E553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54]/[.B554]" office:value-type="float" office:value="603.77358490566" calcext:value-type="float">
            <text:p>603.77358490566</text:p>
          </table:table-cell>
          <table:table-cell table:formula="of:=1/[.D554]" office:value-type="float" office:value="0.0241545893719807" calcext:value-type="float">
            <text:p>0.0241545893719807</text:p>
          </table:table-cell>
          <table:table-cell table:formula="of:=LOG10([.E55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55]/[.B555]" office:value-type="float" office:value="1056.60377358491" calcext:value-type="float">
            <text:p>1056.60377358491</text:p>
          </table:table-cell>
          <table:table-cell table:formula="of:=1/[.D555]" office:value-type="float" office:value="0.0241545893719807" calcext:value-type="float">
            <text:p>0.0241545893719807</text:p>
          </table:table-cell>
          <table:table-cell table:formula="of:=LOG10([.E55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4" calcext:value-type="float">
            <text:p>41.4</text:p>
          </table:table-cell>
          <table:table-cell table:formula="of:=[.C556]/[.B556]" office:value-type="float" office:value="845.283018867925" calcext:value-type="float">
            <text:p>845.283018867925</text:p>
          </table:table-cell>
          <table:table-cell table:formula="of:=1/[.D556]" office:value-type="float" office:value="0.0241545893719807" calcext:value-type="float">
            <text:p>0.0241545893719807</text:p>
          </table:table-cell>
          <table:table-cell table:formula="of:=LOG10([.E55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1.4" calcext:value-type="float">
            <text:p>41.4</text:p>
          </table:table-cell>
          <table:table-cell table:formula="of:=[.C557]/[.B557]" office:value-type="float" office:value="1051.88679245283" calcext:value-type="float">
            <text:p>1051.88679245283</text:p>
          </table:table-cell>
          <table:table-cell table:formula="of:=1/[.D557]" office:value-type="float" office:value="0.0241545893719807" calcext:value-type="float">
            <text:p>0.0241545893719807</text:p>
          </table:table-cell>
          <table:table-cell table:formula="of:=LOG10([.E557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58]/[.B558]" office:value-type="float" office:value="704.402515723271" calcext:value-type="float">
            <text:p>704.402515723271</text:p>
          </table:table-cell>
          <table:table-cell table:formula="of:=1/[.D558]" office:value-type="float" office:value="0.0242130750605327" calcext:value-type="float">
            <text:p>0.0242130750605327</text:p>
          </table:table-cell>
          <table:table-cell table:formula="of:=LOG10([.E55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59]/[.B559]" office:value-type="float" office:value="1408.80503144654" calcext:value-type="float">
            <text:p>1408.80503144654</text:p>
          </table:table-cell>
          <table:table-cell table:formula="of:=1/[.D559]" office:value-type="float" office:value="0.0242130750605327" calcext:value-type="float">
            <text:p>0.0242130750605327</text:p>
          </table:table-cell>
          <table:table-cell table:formula="of:=LOG10([.E55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0]/[.B560]" office:value-type="float" office:value="1056.60377358491" calcext:value-type="float">
            <text:p>1056.60377358491</text:p>
          </table:table-cell>
          <table:table-cell table:formula="of:=1/[.D560]" office:value-type="float" office:value="0.0242130750605327" calcext:value-type="float">
            <text:p>0.0242130750605327</text:p>
          </table:table-cell>
          <table:table-cell table:formula="of:=LOG10([.E56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1]/[.B561]" office:value-type="float" office:value="469.601677148847" calcext:value-type="float">
            <text:p>469.601677148847</text:p>
          </table:table-cell>
          <table:table-cell table:formula="of:=1/[.D561]" office:value-type="float" office:value="0.0242130750605327" calcext:value-type="float">
            <text:p>0.0242130750605327</text:p>
          </table:table-cell>
          <table:table-cell table:formula="of:=LOG10([.E561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2]/[.B562]" office:value-type="float" office:value="845.283018867925" calcext:value-type="float">
            <text:p>845.283018867925</text:p>
          </table:table-cell>
          <table:table-cell table:formula="of:=1/[.D562]" office:value-type="float" office:value="0.0242130750605327" calcext:value-type="float">
            <text:p>0.0242130750605327</text:p>
          </table:table-cell>
          <table:table-cell table:formula="of:=LOG10([.E56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1.3" calcext:value-type="float">
            <text:p>41.3</text:p>
          </table:table-cell>
          <table:table-cell table:formula="of:=[.C563]/[.B563]" office:value-type="float" office:value="841.509433962264" calcext:value-type="float">
            <text:p>841.509433962264</text:p>
          </table:table-cell>
          <table:table-cell table:formula="of:=1/[.D563]" office:value-type="float" office:value="0.0242130750605327" calcext:value-type="float">
            <text:p>0.0242130750605327</text:p>
          </table:table-cell>
          <table:table-cell table:formula="of:=LOG10([.E563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4]/[.B564]" office:value-type="float" office:value="845.283018867925" calcext:value-type="float">
            <text:p>845.283018867925</text:p>
          </table:table-cell>
          <table:table-cell table:formula="of:=1/[.D564]" office:value-type="float" office:value="0.0242130750605327" calcext:value-type="float">
            <text:p>0.0242130750605327</text:p>
          </table:table-cell>
          <table:table-cell table:formula="of:=LOG10([.E56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5]/[.B565]" office:value-type="float" office:value="845.283018867925" calcext:value-type="float">
            <text:p>845.283018867925</text:p>
          </table:table-cell>
          <table:table-cell table:formula="of:=1/[.D565]" office:value-type="float" office:value="0.0242130750605327" calcext:value-type="float">
            <text:p>0.0242130750605327</text:p>
          </table:table-cell>
          <table:table-cell table:formula="of:=LOG10([.E56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6]/[.B566]" office:value-type="float" office:value="704.402515723271" calcext:value-type="float">
            <text:p>704.402515723271</text:p>
          </table:table-cell>
          <table:table-cell table:formula="of:=1/[.D566]" office:value-type="float" office:value="0.0242130750605327" calcext:value-type="float">
            <text:p>0.0242130750605327</text:p>
          </table:table-cell>
          <table:table-cell table:formula="of:=LOG10([.E56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7]/[.B567]" office:value-type="float" office:value="704.402515723271" calcext:value-type="float">
            <text:p>704.402515723271</text:p>
          </table:table-cell>
          <table:table-cell table:formula="of:=1/[.D567]" office:value-type="float" office:value="0.0242130750605327" calcext:value-type="float">
            <text:p>0.0242130750605327</text:p>
          </table:table-cell>
          <table:table-cell table:formula="of:=LOG10([.E56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8]/[.B568]" office:value-type="float" office:value="704.402515723271" calcext:value-type="float">
            <text:p>704.402515723271</text:p>
          </table:table-cell>
          <table:table-cell table:formula="of:=1/[.D568]" office:value-type="float" office:value="0.0242130750605327" calcext:value-type="float">
            <text:p>0.0242130750605327</text:p>
          </table:table-cell>
          <table:table-cell table:formula="of:=LOG10([.E56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41.3" calcext:value-type="float">
            <text:p>41.3</text:p>
          </table:table-cell>
          <table:table-cell table:formula="of:=[.C569]/[.B569]" office:value-type="float" office:value="2113.20754716981" calcext:value-type="float">
            <text:p>2113.20754716981</text:p>
          </table:table-cell>
          <table:table-cell table:formula="of:=1/[.D569]" office:value-type="float" office:value="0.0242130750605327" calcext:value-type="float">
            <text:p>0.0242130750605327</text:p>
          </table:table-cell>
          <table:table-cell table:formula="of:=LOG10([.E569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0]/[.B570]" office:value-type="float" office:value="845.283018867925" calcext:value-type="float">
            <text:p>845.283018867925</text:p>
          </table:table-cell>
          <table:table-cell table:formula="of:=1/[.D570]" office:value-type="float" office:value="0.0242718446601942" calcext:value-type="float">
            <text:p>0.0242718446601942</text:p>
          </table:table-cell>
          <table:table-cell table:formula="of:=LOG10([.E57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1]/[.B571]" office:value-type="float" office:value="528.301886792453" calcext:value-type="float">
            <text:p>528.301886792453</text:p>
          </table:table-cell>
          <table:table-cell table:formula="of:=1/[.D571]" office:value-type="float" office:value="0.0242718446601942" calcext:value-type="float">
            <text:p>0.0242718446601942</text:p>
          </table:table-cell>
          <table:table-cell table:formula="of:=LOG10([.E571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2]/[.B572]" office:value-type="float" office:value="845.283018867925" calcext:value-type="float">
            <text:p>845.283018867925</text:p>
          </table:table-cell>
          <table:table-cell table:formula="of:=1/[.D572]" office:value-type="float" office:value="0.0242718446601942" calcext:value-type="float">
            <text:p>0.0242718446601942</text:p>
          </table:table-cell>
          <table:table-cell table:formula="of:=LOG10([.E57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3]/[.B573]" office:value-type="float" office:value="845.283018867925" calcext:value-type="float">
            <text:p>845.283018867925</text:p>
          </table:table-cell>
          <table:table-cell table:formula="of:=1/[.D573]" office:value-type="float" office:value="0.0242718446601942" calcext:value-type="float">
            <text:p>0.0242718446601942</text:p>
          </table:table-cell>
          <table:table-cell table:formula="of:=LOG10([.E57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4]/[.B574]" office:value-type="float" office:value="469.601677148847" calcext:value-type="float">
            <text:p>469.601677148847</text:p>
          </table:table-cell>
          <table:table-cell table:formula="of:=1/[.D574]" office:value-type="float" office:value="0.0242718446601942" calcext:value-type="float">
            <text:p>0.0242718446601942</text:p>
          </table:table-cell>
          <table:table-cell table:formula="of:=LOG10([.E574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5]/[.B575]" office:value-type="float" office:value="845.283018867925" calcext:value-type="float">
            <text:p>845.283018867925</text:p>
          </table:table-cell>
          <table:table-cell table:formula="of:=1/[.D575]" office:value-type="float" office:value="0.0242718446601942" calcext:value-type="float">
            <text:p>0.0242718446601942</text:p>
          </table:table-cell>
          <table:table-cell table:formula="of:=LOG10([.E57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6]/[.B576]" office:value-type="float" office:value="1056.60377358491" calcext:value-type="float">
            <text:p>1056.60377358491</text:p>
          </table:table-cell>
          <table:table-cell table:formula="of:=1/[.D576]" office:value-type="float" office:value="0.0242718446601942" calcext:value-type="float">
            <text:p>0.0242718446601942</text:p>
          </table:table-cell>
          <table:table-cell table:formula="of:=LOG10([.E57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7]/[.B577]" office:value-type="float" office:value="704.402515723271" calcext:value-type="float">
            <text:p>704.402515723271</text:p>
          </table:table-cell>
          <table:table-cell table:formula="of:=1/[.D577]" office:value-type="float" office:value="0.0242718446601942" calcext:value-type="float">
            <text:p>0.0242718446601942</text:p>
          </table:table-cell>
          <table:table-cell table:formula="of:=LOG10([.E57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78]/[.B578]" office:value-type="float" office:value="704.402515723271" calcext:value-type="float">
            <text:p>704.402515723271</text:p>
          </table:table-cell>
          <table:table-cell table:formula="of:=1/[.D578]" office:value-type="float" office:value="0.0242718446601942" calcext:value-type="float">
            <text:p>0.0242718446601942</text:p>
          </table:table-cell>
          <table:table-cell table:formula="of:=LOG10([.E57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41.2" calcext:value-type="float">
            <text:p>41.2</text:p>
          </table:table-cell>
          <table:table-cell table:formula="of:=[.C579]/[.B579]" office:value-type="float" office:value="4207.54716981132" calcext:value-type="float">
            <text:p>4207.54716981132</text:p>
          </table:table-cell>
          <table:table-cell table:formula="of:=1/[.D579]" office:value-type="float" office:value="0.0242718446601942" calcext:value-type="float">
            <text:p>0.0242718446601942</text:p>
          </table:table-cell>
          <table:table-cell table:formula="of:=LOG10([.E579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80]/[.B580]" office:value-type="float" office:value="704.402515723271" calcext:value-type="float">
            <text:p>704.402515723271</text:p>
          </table:table-cell>
          <table:table-cell table:formula="of:=1/[.D580]" office:value-type="float" office:value="0.0242718446601942" calcext:value-type="float">
            <text:p>0.0242718446601942</text:p>
          </table:table-cell>
          <table:table-cell table:formula="of:=LOG10([.E58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81]/[.B581]" office:value-type="float" office:value="1056.60377358491" calcext:value-type="float">
            <text:p>1056.60377358491</text:p>
          </table:table-cell>
          <table:table-cell table:formula="of:=1/[.D581]" office:value-type="float" office:value="0.0242718446601942" calcext:value-type="float">
            <text:p>0.0242718446601942</text:p>
          </table:table-cell>
          <table:table-cell table:formula="of:=LOG10([.E58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1.2" calcext:value-type="float">
            <text:p>41.2</text:p>
          </table:table-cell>
          <table:table-cell table:formula="of:=[.C582]/[.B582]" office:value-type="float" office:value="469.601677148847" calcext:value-type="float">
            <text:p>469.601677148847</text:p>
          </table:table-cell>
          <table:table-cell table:formula="of:=1/[.D582]" office:value-type="float" office:value="0.0242718446601942" calcext:value-type="float">
            <text:p>0.0242718446601942</text:p>
          </table:table-cell>
          <table:table-cell table:formula="of:=LOG10([.E582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3]/[.B583]" office:value-type="float" office:value="845.283018867925" calcext:value-type="float">
            <text:p>845.283018867925</text:p>
          </table:table-cell>
          <table:table-cell table:formula="of:=1/[.D583]" office:value-type="float" office:value="0.024330900243309" calcext:value-type="float">
            <text:p>0.024330900243309</text:p>
          </table:table-cell>
          <table:table-cell table:formula="of:=LOG10([.E58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4]/[.B584]" office:value-type="float" office:value="845.283018867925" calcext:value-type="float">
            <text:p>845.283018867925</text:p>
          </table:table-cell>
          <table:table-cell table:formula="of:=1/[.D584]" office:value-type="float" office:value="0.024330900243309" calcext:value-type="float">
            <text:p>0.024330900243309</text:p>
          </table:table-cell>
          <table:table-cell table:formula="of:=LOG10([.E58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5]/[.B585]" office:value-type="float" office:value="845.283018867925" calcext:value-type="float">
            <text:p>845.283018867925</text:p>
          </table:table-cell>
          <table:table-cell table:formula="of:=1/[.D585]" office:value-type="float" office:value="0.024330900243309" calcext:value-type="float">
            <text:p>0.024330900243309</text:p>
          </table:table-cell>
          <table:table-cell table:formula="of:=LOG10([.E58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6]/[.B586]" office:value-type="float" office:value="845.283018867925" calcext:value-type="float">
            <text:p>845.283018867925</text:p>
          </table:table-cell>
          <table:table-cell table:formula="of:=1/[.D586]" office:value-type="float" office:value="0.024330900243309" calcext:value-type="float">
            <text:p>0.024330900243309</text:p>
          </table:table-cell>
          <table:table-cell table:formula="of:=LOG10([.E58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7]/[.B587]" office:value-type="float" office:value="704.402515723271" calcext:value-type="float">
            <text:p>704.402515723271</text:p>
          </table:table-cell>
          <table:table-cell table:formula="of:=1/[.D587]" office:value-type="float" office:value="0.024330900243309" calcext:value-type="float">
            <text:p>0.024330900243309</text:p>
          </table:table-cell>
          <table:table-cell table:formula="of:=LOG10([.E58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8]/[.B588]" office:value-type="float" office:value="845.283018867925" calcext:value-type="float">
            <text:p>845.283018867925</text:p>
          </table:table-cell>
          <table:table-cell table:formula="of:=1/[.D588]" office:value-type="float" office:value="0.024330900243309" calcext:value-type="float">
            <text:p>0.024330900243309</text:p>
          </table:table-cell>
          <table:table-cell table:formula="of:=LOG10([.E58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89]/[.B589]" office:value-type="float" office:value="704.402515723271" calcext:value-type="float">
            <text:p>704.402515723271</text:p>
          </table:table-cell>
          <table:table-cell table:formula="of:=1/[.D589]" office:value-type="float" office:value="0.024330900243309" calcext:value-type="float">
            <text:p>0.024330900243309</text:p>
          </table:table-cell>
          <table:table-cell table:formula="of:=LOG10([.E58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90]/[.B590]" office:value-type="float" office:value="845.283018867925" calcext:value-type="float">
            <text:p>845.283018867925</text:p>
          </table:table-cell>
          <table:table-cell table:formula="of:=1/[.D590]" office:value-type="float" office:value="0.024330900243309" calcext:value-type="float">
            <text:p>0.024330900243309</text:p>
          </table:table-cell>
          <table:table-cell table:formula="of:=LOG10([.E59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91]/[.B591]" office:value-type="float" office:value="845.283018867925" calcext:value-type="float">
            <text:p>845.283018867925</text:p>
          </table:table-cell>
          <table:table-cell table:formula="of:=1/[.D591]" office:value-type="float" office:value="0.024330900243309" calcext:value-type="float">
            <text:p>0.024330900243309</text:p>
          </table:table-cell>
          <table:table-cell table:formula="of:=LOG10([.E59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.1" calcext:value-type="float">
            <text:p>41.1</text:p>
          </table:table-cell>
          <table:table-cell table:formula="of:=[.C592]/[.B592]" office:value-type="float" office:value="845.283018867925" calcext:value-type="float">
            <text:p>845.283018867925</text:p>
          </table:table-cell>
          <table:table-cell table:formula="of:=1/[.D592]" office:value-type="float" office:value="0.024330900243309" calcext:value-type="float">
            <text:p>0.024330900243309</text:p>
          </table:table-cell>
          <table:table-cell table:formula="of:=LOG10([.E59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593]/[.B593]" office:value-type="float" office:value="1056.60377358491" calcext:value-type="float">
            <text:p>1056.60377358491</text:p>
          </table:table-cell>
          <table:table-cell table:formula="of:=1/[.D593]" office:value-type="float" office:value="0.024390243902439" calcext:value-type="float">
            <text:p>0.024390243902439</text:p>
          </table:table-cell>
          <table:table-cell table:formula="of:=LOG10([.E59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594]/[.B594]" office:value-type="float" office:value="528.301886792453" calcext:value-type="float">
            <text:p>528.301886792453</text:p>
          </table:table-cell>
          <table:table-cell table:formula="of:=1/[.D594]" office:value-type="float" office:value="0.024390243902439" calcext:value-type="float">
            <text:p>0.024390243902439</text:p>
          </table:table-cell>
          <table:table-cell table:formula="of:=LOG10([.E594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595]/[.B595]" office:value-type="float" office:value="603.77358490566" calcext:value-type="float">
            <text:p>603.77358490566</text:p>
          </table:table-cell>
          <table:table-cell table:formula="of:=1/[.D595]" office:value-type="float" office:value="0.024390243902439" calcext:value-type="float">
            <text:p>0.024390243902439</text:p>
          </table:table-cell>
          <table:table-cell table:formula="of:=LOG10([.E59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1" calcext:value-type="float">
            <text:p>41</text:p>
          </table:table-cell>
          <table:table-cell table:formula="of:=[.C596]/[.B596]" office:value-type="float" office:value="841.509433962264" calcext:value-type="float">
            <text:p>841.509433962264</text:p>
          </table:table-cell>
          <table:table-cell table:formula="of:=1/[.D596]" office:value-type="float" office:value="0.024390243902439" calcext:value-type="float">
            <text:p>0.024390243902439</text:p>
          </table:table-cell>
          <table:table-cell table:formula="of:=LOG10([.E596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5" calcext:value-type="float">
            <text:p>2.25</text:p>
          </table:table-cell>
          <table:table-cell office:value-type="float" office:value="41" calcext:value-type="float">
            <text:p>41</text:p>
          </table:table-cell>
          <table:table-cell table:formula="of:=[.C597]/[.B597]" office:value-type="float" office:value="1061.32075471698" calcext:value-type="float">
            <text:p>1061.32075471698</text:p>
          </table:table-cell>
          <table:table-cell table:formula="of:=1/[.D597]" office:value-type="float" office:value="0.024390243902439" calcext:value-type="float">
            <text:p>0.024390243902439</text:p>
          </table:table-cell>
          <table:table-cell table:formula="of:=LOG10([.E597])" office:value-type="float" office:value="3.02584665718261" calcext:value-type="float">
            <text:p>3.0258466571826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598]/[.B598]" office:value-type="float" office:value="845.283018867925" calcext:value-type="float">
            <text:p>845.283018867925</text:p>
          </table:table-cell>
          <table:table-cell table:formula="of:=1/[.D598]" office:value-type="float" office:value="0.024390243902439" calcext:value-type="float">
            <text:p>0.024390243902439</text:p>
          </table:table-cell>
          <table:table-cell table:formula="of:=LOG10([.E59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599]/[.B599]" office:value-type="float" office:value="1408.80503144654" calcext:value-type="float">
            <text:p>1408.80503144654</text:p>
          </table:table-cell>
          <table:table-cell table:formula="of:=1/[.D599]" office:value-type="float" office:value="0.024390243902439" calcext:value-type="float">
            <text:p>0.024390243902439</text:p>
          </table:table-cell>
          <table:table-cell table:formula="of:=LOG10([.E59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600]/[.B600]" office:value-type="float" office:value="704.402515723271" calcext:value-type="float">
            <text:p>704.402515723271</text:p>
          </table:table-cell>
          <table:table-cell table:formula="of:=1/[.D600]" office:value-type="float" office:value="0.024390243902439" calcext:value-type="float">
            <text:p>0.024390243902439</text:p>
          </table:table-cell>
          <table:table-cell table:formula="of:=LOG10([.E60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601]/[.B601]" office:value-type="float" office:value="845.283018867925" calcext:value-type="float">
            <text:p>845.283018867925</text:p>
          </table:table-cell>
          <table:table-cell table:formula="of:=1/[.D601]" office:value-type="float" office:value="0.024390243902439" calcext:value-type="float">
            <text:p>0.024390243902439</text:p>
          </table:table-cell>
          <table:table-cell table:formula="of:=LOG10([.E60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602]/[.B602]" office:value-type="float" office:value="845.283018867925" calcext:value-type="float">
            <text:p>845.283018867925</text:p>
          </table:table-cell>
          <table:table-cell table:formula="of:=1/[.D602]" office:value-type="float" office:value="0.024390243902439" calcext:value-type="float">
            <text:p>0.024390243902439</text:p>
          </table:table-cell>
          <table:table-cell table:formula="of:=LOG10([.E60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603]/[.B603]" office:value-type="float" office:value="845.283018867925" calcext:value-type="float">
            <text:p>845.283018867925</text:p>
          </table:table-cell>
          <table:table-cell table:formula="of:=1/[.D603]" office:value-type="float" office:value="0.024390243902439" calcext:value-type="float">
            <text:p>0.024390243902439</text:p>
          </table:table-cell>
          <table:table-cell table:formula="of:=LOG10([.E60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1" calcext:value-type="float">
            <text:p>41</text:p>
          </table:table-cell>
          <table:table-cell table:formula="of:=[.C604]/[.B604]" office:value-type="float" office:value="1051.88679245283" calcext:value-type="float">
            <text:p>1051.88679245283</text:p>
          </table:table-cell>
          <table:table-cell table:formula="of:=1/[.D604]" office:value-type="float" office:value="0.024390243902439" calcext:value-type="float">
            <text:p>0.024390243902439</text:p>
          </table:table-cell>
          <table:table-cell table:formula="of:=LOG10([.E604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605]/[.B605]" office:value-type="float" office:value="1056.60377358491" calcext:value-type="float">
            <text:p>1056.60377358491</text:p>
          </table:table-cell>
          <table:table-cell table:formula="of:=1/[.D605]" office:value-type="float" office:value="0.024390243902439" calcext:value-type="float">
            <text:p>0.024390243902439</text:p>
          </table:table-cell>
          <table:table-cell table:formula="of:=LOG10([.E60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 table:formula="of:=[.C606]/[.B606]" office:value-type="float" office:value="845.283018867925" calcext:value-type="float">
            <text:p>845.283018867925</text:p>
          </table:table-cell>
          <table:table-cell table:formula="of:=1/[.D606]" office:value-type="float" office:value="0.024390243902439" calcext:value-type="float">
            <text:p>0.024390243902439</text:p>
          </table:table-cell>
          <table:table-cell table:formula="of:=LOG10([.E60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07]/[.B607]" office:value-type="float" office:value="845.283018867925" calcext:value-type="float">
            <text:p>845.283018867925</text:p>
          </table:table-cell>
          <table:table-cell table:formula="of:=1/[.D607]" office:value-type="float" office:value="0.0244498777506113" calcext:value-type="float">
            <text:p>0.0244498777506113</text:p>
          </table:table-cell>
          <table:table-cell table:formula="of:=LOG10([.E60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08]/[.B608]" office:value-type="float" office:value="704.402515723271" calcext:value-type="float">
            <text:p>704.402515723271</text:p>
          </table:table-cell>
          <table:table-cell table:formula="of:=1/[.D608]" office:value-type="float" office:value="0.0244498777506113" calcext:value-type="float">
            <text:p>0.0244498777506113</text:p>
          </table:table-cell>
          <table:table-cell table:formula="of:=LOG10([.E60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09]/[.B609]" office:value-type="float" office:value="704.402515723271" calcext:value-type="float">
            <text:p>704.402515723271</text:p>
          </table:table-cell>
          <table:table-cell table:formula="of:=1/[.D609]" office:value-type="float" office:value="0.0244498777506113" calcext:value-type="float">
            <text:p>0.0244498777506113</text:p>
          </table:table-cell>
          <table:table-cell table:formula="of:=LOG10([.E60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0]/[.B610]" office:value-type="float" office:value="1056.60377358491" calcext:value-type="float">
            <text:p>1056.60377358491</text:p>
          </table:table-cell>
          <table:table-cell table:formula="of:=1/[.D610]" office:value-type="float" office:value="0.0244498777506113" calcext:value-type="float">
            <text:p>0.0244498777506113</text:p>
          </table:table-cell>
          <table:table-cell table:formula="of:=LOG10([.E61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1]/[.B611]" office:value-type="float" office:value="845.283018867925" calcext:value-type="float">
            <text:p>845.283018867925</text:p>
          </table:table-cell>
          <table:table-cell table:formula="of:=1/[.D611]" office:value-type="float" office:value="0.0244498777506113" calcext:value-type="float">
            <text:p>0.0244498777506113</text:p>
          </table:table-cell>
          <table:table-cell table:formula="of:=LOG10([.E61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2]/[.B612]" office:value-type="float" office:value="704.402515723271" calcext:value-type="float">
            <text:p>704.402515723271</text:p>
          </table:table-cell>
          <table:table-cell table:formula="of:=1/[.D612]" office:value-type="float" office:value="0.0244498777506113" calcext:value-type="float">
            <text:p>0.0244498777506113</text:p>
          </table:table-cell>
          <table:table-cell table:formula="of:=LOG10([.E61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3]/[.B613]" office:value-type="float" office:value="845.283018867925" calcext:value-type="float">
            <text:p>845.283018867925</text:p>
          </table:table-cell>
          <table:table-cell table:formula="of:=1/[.D613]" office:value-type="float" office:value="0.0244498777506113" calcext:value-type="float">
            <text:p>0.0244498777506113</text:p>
          </table:table-cell>
          <table:table-cell table:formula="of:=LOG10([.E61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4]/[.B614]" office:value-type="float" office:value="845.283018867925" calcext:value-type="float">
            <text:p>845.283018867925</text:p>
          </table:table-cell>
          <table:table-cell table:formula="of:=1/[.D614]" office:value-type="float" office:value="0.0244498777506113" calcext:value-type="float">
            <text:p>0.0244498777506113</text:p>
          </table:table-cell>
          <table:table-cell table:formula="of:=LOG10([.E61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5]/[.B615]" office:value-type="float" office:value="845.283018867925" calcext:value-type="float">
            <text:p>845.283018867925</text:p>
          </table:table-cell>
          <table:table-cell table:formula="of:=1/[.D615]" office:value-type="float" office:value="0.0244498777506113" calcext:value-type="float">
            <text:p>0.0244498777506113</text:p>
          </table:table-cell>
          <table:table-cell table:formula="of:=LOG10([.E61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6]/[.B616]" office:value-type="float" office:value="1056.60377358491" calcext:value-type="float">
            <text:p>1056.60377358491</text:p>
          </table:table-cell>
          <table:table-cell table:formula="of:=1/[.D616]" office:value-type="float" office:value="0.0244498777506113" calcext:value-type="float">
            <text:p>0.0244498777506113</text:p>
          </table:table-cell>
          <table:table-cell table:formula="of:=LOG10([.E61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7]/[.B617]" office:value-type="float" office:value="845.283018867925" calcext:value-type="float">
            <text:p>845.283018867925</text:p>
          </table:table-cell>
          <table:table-cell table:formula="of:=1/[.D617]" office:value-type="float" office:value="0.0244498777506113" calcext:value-type="float">
            <text:p>0.0244498777506113</text:p>
          </table:table-cell>
          <table:table-cell table:formula="of:=LOG10([.E61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9" calcext:value-type="float">
            <text:p>40.9</text:p>
          </table:table-cell>
          <table:table-cell table:formula="of:=[.C618]/[.B618]" office:value-type="float" office:value="704.402515723271" calcext:value-type="float">
            <text:p>704.402515723271</text:p>
          </table:table-cell>
          <table:table-cell table:formula="of:=1/[.D618]" office:value-type="float" office:value="0.0244498777506113" calcext:value-type="float">
            <text:p>0.0244498777506113</text:p>
          </table:table-cell>
          <table:table-cell table:formula="of:=LOG10([.E61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19]/[.B619]" office:value-type="float" office:value="845.283018867925" calcext:value-type="float">
            <text:p>845.283018867925</text:p>
          </table:table-cell>
          <table:table-cell table:formula="of:=1/[.D619]" office:value-type="float" office:value="0.0245098039215686" calcext:value-type="float">
            <text:p>0.0245098039215686</text:p>
          </table:table-cell>
          <table:table-cell table:formula="of:=LOG10([.E61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0]/[.B620]" office:value-type="float" office:value="1056.60377358491" calcext:value-type="float">
            <text:p>1056.60377358491</text:p>
          </table:table-cell>
          <table:table-cell table:formula="of:=1/[.D620]" office:value-type="float" office:value="0.0245098039215686" calcext:value-type="float">
            <text:p>0.0245098039215686</text:p>
          </table:table-cell>
          <table:table-cell table:formula="of:=LOG10([.E62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40.8" calcext:value-type="float">
            <text:p>40.8</text:p>
          </table:table-cell>
          <table:table-cell table:formula="of:=[.C621]/[.B621]" office:value-type="float" office:value="4207.54716981132" calcext:value-type="float">
            <text:p>4207.54716981132</text:p>
          </table:table-cell>
          <table:table-cell table:formula="of:=1/[.D621]" office:value-type="float" office:value="0.0245098039215686" calcext:value-type="float">
            <text:p>0.0245098039215686</text:p>
          </table:table-cell>
          <table:table-cell table:formula="of:=LOG10([.E621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2]/[.B622]" office:value-type="float" office:value="704.402515723271" calcext:value-type="float">
            <text:p>704.402515723271</text:p>
          </table:table-cell>
          <table:table-cell table:formula="of:=1/[.D622]" office:value-type="float" office:value="0.0245098039215686" calcext:value-type="float">
            <text:p>0.0245098039215686</text:p>
          </table:table-cell>
          <table:table-cell table:formula="of:=LOG10([.E62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3]/[.B623]" office:value-type="float" office:value="469.601677148847" calcext:value-type="float">
            <text:p>469.601677148847</text:p>
          </table:table-cell>
          <table:table-cell table:formula="of:=1/[.D623]" office:value-type="float" office:value="0.0245098039215686" calcext:value-type="float">
            <text:p>0.0245098039215686</text:p>
          </table:table-cell>
          <table:table-cell table:formula="of:=LOG10([.E623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4]/[.B624]" office:value-type="float" office:value="845.283018867925" calcext:value-type="float">
            <text:p>845.283018867925</text:p>
          </table:table-cell>
          <table:table-cell table:formula="of:=1/[.D624]" office:value-type="float" office:value="0.0245098039215686" calcext:value-type="float">
            <text:p>0.0245098039215686</text:p>
          </table:table-cell>
          <table:table-cell table:formula="of:=LOG10([.E62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5]/[.B625]" office:value-type="float" office:value="845.283018867925" calcext:value-type="float">
            <text:p>845.283018867925</text:p>
          </table:table-cell>
          <table:table-cell table:formula="of:=1/[.D625]" office:value-type="float" office:value="0.0245098039215686" calcext:value-type="float">
            <text:p>0.0245098039215686</text:p>
          </table:table-cell>
          <table:table-cell table:formula="of:=LOG10([.E62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6]/[.B626]" office:value-type="float" office:value="704.402515723271" calcext:value-type="float">
            <text:p>704.402515723271</text:p>
          </table:table-cell>
          <table:table-cell table:formula="of:=1/[.D626]" office:value-type="float" office:value="0.0245098039215686" calcext:value-type="float">
            <text:p>0.0245098039215686</text:p>
          </table:table-cell>
          <table:table-cell table:formula="of:=LOG10([.E62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7]/[.B627]" office:value-type="float" office:value="845.283018867925" calcext:value-type="float">
            <text:p>845.283018867925</text:p>
          </table:table-cell>
          <table:table-cell table:formula="of:=1/[.D627]" office:value-type="float" office:value="0.0245098039215686" calcext:value-type="float">
            <text:p>0.0245098039215686</text:p>
          </table:table-cell>
          <table:table-cell table:formula="of:=LOG10([.E62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8]/[.B628]" office:value-type="float" office:value="704.402515723271" calcext:value-type="float">
            <text:p>704.402515723271</text:p>
          </table:table-cell>
          <table:table-cell table:formula="of:=1/[.D628]" office:value-type="float" office:value="0.0245098039215686" calcext:value-type="float">
            <text:p>0.0245098039215686</text:p>
          </table:table-cell>
          <table:table-cell table:formula="of:=LOG10([.E62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8" calcext:value-type="float">
            <text:p>40.8</text:p>
          </table:table-cell>
          <table:table-cell table:formula="of:=[.C629]/[.B629]" office:value-type="float" office:value="1056.60377358491" calcext:value-type="float">
            <text:p>1056.60377358491</text:p>
          </table:table-cell>
          <table:table-cell table:formula="of:=1/[.D629]" office:value-type="float" office:value="0.0245098039215686" calcext:value-type="float">
            <text:p>0.0245098039215686</text:p>
          </table:table-cell>
          <table:table-cell table:formula="of:=LOG10([.E62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7" calcext:value-type="float">
            <text:p>40.7</text:p>
          </table:table-cell>
          <table:table-cell table:formula="of:=[.C630]/[.B630]" office:value-type="float" office:value="841.509433962264" calcext:value-type="float">
            <text:p>841.509433962264</text:p>
          </table:table-cell>
          <table:table-cell table:formula="of:=1/[.D630]" office:value-type="float" office:value="0.0245700245700246" calcext:value-type="float">
            <text:p>0.0245700245700246</text:p>
          </table:table-cell>
          <table:table-cell table:formula="of:=LOG10([.E630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0.7" calcext:value-type="float">
            <text:p>40.7</text:p>
          </table:table-cell>
          <table:table-cell table:formula="of:=[.C631]/[.B631]" office:value-type="float" office:value="1402.51572327044" calcext:value-type="float">
            <text:p>1402.51572327044</text:p>
          </table:table-cell>
          <table:table-cell table:formula="of:=1/[.D631]" office:value-type="float" office:value="0.0245700245700246" calcext:value-type="float">
            <text:p>0.0245700245700246</text:p>
          </table:table-cell>
          <table:table-cell table:formula="of:=LOG10([.E631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2]/[.B632]" office:value-type="float" office:value="603.77358490566" calcext:value-type="float">
            <text:p>603.77358490566</text:p>
          </table:table-cell>
          <table:table-cell table:formula="of:=1/[.D632]" office:value-type="float" office:value="0.0245700245700246" calcext:value-type="float">
            <text:p>0.0245700245700246</text:p>
          </table:table-cell>
          <table:table-cell table:formula="of:=LOG10([.E63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3]/[.B633]" office:value-type="float" office:value="845.283018867925" calcext:value-type="float">
            <text:p>845.283018867925</text:p>
          </table:table-cell>
          <table:table-cell table:formula="of:=1/[.D633]" office:value-type="float" office:value="0.0245700245700246" calcext:value-type="float">
            <text:p>0.0245700245700246</text:p>
          </table:table-cell>
          <table:table-cell table:formula="of:=LOG10([.E63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4]/[.B634]" office:value-type="float" office:value="1056.60377358491" calcext:value-type="float">
            <text:p>1056.60377358491</text:p>
          </table:table-cell>
          <table:table-cell table:formula="of:=1/[.D634]" office:value-type="float" office:value="0.0245700245700246" calcext:value-type="float">
            <text:p>0.0245700245700246</text:p>
          </table:table-cell>
          <table:table-cell table:formula="of:=LOG10([.E63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5]/[.B635]" office:value-type="float" office:value="1056.60377358491" calcext:value-type="float">
            <text:p>1056.60377358491</text:p>
          </table:table-cell>
          <table:table-cell table:formula="of:=1/[.D635]" office:value-type="float" office:value="0.0245700245700246" calcext:value-type="float">
            <text:p>0.0245700245700246</text:p>
          </table:table-cell>
          <table:table-cell table:formula="of:=LOG10([.E63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6]/[.B636]" office:value-type="float" office:value="704.402515723271" calcext:value-type="float">
            <text:p>704.402515723271</text:p>
          </table:table-cell>
          <table:table-cell table:formula="of:=1/[.D636]" office:value-type="float" office:value="0.0245700245700246" calcext:value-type="float">
            <text:p>0.0245700245700246</text:p>
          </table:table-cell>
          <table:table-cell table:formula="of:=LOG10([.E63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7]/[.B637]" office:value-type="float" office:value="1056.60377358491" calcext:value-type="float">
            <text:p>1056.60377358491</text:p>
          </table:table-cell>
          <table:table-cell table:formula="of:=1/[.D637]" office:value-type="float" office:value="0.0245700245700246" calcext:value-type="float">
            <text:p>0.0245700245700246</text:p>
          </table:table-cell>
          <table:table-cell table:formula="of:=LOG10([.E63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8]/[.B638]" office:value-type="float" office:value="704.402515723271" calcext:value-type="float">
            <text:p>704.402515723271</text:p>
          </table:table-cell>
          <table:table-cell table:formula="of:=1/[.D638]" office:value-type="float" office:value="0.0245700245700246" calcext:value-type="float">
            <text:p>0.0245700245700246</text:p>
          </table:table-cell>
          <table:table-cell table:formula="of:=LOG10([.E63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39]/[.B639]" office:value-type="float" office:value="1056.60377358491" calcext:value-type="float">
            <text:p>1056.60377358491</text:p>
          </table:table-cell>
          <table:table-cell table:formula="of:=1/[.D639]" office:value-type="float" office:value="0.0245700245700246" calcext:value-type="float">
            <text:p>0.0245700245700246</text:p>
          </table:table-cell>
          <table:table-cell table:formula="of:=LOG10([.E63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40]/[.B640]" office:value-type="float" office:value="845.283018867925" calcext:value-type="float">
            <text:p>845.283018867925</text:p>
          </table:table-cell>
          <table:table-cell table:formula="of:=1/[.D640]" office:value-type="float" office:value="0.0245700245700246" calcext:value-type="float">
            <text:p>0.0245700245700246</text:p>
          </table:table-cell>
          <table:table-cell table:formula="of:=LOG10([.E64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41]/[.B641]" office:value-type="float" office:value="845.283018867925" calcext:value-type="float">
            <text:p>845.283018867925</text:p>
          </table:table-cell>
          <table:table-cell table:formula="of:=1/[.D641]" office:value-type="float" office:value="0.0245700245700246" calcext:value-type="float">
            <text:p>0.0245700245700246</text:p>
          </table:table-cell>
          <table:table-cell table:formula="of:=LOG10([.E64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42]/[.B642]" office:value-type="float" office:value="845.283018867925" calcext:value-type="float">
            <text:p>845.283018867925</text:p>
          </table:table-cell>
          <table:table-cell table:formula="of:=1/[.D642]" office:value-type="float" office:value="0.0245700245700246" calcext:value-type="float">
            <text:p>0.0245700245700246</text:p>
          </table:table-cell>
          <table:table-cell table:formula="of:=LOG10([.E64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7" calcext:value-type="float">
            <text:p>40.7</text:p>
          </table:table-cell>
          <table:table-cell table:formula="of:=[.C643]/[.B643]" office:value-type="float" office:value="845.283018867925" calcext:value-type="float">
            <text:p>845.283018867925</text:p>
          </table:table-cell>
          <table:table-cell table:formula="of:=1/[.D643]" office:value-type="float" office:value="0.0245700245700246" calcext:value-type="float">
            <text:p>0.0245700245700246</text:p>
          </table:table-cell>
          <table:table-cell table:formula="of:=LOG10([.E64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6" calcext:value-type="float">
            <text:p>40.6</text:p>
          </table:table-cell>
          <table:table-cell table:formula="of:=[.C644]/[.B644]" office:value-type="float" office:value="841.509433962264" calcext:value-type="float">
            <text:p>841.509433962264</text:p>
          </table:table-cell>
          <table:table-cell table:formula="of:=1/[.D644]" office:value-type="float" office:value="0.0246305418719212" calcext:value-type="float">
            <text:p>0.0246305418719212</text:p>
          </table:table-cell>
          <table:table-cell table:formula="of:=LOG10([.E64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45]/[.B645]" office:value-type="float" office:value="1056.60377358491" calcext:value-type="float">
            <text:p>1056.60377358491</text:p>
          </table:table-cell>
          <table:table-cell table:formula="of:=1/[.D645]" office:value-type="float" office:value="0.0246305418719212" calcext:value-type="float">
            <text:p>0.0246305418719212</text:p>
          </table:table-cell>
          <table:table-cell table:formula="of:=LOG10([.E64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46]/[.B646]" office:value-type="float" office:value="845.283018867925" calcext:value-type="float">
            <text:p>845.283018867925</text:p>
          </table:table-cell>
          <table:table-cell table:formula="of:=1/[.D646]" office:value-type="float" office:value="0.0246305418719212" calcext:value-type="float">
            <text:p>0.0246305418719212</text:p>
          </table:table-cell>
          <table:table-cell table:formula="of:=LOG10([.E64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0.6" calcext:value-type="float">
            <text:p>40.6</text:p>
          </table:table-cell>
          <table:table-cell table:formula="of:=[.C647]/[.B647]" office:value-type="float" office:value="1051.88679245283" calcext:value-type="float">
            <text:p>1051.88679245283</text:p>
          </table:table-cell>
          <table:table-cell table:formula="of:=1/[.D647]" office:value-type="float" office:value="0.0246305418719212" calcext:value-type="float">
            <text:p>0.0246305418719212</text:p>
          </table:table-cell>
          <table:table-cell table:formula="of:=LOG10([.E647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48]/[.B648]" office:value-type="float" office:value="845.283018867925" calcext:value-type="float">
            <text:p>845.283018867925</text:p>
          </table:table-cell>
          <table:table-cell table:formula="of:=1/[.D648]" office:value-type="float" office:value="0.0246305418719212" calcext:value-type="float">
            <text:p>0.0246305418719212</text:p>
          </table:table-cell>
          <table:table-cell table:formula="of:=LOG10([.E64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49]/[.B649]" office:value-type="float" office:value="603.77358490566" calcext:value-type="float">
            <text:p>603.77358490566</text:p>
          </table:table-cell>
          <table:table-cell table:formula="of:=1/[.D649]" office:value-type="float" office:value="0.0246305418719212" calcext:value-type="float">
            <text:p>0.0246305418719212</text:p>
          </table:table-cell>
          <table:table-cell table:formula="of:=LOG10([.E64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50]/[.B650]" office:value-type="float" office:value="845.283018867925" calcext:value-type="float">
            <text:p>845.283018867925</text:p>
          </table:table-cell>
          <table:table-cell table:formula="of:=1/[.D650]" office:value-type="float" office:value="0.0246305418719212" calcext:value-type="float">
            <text:p>0.0246305418719212</text:p>
          </table:table-cell>
          <table:table-cell table:formula="of:=LOG10([.E65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51]/[.B651]" office:value-type="float" office:value="1056.60377358491" calcext:value-type="float">
            <text:p>1056.60377358491</text:p>
          </table:table-cell>
          <table:table-cell table:formula="of:=1/[.D651]" office:value-type="float" office:value="0.0246305418719212" calcext:value-type="float">
            <text:p>0.0246305418719212</text:p>
          </table:table-cell>
          <table:table-cell table:formula="of:=LOG10([.E65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52]/[.B652]" office:value-type="float" office:value="845.283018867925" calcext:value-type="float">
            <text:p>845.283018867925</text:p>
          </table:table-cell>
          <table:table-cell table:formula="of:=1/[.D652]" office:value-type="float" office:value="0.0246305418719212" calcext:value-type="float">
            <text:p>0.0246305418719212</text:p>
          </table:table-cell>
          <table:table-cell table:formula="of:=LOG10([.E65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53]/[.B653]" office:value-type="float" office:value="603.77358490566" calcext:value-type="float">
            <text:p>603.77358490566</text:p>
          </table:table-cell>
          <table:table-cell table:formula="of:=1/[.D653]" office:value-type="float" office:value="0.0246305418719212" calcext:value-type="float">
            <text:p>0.0246305418719212</text:p>
          </table:table-cell>
          <table:table-cell table:formula="of:=LOG10([.E65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0.6" calcext:value-type="float">
            <text:p>40.6</text:p>
          </table:table-cell>
          <table:table-cell table:formula="of:=[.C654]/[.B654]" office:value-type="float" office:value="701.25786163522" calcext:value-type="float">
            <text:p>701.25786163522</text:p>
          </table:table-cell>
          <table:table-cell table:formula="of:=1/[.D654]" office:value-type="float" office:value="0.0246305418719212" calcext:value-type="float">
            <text:p>0.0246305418719212</text:p>
          </table:table-cell>
          <table:table-cell table:formula="of:=LOG10([.E654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55]/[.B655]" office:value-type="float" office:value="845.283018867925" calcext:value-type="float">
            <text:p>845.283018867925</text:p>
          </table:table-cell>
          <table:table-cell table:formula="of:=1/[.D655]" office:value-type="float" office:value="0.0246305418719212" calcext:value-type="float">
            <text:p>0.0246305418719212</text:p>
          </table:table-cell>
          <table:table-cell table:formula="of:=LOG10([.E65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6" calcext:value-type="float">
            <text:p>40.6</text:p>
          </table:table-cell>
          <table:table-cell table:formula="of:=[.C656]/[.B656]" office:value-type="float" office:value="845.283018867925" calcext:value-type="float">
            <text:p>845.283018867925</text:p>
          </table:table-cell>
          <table:table-cell table:formula="of:=1/[.D656]" office:value-type="float" office:value="0.0246305418719212" calcext:value-type="float">
            <text:p>0.0246305418719212</text:p>
          </table:table-cell>
          <table:table-cell table:formula="of:=LOG10([.E65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57]/[.B657]" office:value-type="float" office:value="845.283018867925" calcext:value-type="float">
            <text:p>845.283018867925</text:p>
          </table:table-cell>
          <table:table-cell table:formula="of:=1/[.D657]" office:value-type="float" office:value="0.0246913580246914" calcext:value-type="float">
            <text:p>0.0246913580246914</text:p>
          </table:table-cell>
          <table:table-cell table:formula="of:=LOG10([.E65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58]/[.B658]" office:value-type="float" office:value="1056.60377358491" calcext:value-type="float">
            <text:p>1056.60377358491</text:p>
          </table:table-cell>
          <table:table-cell table:formula="of:=1/[.D658]" office:value-type="float" office:value="0.0246913580246914" calcext:value-type="float">
            <text:p>0.0246913580246914</text:p>
          </table:table-cell>
          <table:table-cell table:formula="of:=LOG10([.E65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5" calcext:value-type="float">
            <text:p>40.5</text:p>
          </table:table-cell>
          <table:table-cell table:formula="of:=[.C659]/[.B659]" office:value-type="float" office:value="841.509433962264" calcext:value-type="float">
            <text:p>841.509433962264</text:p>
          </table:table-cell>
          <table:table-cell table:formula="of:=1/[.D659]" office:value-type="float" office:value="0.0246913580246914" calcext:value-type="float">
            <text:p>0.0246913580246914</text:p>
          </table:table-cell>
          <table:table-cell table:formula="of:=LOG10([.E659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60]/[.B660]" office:value-type="float" office:value="845.283018867925" calcext:value-type="float">
            <text:p>845.283018867925</text:p>
          </table:table-cell>
          <table:table-cell table:formula="of:=1/[.D660]" office:value-type="float" office:value="0.0246913580246914" calcext:value-type="float">
            <text:p>0.0246913580246914</text:p>
          </table:table-cell>
          <table:table-cell table:formula="of:=LOG10([.E66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61]/[.B661]" office:value-type="float" office:value="845.283018867925" calcext:value-type="float">
            <text:p>845.283018867925</text:p>
          </table:table-cell>
          <table:table-cell table:formula="of:=1/[.D661]" office:value-type="float" office:value="0.0246913580246914" calcext:value-type="float">
            <text:p>0.0246913580246914</text:p>
          </table:table-cell>
          <table:table-cell table:formula="of:=LOG10([.E66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5" calcext:value-type="float">
            <text:p>40.5</text:p>
          </table:table-cell>
          <table:table-cell table:formula="of:=[.C662]/[.B662]" office:value-type="float" office:value="841.509433962264" calcext:value-type="float">
            <text:p>841.509433962264</text:p>
          </table:table-cell>
          <table:table-cell table:formula="of:=1/[.D662]" office:value-type="float" office:value="0.0246913580246914" calcext:value-type="float">
            <text:p>0.0246913580246914</text:p>
          </table:table-cell>
          <table:table-cell table:formula="of:=LOG10([.E662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63]/[.B663]" office:value-type="float" office:value="845.283018867925" calcext:value-type="float">
            <text:p>845.283018867925</text:p>
          </table:table-cell>
          <table:table-cell table:formula="of:=1/[.D663]" office:value-type="float" office:value="0.0246913580246914" calcext:value-type="float">
            <text:p>0.0246913580246914</text:p>
          </table:table-cell>
          <table:table-cell table:formula="of:=LOG10([.E66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64]/[.B664]" office:value-type="float" office:value="845.283018867925" calcext:value-type="float">
            <text:p>845.283018867925</text:p>
          </table:table-cell>
          <table:table-cell table:formula="of:=1/[.D664]" office:value-type="float" office:value="0.0246913580246914" calcext:value-type="float">
            <text:p>0.0246913580246914</text:p>
          </table:table-cell>
          <table:table-cell table:formula="of:=LOG10([.E66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65]/[.B665]" office:value-type="float" office:value="603.77358490566" calcext:value-type="float">
            <text:p>603.77358490566</text:p>
          </table:table-cell>
          <table:table-cell table:formula="of:=1/[.D665]" office:value-type="float" office:value="0.0246913580246914" calcext:value-type="float">
            <text:p>0.0246913580246914</text:p>
          </table:table-cell>
          <table:table-cell table:formula="of:=LOG10([.E66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0.5" calcext:value-type="float">
            <text:p>40.5</text:p>
          </table:table-cell>
          <table:table-cell table:formula="of:=[.C666]/[.B666]" office:value-type="float" office:value="701.25786163522" calcext:value-type="float">
            <text:p>701.25786163522</text:p>
          </table:table-cell>
          <table:table-cell table:formula="of:=1/[.D666]" office:value-type="float" office:value="0.0246913580246914" calcext:value-type="float">
            <text:p>0.0246913580246914</text:p>
          </table:table-cell>
          <table:table-cell table:formula="of:=LOG10([.E666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5" calcext:value-type="float">
            <text:p>40.5</text:p>
          </table:table-cell>
          <table:table-cell table:formula="of:=[.C667]/[.B667]" office:value-type="float" office:value="704.402515723271" calcext:value-type="float">
            <text:p>704.402515723271</text:p>
          </table:table-cell>
          <table:table-cell table:formula="of:=1/[.D667]" office:value-type="float" office:value="0.0246913580246914" calcext:value-type="float">
            <text:p>0.0246913580246914</text:p>
          </table:table-cell>
          <table:table-cell table:formula="of:=LOG10([.E66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68]/[.B668]" office:value-type="float" office:value="845.283018867925" calcext:value-type="float">
            <text:p>845.283018867925</text:p>
          </table:table-cell>
          <table:table-cell table:formula="of:=1/[.D668]" office:value-type="float" office:value="0.0247524752475248" calcext:value-type="float">
            <text:p>0.0247524752475248</text:p>
          </table:table-cell>
          <table:table-cell table:formula="of:=LOG10([.E66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69]/[.B669]" office:value-type="float" office:value="845.283018867925" calcext:value-type="float">
            <text:p>845.283018867925</text:p>
          </table:table-cell>
          <table:table-cell table:formula="of:=1/[.D669]" office:value-type="float" office:value="0.0247524752475248" calcext:value-type="float">
            <text:p>0.0247524752475248</text:p>
          </table:table-cell>
          <table:table-cell table:formula="of:=LOG10([.E66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70]/[.B670]" office:value-type="float" office:value="528.301886792453" calcext:value-type="float">
            <text:p>528.301886792453</text:p>
          </table:table-cell>
          <table:table-cell table:formula="of:=1/[.D670]" office:value-type="float" office:value="0.0247524752475248" calcext:value-type="float">
            <text:p>0.0247524752475248</text:p>
          </table:table-cell>
          <table:table-cell table:formula="of:=LOG10([.E67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0.4" calcext:value-type="float">
            <text:p>40.4</text:p>
          </table:table-cell>
          <table:table-cell table:formula="of:=[.C671]/[.B671]" office:value-type="float" office:value="1402.51572327044" calcext:value-type="float">
            <text:p>1402.51572327044</text:p>
          </table:table-cell>
          <table:table-cell table:formula="of:=1/[.D671]" office:value-type="float" office:value="0.0247524752475248" calcext:value-type="float">
            <text:p>0.0247524752475248</text:p>
          </table:table-cell>
          <table:table-cell table:formula="of:=LOG10([.E671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72]/[.B672]" office:value-type="float" office:value="1056.60377358491" calcext:value-type="float">
            <text:p>1056.60377358491</text:p>
          </table:table-cell>
          <table:table-cell table:formula="of:=1/[.D672]" office:value-type="float" office:value="0.0247524752475248" calcext:value-type="float">
            <text:p>0.0247524752475248</text:p>
          </table:table-cell>
          <table:table-cell table:formula="of:=LOG10([.E67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40.4" calcext:value-type="float">
            <text:p>40.4</text:p>
          </table:table-cell>
          <table:table-cell table:formula="of:=[.C673]/[.B673]" office:value-type="float" office:value="4207.54716981132" calcext:value-type="float">
            <text:p>4207.54716981132</text:p>
          </table:table-cell>
          <table:table-cell table:formula="of:=1/[.D673]" office:value-type="float" office:value="0.0247524752475248" calcext:value-type="float">
            <text:p>0.0247524752475248</text:p>
          </table:table-cell>
          <table:table-cell table:formula="of:=LOG10([.E673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74]/[.B674]" office:value-type="float" office:value="1056.60377358491" calcext:value-type="float">
            <text:p>1056.60377358491</text:p>
          </table:table-cell>
          <table:table-cell table:formula="of:=1/[.D674]" office:value-type="float" office:value="0.0247524752475248" calcext:value-type="float">
            <text:p>0.0247524752475248</text:p>
          </table:table-cell>
          <table:table-cell table:formula="of:=LOG10([.E67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75]/[.B675]" office:value-type="float" office:value="1056.60377358491" calcext:value-type="float">
            <text:p>1056.60377358491</text:p>
          </table:table-cell>
          <table:table-cell table:formula="of:=1/[.D675]" office:value-type="float" office:value="0.0247524752475248" calcext:value-type="float">
            <text:p>0.0247524752475248</text:p>
          </table:table-cell>
          <table:table-cell table:formula="of:=LOG10([.E67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76]/[.B676]" office:value-type="float" office:value="1056.60377358491" calcext:value-type="float">
            <text:p>1056.60377358491</text:p>
          </table:table-cell>
          <table:table-cell table:formula="of:=1/[.D676]" office:value-type="float" office:value="0.0247524752475248" calcext:value-type="float">
            <text:p>0.0247524752475248</text:p>
          </table:table-cell>
          <table:table-cell table:formula="of:=LOG10([.E67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4" calcext:value-type="float">
            <text:p>40.4</text:p>
          </table:table-cell>
          <table:table-cell table:formula="of:=[.C677]/[.B677]" office:value-type="float" office:value="845.283018867925" calcext:value-type="float">
            <text:p>845.283018867925</text:p>
          </table:table-cell>
          <table:table-cell table:formula="of:=1/[.D677]" office:value-type="float" office:value="0.0247524752475248" calcext:value-type="float">
            <text:p>0.0247524752475248</text:p>
          </table:table-cell>
          <table:table-cell table:formula="of:=LOG10([.E67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4" calcext:value-type="float">
            <text:p>40.4</text:p>
          </table:table-cell>
          <table:table-cell table:formula="of:=[.C678]/[.B678]" office:value-type="float" office:value="841.509433962264" calcext:value-type="float">
            <text:p>841.509433962264</text:p>
          </table:table-cell>
          <table:table-cell table:formula="of:=1/[.D678]" office:value-type="float" office:value="0.0247524752475248" calcext:value-type="float">
            <text:p>0.0247524752475248</text:p>
          </table:table-cell>
          <table:table-cell table:formula="of:=LOG10([.E678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79]/[.B679]" office:value-type="float" office:value="1056.60377358491" calcext:value-type="float">
            <text:p>1056.60377358491</text:p>
          </table:table-cell>
          <table:table-cell table:formula="of:=1/[.D679]" office:value-type="float" office:value="0.0248138957816377" calcext:value-type="float">
            <text:p>0.0248138957816377</text:p>
          </table:table-cell>
          <table:table-cell table:formula="of:=LOG10([.E67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0]/[.B680]" office:value-type="float" office:value="1056.60377358491" calcext:value-type="float">
            <text:p>1056.60377358491</text:p>
          </table:table-cell>
          <table:table-cell table:formula="of:=1/[.D680]" office:value-type="float" office:value="0.0248138957816377" calcext:value-type="float">
            <text:p>0.0248138957816377</text:p>
          </table:table-cell>
          <table:table-cell table:formula="of:=LOG10([.E68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1]/[.B681]" office:value-type="float" office:value="845.283018867925" calcext:value-type="float">
            <text:p>845.283018867925</text:p>
          </table:table-cell>
          <table:table-cell table:formula="of:=1/[.D681]" office:value-type="float" office:value="0.0248138957816377" calcext:value-type="float">
            <text:p>0.0248138957816377</text:p>
          </table:table-cell>
          <table:table-cell table:formula="of:=LOG10([.E68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5" calcext:value-type="float">
            <text:p>2.25</text:p>
          </table:table-cell>
          <table:table-cell office:value-type="float" office:value="40.3" calcext:value-type="float">
            <text:p>40.3</text:p>
          </table:table-cell>
          <table:table-cell table:formula="of:=[.C682]/[.B682]" office:value-type="float" office:value="707.547169811321" calcext:value-type="float">
            <text:p>707.547169811321</text:p>
          </table:table-cell>
          <table:table-cell table:formula="of:=1/[.D682]" office:value-type="float" office:value="0.0248138957816377" calcext:value-type="float">
            <text:p>0.0248138957816377</text:p>
          </table:table-cell>
          <table:table-cell table:formula="of:=LOG10([.E682])" office:value-type="float" office:value="2.84975539812693" calcext:value-type="float">
            <text:p>2.8497553981269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3]/[.B683]" office:value-type="float" office:value="1056.60377358491" calcext:value-type="float">
            <text:p>1056.60377358491</text:p>
          </table:table-cell>
          <table:table-cell table:formula="of:=1/[.D683]" office:value-type="float" office:value="0.0248138957816377" calcext:value-type="float">
            <text:p>0.0248138957816377</text:p>
          </table:table-cell>
          <table:table-cell table:formula="of:=LOG10([.E68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4]/[.B684]" office:value-type="float" office:value="1408.80503144654" calcext:value-type="float">
            <text:p>1408.80503144654</text:p>
          </table:table-cell>
          <table:table-cell table:formula="of:=1/[.D684]" office:value-type="float" office:value="0.0248138957816377" calcext:value-type="float">
            <text:p>0.0248138957816377</text:p>
          </table:table-cell>
          <table:table-cell table:formula="of:=LOG10([.E684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5]/[.B685]" office:value-type="float" office:value="1056.60377358491" calcext:value-type="float">
            <text:p>1056.60377358491</text:p>
          </table:table-cell>
          <table:table-cell table:formula="of:=1/[.D685]" office:value-type="float" office:value="0.0248138957816377" calcext:value-type="float">
            <text:p>0.0248138957816377</text:p>
          </table:table-cell>
          <table:table-cell table:formula="of:=LOG10([.E68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6]/[.B686]" office:value-type="float" office:value="845.283018867925" calcext:value-type="float">
            <text:p>845.283018867925</text:p>
          </table:table-cell>
          <table:table-cell table:formula="of:=1/[.D686]" office:value-type="float" office:value="0.0248138957816377" calcext:value-type="float">
            <text:p>0.0248138957816377</text:p>
          </table:table-cell>
          <table:table-cell table:formula="of:=LOG10([.E68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7]/[.B687]" office:value-type="float" office:value="704.402515723271" calcext:value-type="float">
            <text:p>704.402515723271</text:p>
          </table:table-cell>
          <table:table-cell table:formula="of:=1/[.D687]" office:value-type="float" office:value="0.0248138957816377" calcext:value-type="float">
            <text:p>0.0248138957816377</text:p>
          </table:table-cell>
          <table:table-cell table:formula="of:=LOG10([.E68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88]/[.B688]" office:value-type="float" office:value="1056.60377358491" calcext:value-type="float">
            <text:p>1056.60377358491</text:p>
          </table:table-cell>
          <table:table-cell table:formula="of:=1/[.D688]" office:value-type="float" office:value="0.0248138957816377" calcext:value-type="float">
            <text:p>0.0248138957816377</text:p>
          </table:table-cell>
          <table:table-cell table:formula="of:=LOG10([.E68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3" calcext:value-type="float">
            <text:p>40.3</text:p>
          </table:table-cell>
          <table:table-cell table:formula="of:=[.C689]/[.B689]" office:value-type="float" office:value="841.509433962264" calcext:value-type="float">
            <text:p>841.509433962264</text:p>
          </table:table-cell>
          <table:table-cell table:formula="of:=1/[.D689]" office:value-type="float" office:value="0.0248138957816377" calcext:value-type="float">
            <text:p>0.0248138957816377</text:p>
          </table:table-cell>
          <table:table-cell table:formula="of:=LOG10([.E689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90]/[.B690]" office:value-type="float" office:value="845.283018867925" calcext:value-type="float">
            <text:p>845.283018867925</text:p>
          </table:table-cell>
          <table:table-cell table:formula="of:=1/[.D690]" office:value-type="float" office:value="0.0248138957816377" calcext:value-type="float">
            <text:p>0.0248138957816377</text:p>
          </table:table-cell>
          <table:table-cell table:formula="of:=LOG10([.E69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91]/[.B691]" office:value-type="float" office:value="845.283018867925" calcext:value-type="float">
            <text:p>845.283018867925</text:p>
          </table:table-cell>
          <table:table-cell table:formula="of:=1/[.D691]" office:value-type="float" office:value="0.0248138957816377" calcext:value-type="float">
            <text:p>0.0248138957816377</text:p>
          </table:table-cell>
          <table:table-cell table:formula="of:=LOG10([.E69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.3" calcext:value-type="float">
            <text:p>40.3</text:p>
          </table:table-cell>
          <table:table-cell table:formula="of:=[.C692]/[.B692]" office:value-type="float" office:value="603.77358490566" calcext:value-type="float">
            <text:p>603.77358490566</text:p>
          </table:table-cell>
          <table:table-cell table:formula="of:=1/[.D692]" office:value-type="float" office:value="0.0248138957816377" calcext:value-type="float">
            <text:p>0.0248138957816377</text:p>
          </table:table-cell>
          <table:table-cell table:formula="of:=LOG10([.E69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3" calcext:value-type="float">
            <text:p>2.23</text:p>
          </table:table-cell>
          <table:table-cell office:value-type="float" office:value="40.3" calcext:value-type="float">
            <text:p>40.3</text:p>
          </table:table-cell>
          <table:table-cell table:formula="of:=[.C693]/[.B693]" office:value-type="float" office:value="701.25786163522" calcext:value-type="float">
            <text:p>701.25786163522</text:p>
          </table:table-cell>
          <table:table-cell table:formula="of:=1/[.D693]" office:value-type="float" office:value="0.0248138957816377" calcext:value-type="float">
            <text:p>0.0248138957816377</text:p>
          </table:table-cell>
          <table:table-cell table:formula="of:=LOG10([.E693])" office:value-type="float" office:value="2.84587774306373" calcext:value-type="float">
            <text:p>2.8458777430637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694]/[.B694]" office:value-type="float" office:value="704.402515723271" calcext:value-type="float">
            <text:p>704.402515723271</text:p>
          </table:table-cell>
          <table:table-cell table:formula="of:=1/[.D694]" office:value-type="float" office:value="0.0248756218905473" calcext:value-type="float">
            <text:p>0.0248756218905473</text:p>
          </table:table-cell>
          <table:table-cell table:formula="of:=LOG10([.E69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695]/[.B695]" office:value-type="float" office:value="4226.41509433962" calcext:value-type="float">
            <text:p>4226.41509433962</text:p>
          </table:table-cell>
          <table:table-cell table:formula="of:=1/[.D695]" office:value-type="float" office:value="0.0248756218905473" calcext:value-type="float">
            <text:p>0.0248756218905473</text:p>
          </table:table-cell>
          <table:table-cell table:formula="of:=LOG10([.E695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.2" calcext:value-type="float">
            <text:p>40.2</text:p>
          </table:table-cell>
          <table:table-cell table:formula="of:=[.C696]/[.B696]" office:value-type="float" office:value="841.509433962264" calcext:value-type="float">
            <text:p>841.509433962264</text:p>
          </table:table-cell>
          <table:table-cell table:formula="of:=1/[.D696]" office:value-type="float" office:value="0.0248756218905473" calcext:value-type="float">
            <text:p>0.0248756218905473</text:p>
          </table:table-cell>
          <table:table-cell table:formula="of:=LOG10([.E696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0.2" calcext:value-type="float">
            <text:p>40.2</text:p>
          </table:table-cell>
          <table:table-cell table:formula="of:=[.C697]/[.B697]" office:value-type="float" office:value="1051.88679245283" calcext:value-type="float">
            <text:p>1051.88679245283</text:p>
          </table:table-cell>
          <table:table-cell table:formula="of:=1/[.D697]" office:value-type="float" office:value="0.0248756218905473" calcext:value-type="float">
            <text:p>0.0248756218905473</text:p>
          </table:table-cell>
          <table:table-cell table:formula="of:=LOG10([.E697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698]/[.B698]" office:value-type="float" office:value="845.283018867925" calcext:value-type="float">
            <text:p>845.283018867925</text:p>
          </table:table-cell>
          <table:table-cell table:formula="of:=1/[.D698]" office:value-type="float" office:value="0.0248756218905473" calcext:value-type="float">
            <text:p>0.0248756218905473</text:p>
          </table:table-cell>
          <table:table-cell table:formula="of:=LOG10([.E69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699]/[.B699]" office:value-type="float" office:value="1056.60377358491" calcext:value-type="float">
            <text:p>1056.60377358491</text:p>
          </table:table-cell>
          <table:table-cell table:formula="of:=1/[.D699]" office:value-type="float" office:value="0.0248756218905473" calcext:value-type="float">
            <text:p>0.0248756218905473</text:p>
          </table:table-cell>
          <table:table-cell table:formula="of:=LOG10([.E69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0]/[.B700]" office:value-type="float" office:value="845.283018867925" calcext:value-type="float">
            <text:p>845.283018867925</text:p>
          </table:table-cell>
          <table:table-cell table:formula="of:=1/[.D700]" office:value-type="float" office:value="0.0248756218905473" calcext:value-type="float">
            <text:p>0.0248756218905473</text:p>
          </table:table-cell>
          <table:table-cell table:formula="of:=LOG10([.E70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1]/[.B701]" office:value-type="float" office:value="1056.60377358491" calcext:value-type="float">
            <text:p>1056.60377358491</text:p>
          </table:table-cell>
          <table:table-cell table:formula="of:=1/[.D701]" office:value-type="float" office:value="0.0248756218905473" calcext:value-type="float">
            <text:p>0.0248756218905473</text:p>
          </table:table-cell>
          <table:table-cell table:formula="of:=LOG10([.E70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2]/[.B702]" office:value-type="float" office:value="845.283018867925" calcext:value-type="float">
            <text:p>845.283018867925</text:p>
          </table:table-cell>
          <table:table-cell table:formula="of:=1/[.D702]" office:value-type="float" office:value="0.0248756218905473" calcext:value-type="float">
            <text:p>0.0248756218905473</text:p>
          </table:table-cell>
          <table:table-cell table:formula="of:=LOG10([.E70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3]/[.B703]" office:value-type="float" office:value="1056.60377358491" calcext:value-type="float">
            <text:p>1056.60377358491</text:p>
          </table:table-cell>
          <table:table-cell table:formula="of:=1/[.D703]" office:value-type="float" office:value="0.0248756218905473" calcext:value-type="float">
            <text:p>0.0248756218905473</text:p>
          </table:table-cell>
          <table:table-cell table:formula="of:=LOG10([.E70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4]/[.B704]" office:value-type="float" office:value="528.301886792453" calcext:value-type="float">
            <text:p>528.301886792453</text:p>
          </table:table-cell>
          <table:table-cell table:formula="of:=1/[.D704]" office:value-type="float" office:value="0.0248756218905473" calcext:value-type="float">
            <text:p>0.0248756218905473</text:p>
          </table:table-cell>
          <table:table-cell table:formula="of:=LOG10([.E704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5]/[.B705]" office:value-type="float" office:value="1056.60377358491" calcext:value-type="float">
            <text:p>1056.60377358491</text:p>
          </table:table-cell>
          <table:table-cell table:formula="of:=1/[.D705]" office:value-type="float" office:value="0.0248756218905473" calcext:value-type="float">
            <text:p>0.0248756218905473</text:p>
          </table:table-cell>
          <table:table-cell table:formula="of:=LOG10([.E70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0.2" calcext:value-type="float">
            <text:p>40.2</text:p>
          </table:table-cell>
          <table:table-cell table:formula="of:=[.C706]/[.B706]" office:value-type="float" office:value="1408.80503144654" calcext:value-type="float">
            <text:p>1408.80503144654</text:p>
          </table:table-cell>
          <table:table-cell table:formula="of:=1/[.D706]" office:value-type="float" office:value="0.0248756218905473" calcext:value-type="float">
            <text:p>0.0248756218905473</text:p>
          </table:table-cell>
          <table:table-cell table:formula="of:=LOG10([.E70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07]/[.B707]" office:value-type="float" office:value="704.402515723271" calcext:value-type="float">
            <text:p>704.402515723271</text:p>
          </table:table-cell>
          <table:table-cell table:formula="of:=1/[.D707]" office:value-type="float" office:value="0.0249376558603491" calcext:value-type="float">
            <text:p>0.0249376558603491</text:p>
          </table:table-cell>
          <table:table-cell table:formula="of:=LOG10([.E70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08]/[.B708]" office:value-type="float" office:value="845.283018867925" calcext:value-type="float">
            <text:p>845.283018867925</text:p>
          </table:table-cell>
          <table:table-cell table:formula="of:=1/[.D708]" office:value-type="float" office:value="0.0249376558603491" calcext:value-type="float">
            <text:p>0.0249376558603491</text:p>
          </table:table-cell>
          <table:table-cell table:formula="of:=LOG10([.E70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09]/[.B709]" office:value-type="float" office:value="845.283018867925" calcext:value-type="float">
            <text:p>845.283018867925</text:p>
          </table:table-cell>
          <table:table-cell table:formula="of:=1/[.D709]" office:value-type="float" office:value="0.0249376558603491" calcext:value-type="float">
            <text:p>0.0249376558603491</text:p>
          </table:table-cell>
          <table:table-cell table:formula="of:=LOG10([.E70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0]/[.B710]" office:value-type="float" office:value="845.283018867925" calcext:value-type="float">
            <text:p>845.283018867925</text:p>
          </table:table-cell>
          <table:table-cell table:formula="of:=1/[.D710]" office:value-type="float" office:value="0.0249376558603491" calcext:value-type="float">
            <text:p>0.0249376558603491</text:p>
          </table:table-cell>
          <table:table-cell table:formula="of:=LOG10([.E71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1]/[.B711]" office:value-type="float" office:value="845.283018867925" calcext:value-type="float">
            <text:p>845.283018867925</text:p>
          </table:table-cell>
          <table:table-cell table:formula="of:=1/[.D711]" office:value-type="float" office:value="0.0249376558603491" calcext:value-type="float">
            <text:p>0.0249376558603491</text:p>
          </table:table-cell>
          <table:table-cell table:formula="of:=LOG10([.E71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2]/[.B712]" office:value-type="float" office:value="1408.80503144654" calcext:value-type="float">
            <text:p>1408.80503144654</text:p>
          </table:table-cell>
          <table:table-cell table:formula="of:=1/[.D712]" office:value-type="float" office:value="0.0249376558603491" calcext:value-type="float">
            <text:p>0.0249376558603491</text:p>
          </table:table-cell>
          <table:table-cell table:formula="of:=LOG10([.E71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40.1" calcext:value-type="float">
            <text:p>40.1</text:p>
          </table:table-cell>
          <table:table-cell table:formula="of:=[.C713]/[.B713]" office:value-type="float" office:value="1402.51572327044" calcext:value-type="float">
            <text:p>1402.51572327044</text:p>
          </table:table-cell>
          <table:table-cell table:formula="of:=1/[.D713]" office:value-type="float" office:value="0.0249376558603491" calcext:value-type="float">
            <text:p>0.0249376558603491</text:p>
          </table:table-cell>
          <table:table-cell table:formula="of:=LOG10([.E713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4]/[.B714]" office:value-type="float" office:value="845.283018867925" calcext:value-type="float">
            <text:p>845.283018867925</text:p>
          </table:table-cell>
          <table:table-cell table:formula="of:=1/[.D714]" office:value-type="float" office:value="0.0249376558603491" calcext:value-type="float">
            <text:p>0.0249376558603491</text:p>
          </table:table-cell>
          <table:table-cell table:formula="of:=LOG10([.E71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5]/[.B715]" office:value-type="float" office:value="603.77358490566" calcext:value-type="float">
            <text:p>603.77358490566</text:p>
          </table:table-cell>
          <table:table-cell table:formula="of:=1/[.D715]" office:value-type="float" office:value="0.0249376558603491" calcext:value-type="float">
            <text:p>0.0249376558603491</text:p>
          </table:table-cell>
          <table:table-cell table:formula="of:=LOG10([.E71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6]/[.B716]" office:value-type="float" office:value="845.283018867925" calcext:value-type="float">
            <text:p>845.283018867925</text:p>
          </table:table-cell>
          <table:table-cell table:formula="of:=1/[.D716]" office:value-type="float" office:value="0.0249376558603491" calcext:value-type="float">
            <text:p>0.0249376558603491</text:p>
          </table:table-cell>
          <table:table-cell table:formula="of:=LOG10([.E71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7]/[.B717]" office:value-type="float" office:value="845.283018867925" calcext:value-type="float">
            <text:p>845.283018867925</text:p>
          </table:table-cell>
          <table:table-cell table:formula="of:=1/[.D717]" office:value-type="float" office:value="0.0249376558603491" calcext:value-type="float">
            <text:p>0.0249376558603491</text:p>
          </table:table-cell>
          <table:table-cell table:formula="of:=LOG10([.E71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8]/[.B718]" office:value-type="float" office:value="845.283018867925" calcext:value-type="float">
            <text:p>845.283018867925</text:p>
          </table:table-cell>
          <table:table-cell table:formula="of:=1/[.D718]" office:value-type="float" office:value="0.0249376558603491" calcext:value-type="float">
            <text:p>0.0249376558603491</text:p>
          </table:table-cell>
          <table:table-cell table:formula="of:=LOG10([.E71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.1" calcext:value-type="float">
            <text:p>40.1</text:p>
          </table:table-cell>
          <table:table-cell table:formula="of:=[.C719]/[.B719]" office:value-type="float" office:value="845.283018867925" calcext:value-type="float">
            <text:p>845.283018867925</text:p>
          </table:table-cell>
          <table:table-cell table:formula="of:=1/[.D719]" office:value-type="float" office:value="0.0249376558603491" calcext:value-type="float">
            <text:p>0.0249376558603491</text:p>
          </table:table-cell>
          <table:table-cell table:formula="of:=LOG10([.E71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0]/[.B720]" office:value-type="float" office:value="704.402515723271" calcext:value-type="float">
            <text:p>704.402515723271</text:p>
          </table:table-cell>
          <table:table-cell table:formula="of:=1/[.D720]" office:value-type="float" office:value="0.025" calcext:value-type="float">
            <text:p>0.025</text:p>
          </table:table-cell>
          <table:table-cell table:formula="of:=LOG10([.E72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1]/[.B721]" office:value-type="float" office:value="603.77358490566" calcext:value-type="float">
            <text:p>603.77358490566</text:p>
          </table:table-cell>
          <table:table-cell table:formula="of:=1/[.D721]" office:value-type="float" office:value="0.025" calcext:value-type="float">
            <text:p>0.025</text:p>
          </table:table-cell>
          <table:table-cell table:formula="of:=LOG10([.E72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2]/[.B722]" office:value-type="float" office:value="469.601677148847" calcext:value-type="float">
            <text:p>469.601677148847</text:p>
          </table:table-cell>
          <table:table-cell table:formula="of:=1/[.D722]" office:value-type="float" office:value="0.025" calcext:value-type="float">
            <text:p>0.025</text:p>
          </table:table-cell>
          <table:table-cell table:formula="of:=LOG10([.E722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3]/[.B723]" office:value-type="float" office:value="1056.60377358491" calcext:value-type="float">
            <text:p>1056.60377358491</text:p>
          </table:table-cell>
          <table:table-cell table:formula="of:=1/[.D723]" office:value-type="float" office:value="0.025" calcext:value-type="float">
            <text:p>0.025</text:p>
          </table:table-cell>
          <table:table-cell table:formula="of:=LOG10([.E72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40" calcext:value-type="float">
            <text:p>40</text:p>
          </table:table-cell>
          <table:table-cell table:formula="of:=[.C724]/[.B724]" office:value-type="float" office:value="841.509433962264" calcext:value-type="float">
            <text:p>841.509433962264</text:p>
          </table:table-cell>
          <table:table-cell table:formula="of:=1/[.D724]" office:value-type="float" office:value="0.025" calcext:value-type="float">
            <text:p>0.025</text:p>
          </table:table-cell>
          <table:table-cell table:formula="of:=LOG10([.E72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5]/[.B725]" office:value-type="float" office:value="845.283018867925" calcext:value-type="float">
            <text:p>845.283018867925</text:p>
          </table:table-cell>
          <table:table-cell table:formula="of:=1/[.D725]" office:value-type="float" office:value="0.025" calcext:value-type="float">
            <text:p>0.025</text:p>
          </table:table-cell>
          <table:table-cell table:formula="of:=LOG10([.E72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6]/[.B726]" office:value-type="float" office:value="845.283018867925" calcext:value-type="float">
            <text:p>845.283018867925</text:p>
          </table:table-cell>
          <table:table-cell table:formula="of:=1/[.D726]" office:value-type="float" office:value="0.025" calcext:value-type="float">
            <text:p>0.025</text:p>
          </table:table-cell>
          <table:table-cell table:formula="of:=LOG10([.E72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7]/[.B727]" office:value-type="float" office:value="4226.41509433962" calcext:value-type="float">
            <text:p>4226.41509433962</text:p>
          </table:table-cell>
          <table:table-cell table:formula="of:=1/[.D727]" office:value-type="float" office:value="0.025" calcext:value-type="float">
            <text:p>0.025</text:p>
          </table:table-cell>
          <table:table-cell table:formula="of:=LOG10([.E727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8]/[.B728]" office:value-type="float" office:value="1056.60377358491" calcext:value-type="float">
            <text:p>1056.60377358491</text:p>
          </table:table-cell>
          <table:table-cell table:formula="of:=1/[.D728]" office:value-type="float" office:value="0.025" calcext:value-type="float">
            <text:p>0.025</text:p>
          </table:table-cell>
          <table:table-cell table:formula="of:=LOG10([.E72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29]/[.B729]" office:value-type="float" office:value="845.283018867925" calcext:value-type="float">
            <text:p>845.283018867925</text:p>
          </table:table-cell>
          <table:table-cell table:formula="of:=1/[.D729]" office:value-type="float" office:value="0.025" calcext:value-type="float">
            <text:p>0.025</text:p>
          </table:table-cell>
          <table:table-cell table:formula="of:=LOG10([.E72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30]/[.B730]" office:value-type="float" office:value="1056.60377358491" calcext:value-type="float">
            <text:p>1056.60377358491</text:p>
          </table:table-cell>
          <table:table-cell table:formula="of:=1/[.D730]" office:value-type="float" office:value="0.025" calcext:value-type="float">
            <text:p>0.025</text:p>
          </table:table-cell>
          <table:table-cell table:formula="of:=LOG10([.E73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31]/[.B731]" office:value-type="float" office:value="845.283018867925" calcext:value-type="float">
            <text:p>845.283018867925</text:p>
          </table:table-cell>
          <table:table-cell table:formula="of:=1/[.D731]" office:value-type="float" office:value="0.025" calcext:value-type="float">
            <text:p>0.025</text:p>
          </table:table-cell>
          <table:table-cell table:formula="of:=LOG10([.E73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table:formula="of:=[.C732]/[.B732]" office:value-type="float" office:value="1056.60377358491" calcext:value-type="float">
            <text:p>1056.60377358491</text:p>
          </table:table-cell>
          <table:table-cell table:formula="of:=1/[.D732]" office:value-type="float" office:value="0.025" calcext:value-type="float">
            <text:p>0.025</text:p>
          </table:table-cell>
          <table:table-cell table:formula="of:=LOG10([.E73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40" calcext:value-type="float">
            <text:p>40</text:p>
          </table:table-cell>
          <table:table-cell table:formula="of:=[.C733]/[.B733]" office:value-type="float" office:value="1051.88679245283" calcext:value-type="float">
            <text:p>1051.88679245283</text:p>
          </table:table-cell>
          <table:table-cell table:formula="of:=1/[.D733]" office:value-type="float" office:value="0.025" calcext:value-type="float">
            <text:p>0.025</text:p>
          </table:table-cell>
          <table:table-cell table:formula="of:=LOG10([.E733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34]/[.B734]" office:value-type="float" office:value="1056.60377358491" calcext:value-type="float">
            <text:p>1056.60377358491</text:p>
          </table:table-cell>
          <table:table-cell table:formula="of:=1/[.D734]" office:value-type="float" office:value="0.025062656641604" calcext:value-type="float">
            <text:p>0.025062656641604</text:p>
          </table:table-cell>
          <table:table-cell table:formula="of:=LOG10([.E73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35]/[.B735]" office:value-type="float" office:value="1056.60377358491" calcext:value-type="float">
            <text:p>1056.60377358491</text:p>
          </table:table-cell>
          <table:table-cell table:formula="of:=1/[.D735]" office:value-type="float" office:value="0.025062656641604" calcext:value-type="float">
            <text:p>0.025062656641604</text:p>
          </table:table-cell>
          <table:table-cell table:formula="of:=LOG10([.E73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36]/[.B736]" office:value-type="float" office:value="845.283018867925" calcext:value-type="float">
            <text:p>845.283018867925</text:p>
          </table:table-cell>
          <table:table-cell table:formula="of:=1/[.D736]" office:value-type="float" office:value="0.025062656641604" calcext:value-type="float">
            <text:p>0.025062656641604</text:p>
          </table:table-cell>
          <table:table-cell table:formula="of:=LOG10([.E73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37]/[.B737]" office:value-type="float" office:value="704.402515723271" calcext:value-type="float">
            <text:p>704.402515723271</text:p>
          </table:table-cell>
          <table:table-cell table:formula="of:=1/[.D737]" office:value-type="float" office:value="0.025062656641604" calcext:value-type="float">
            <text:p>0.025062656641604</text:p>
          </table:table-cell>
          <table:table-cell table:formula="of:=LOG10([.E73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38]/[.B738]" office:value-type="float" office:value="704.402515723271" calcext:value-type="float">
            <text:p>704.402515723271</text:p>
          </table:table-cell>
          <table:table-cell table:formula="of:=1/[.D738]" office:value-type="float" office:value="0.025062656641604" calcext:value-type="float">
            <text:p>0.025062656641604</text:p>
          </table:table-cell>
          <table:table-cell table:formula="of:=LOG10([.E73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39]/[.B739]" office:value-type="float" office:value="704.402515723271" calcext:value-type="float">
            <text:p>704.402515723271</text:p>
          </table:table-cell>
          <table:table-cell table:formula="of:=1/[.D739]" office:value-type="float" office:value="0.025062656641604" calcext:value-type="float">
            <text:p>0.025062656641604</text:p>
          </table:table-cell>
          <table:table-cell table:formula="of:=LOG10([.E73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9.9" calcext:value-type="float">
            <text:p>39.9</text:p>
          </table:table-cell>
          <table:table-cell table:formula="of:=[.C740]/[.B740]" office:value-type="float" office:value="1051.88679245283" calcext:value-type="float">
            <text:p>1051.88679245283</text:p>
          </table:table-cell>
          <table:table-cell table:formula="of:=1/[.D740]" office:value-type="float" office:value="0.025062656641604" calcext:value-type="float">
            <text:p>0.025062656641604</text:p>
          </table:table-cell>
          <table:table-cell table:formula="of:=LOG10([.E740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1]/[.B741]" office:value-type="float" office:value="845.283018867925" calcext:value-type="float">
            <text:p>845.283018867925</text:p>
          </table:table-cell>
          <table:table-cell table:formula="of:=1/[.D741]" office:value-type="float" office:value="0.025062656641604" calcext:value-type="float">
            <text:p>0.025062656641604</text:p>
          </table:table-cell>
          <table:table-cell table:formula="of:=LOG10([.E74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2]/[.B742]" office:value-type="float" office:value="1056.60377358491" calcext:value-type="float">
            <text:p>1056.60377358491</text:p>
          </table:table-cell>
          <table:table-cell table:formula="of:=1/[.D742]" office:value-type="float" office:value="0.025062656641604" calcext:value-type="float">
            <text:p>0.025062656641604</text:p>
          </table:table-cell>
          <table:table-cell table:formula="of:=LOG10([.E74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3]/[.B743]" office:value-type="float" office:value="1056.60377358491" calcext:value-type="float">
            <text:p>1056.60377358491</text:p>
          </table:table-cell>
          <table:table-cell table:formula="of:=1/[.D743]" office:value-type="float" office:value="0.025062656641604" calcext:value-type="float">
            <text:p>0.025062656641604</text:p>
          </table:table-cell>
          <table:table-cell table:formula="of:=LOG10([.E74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4]/[.B744]" office:value-type="float" office:value="1056.60377358491" calcext:value-type="float">
            <text:p>1056.60377358491</text:p>
          </table:table-cell>
          <table:table-cell table:formula="of:=1/[.D744]" office:value-type="float" office:value="0.025062656641604" calcext:value-type="float">
            <text:p>0.025062656641604</text:p>
          </table:table-cell>
          <table:table-cell table:formula="of:=LOG10([.E74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5]/[.B745]" office:value-type="float" office:value="845.283018867925" calcext:value-type="float">
            <text:p>845.283018867925</text:p>
          </table:table-cell>
          <table:table-cell table:formula="of:=1/[.D745]" office:value-type="float" office:value="0.025062656641604" calcext:value-type="float">
            <text:p>0.025062656641604</text:p>
          </table:table-cell>
          <table:table-cell table:formula="of:=LOG10([.E74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6]/[.B746]" office:value-type="float" office:value="1056.60377358491" calcext:value-type="float">
            <text:p>1056.60377358491</text:p>
          </table:table-cell>
          <table:table-cell table:formula="of:=1/[.D746]" office:value-type="float" office:value="0.025062656641604" calcext:value-type="float">
            <text:p>0.025062656641604</text:p>
          </table:table-cell>
          <table:table-cell table:formula="of:=LOG10([.E74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7]/[.B747]" office:value-type="float" office:value="704.402515723271" calcext:value-type="float">
            <text:p>704.402515723271</text:p>
          </table:table-cell>
          <table:table-cell table:formula="of:=1/[.D747]" office:value-type="float" office:value="0.025062656641604" calcext:value-type="float">
            <text:p>0.025062656641604</text:p>
          </table:table-cell>
          <table:table-cell table:formula="of:=LOG10([.E74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8]/[.B748]" office:value-type="float" office:value="603.77358490566" calcext:value-type="float">
            <text:p>603.77358490566</text:p>
          </table:table-cell>
          <table:table-cell table:formula="of:=1/[.D748]" office:value-type="float" office:value="0.025062656641604" calcext:value-type="float">
            <text:p>0.025062656641604</text:p>
          </table:table-cell>
          <table:table-cell table:formula="of:=LOG10([.E74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9" calcext:value-type="float">
            <text:p>39.9</text:p>
          </table:table-cell>
          <table:table-cell table:formula="of:=[.C749]/[.B749]" office:value-type="float" office:value="603.77358490566" calcext:value-type="float">
            <text:p>603.77358490566</text:p>
          </table:table-cell>
          <table:table-cell table:formula="of:=1/[.D749]" office:value-type="float" office:value="0.025062656641604" calcext:value-type="float">
            <text:p>0.025062656641604</text:p>
          </table:table-cell>
          <table:table-cell table:formula="of:=LOG10([.E74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0]/[.B750]" office:value-type="float" office:value="528.301886792453" calcext:value-type="float">
            <text:p>528.301886792453</text:p>
          </table:table-cell>
          <table:table-cell table:formula="of:=1/[.D750]" office:value-type="float" office:value="0.0251256281407035" calcext:value-type="float">
            <text:p>0.0251256281407035</text:p>
          </table:table-cell>
          <table:table-cell table:formula="of:=LOG10([.E75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1]/[.B751]" office:value-type="float" office:value="603.77358490566" calcext:value-type="float">
            <text:p>603.77358490566</text:p>
          </table:table-cell>
          <table:table-cell table:formula="of:=1/[.D751]" office:value-type="float" office:value="0.0251256281407035" calcext:value-type="float">
            <text:p>0.0251256281407035</text:p>
          </table:table-cell>
          <table:table-cell table:formula="of:=LOG10([.E75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2]/[.B752]" office:value-type="float" office:value="603.77358490566" calcext:value-type="float">
            <text:p>603.77358490566</text:p>
          </table:table-cell>
          <table:table-cell table:formula="of:=1/[.D752]" office:value-type="float" office:value="0.0251256281407035" calcext:value-type="float">
            <text:p>0.0251256281407035</text:p>
          </table:table-cell>
          <table:table-cell table:formula="of:=LOG10([.E75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3]/[.B753]" office:value-type="float" office:value="845.283018867925" calcext:value-type="float">
            <text:p>845.283018867925</text:p>
          </table:table-cell>
          <table:table-cell table:formula="of:=1/[.D753]" office:value-type="float" office:value="0.0251256281407035" calcext:value-type="float">
            <text:p>0.0251256281407035</text:p>
          </table:table-cell>
          <table:table-cell table:formula="of:=LOG10([.E75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9.8" calcext:value-type="float">
            <text:p>39.8</text:p>
          </table:table-cell>
          <table:table-cell table:formula="of:=[.C754]/[.B754]" office:value-type="float" office:value="1051.88679245283" calcext:value-type="float">
            <text:p>1051.88679245283</text:p>
          </table:table-cell>
          <table:table-cell table:formula="of:=1/[.D754]" office:value-type="float" office:value="0.0251256281407035" calcext:value-type="float">
            <text:p>0.0251256281407035</text:p>
          </table:table-cell>
          <table:table-cell table:formula="of:=LOG10([.E754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9.8" calcext:value-type="float">
            <text:p>39.8</text:p>
          </table:table-cell>
          <table:table-cell table:formula="of:=[.C755]/[.B755]" office:value-type="float" office:value="1051.88679245283" calcext:value-type="float">
            <text:p>1051.88679245283</text:p>
          </table:table-cell>
          <table:table-cell table:formula="of:=1/[.D755]" office:value-type="float" office:value="0.0251256281407035" calcext:value-type="float">
            <text:p>0.0251256281407035</text:p>
          </table:table-cell>
          <table:table-cell table:formula="of:=LOG10([.E755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6]/[.B756]" office:value-type="float" office:value="1056.60377358491" calcext:value-type="float">
            <text:p>1056.60377358491</text:p>
          </table:table-cell>
          <table:table-cell table:formula="of:=1/[.D756]" office:value-type="float" office:value="0.0251256281407035" calcext:value-type="float">
            <text:p>0.0251256281407035</text:p>
          </table:table-cell>
          <table:table-cell table:formula="of:=LOG10([.E75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7]/[.B757]" office:value-type="float" office:value="1408.80503144654" calcext:value-type="float">
            <text:p>1408.80503144654</text:p>
          </table:table-cell>
          <table:table-cell table:formula="of:=1/[.D757]" office:value-type="float" office:value="0.0251256281407035" calcext:value-type="float">
            <text:p>0.0251256281407035</text:p>
          </table:table-cell>
          <table:table-cell table:formula="of:=LOG10([.E75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8]/[.B758]" office:value-type="float" office:value="1408.80503144654" calcext:value-type="float">
            <text:p>1408.80503144654</text:p>
          </table:table-cell>
          <table:table-cell table:formula="of:=1/[.D758]" office:value-type="float" office:value="0.0251256281407035" calcext:value-type="float">
            <text:p>0.0251256281407035</text:p>
          </table:table-cell>
          <table:table-cell table:formula="of:=LOG10([.E758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59]/[.B759]" office:value-type="float" office:value="1056.60377358491" calcext:value-type="float">
            <text:p>1056.60377358491</text:p>
          </table:table-cell>
          <table:table-cell table:formula="of:=1/[.D759]" office:value-type="float" office:value="0.0251256281407035" calcext:value-type="float">
            <text:p>0.0251256281407035</text:p>
          </table:table-cell>
          <table:table-cell table:formula="of:=LOG10([.E75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60]/[.B760]" office:value-type="float" office:value="1408.80503144654" calcext:value-type="float">
            <text:p>1408.80503144654</text:p>
          </table:table-cell>
          <table:table-cell table:formula="of:=1/[.D760]" office:value-type="float" office:value="0.0251256281407035" calcext:value-type="float">
            <text:p>0.0251256281407035</text:p>
          </table:table-cell>
          <table:table-cell table:formula="of:=LOG10([.E760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61]/[.B761]" office:value-type="float" office:value="1056.60377358491" calcext:value-type="float">
            <text:p>1056.60377358491</text:p>
          </table:table-cell>
          <table:table-cell table:formula="of:=1/[.D761]" office:value-type="float" office:value="0.0251256281407035" calcext:value-type="float">
            <text:p>0.0251256281407035</text:p>
          </table:table-cell>
          <table:table-cell table:formula="of:=LOG10([.E76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62]/[.B762]" office:value-type="float" office:value="704.402515723271" calcext:value-type="float">
            <text:p>704.402515723271</text:p>
          </table:table-cell>
          <table:table-cell table:formula="of:=1/[.D762]" office:value-type="float" office:value="0.0251256281407035" calcext:value-type="float">
            <text:p>0.0251256281407035</text:p>
          </table:table-cell>
          <table:table-cell table:formula="of:=LOG10([.E76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63]/[.B763]" office:value-type="float" office:value="1408.80503144654" calcext:value-type="float">
            <text:p>1408.80503144654</text:p>
          </table:table-cell>
          <table:table-cell table:formula="of:=1/[.D763]" office:value-type="float" office:value="0.0251256281407035" calcext:value-type="float">
            <text:p>0.0251256281407035</text:p>
          </table:table-cell>
          <table:table-cell table:formula="of:=LOG10([.E76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64]/[.B764]" office:value-type="float" office:value="845.283018867925" calcext:value-type="float">
            <text:p>845.283018867925</text:p>
          </table:table-cell>
          <table:table-cell table:formula="of:=1/[.D764]" office:value-type="float" office:value="0.0251256281407035" calcext:value-type="float">
            <text:p>0.0251256281407035</text:p>
          </table:table-cell>
          <table:table-cell table:formula="of:=LOG10([.E76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8" calcext:value-type="float">
            <text:p>39.8</text:p>
          </table:table-cell>
          <table:table-cell table:formula="of:=[.C765]/[.B765]" office:value-type="float" office:value="845.283018867925" calcext:value-type="float">
            <text:p>845.283018867925</text:p>
          </table:table-cell>
          <table:table-cell table:formula="of:=1/[.D765]" office:value-type="float" office:value="0.0251256281407035" calcext:value-type="float">
            <text:p>0.0251256281407035</text:p>
          </table:table-cell>
          <table:table-cell table:formula="of:=LOG10([.E76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9.7" calcext:value-type="float">
            <text:p>39.7</text:p>
          </table:table-cell>
          <table:table-cell table:formula="of:=[.C766]/[.B766]" office:value-type="float" office:value="841.509433962264" calcext:value-type="float">
            <text:p>841.509433962264</text:p>
          </table:table-cell>
          <table:table-cell table:formula="of:=1/[.D766]" office:value-type="float" office:value="0.0251889168765743" calcext:value-type="float">
            <text:p>0.0251889168765743</text:p>
          </table:table-cell>
          <table:table-cell table:formula="of:=LOG10([.E766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67]/[.B767]" office:value-type="float" office:value="1056.60377358491" calcext:value-type="float">
            <text:p>1056.60377358491</text:p>
          </table:table-cell>
          <table:table-cell table:formula="of:=1/[.D767]" office:value-type="float" office:value="0.0251889168765743" calcext:value-type="float">
            <text:p>0.0251889168765743</text:p>
          </table:table-cell>
          <table:table-cell table:formula="of:=LOG10([.E76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68]/[.B768]" office:value-type="float" office:value="1408.80503144654" calcext:value-type="float">
            <text:p>1408.80503144654</text:p>
          </table:table-cell>
          <table:table-cell table:formula="of:=1/[.D768]" office:value-type="float" office:value="0.0251889168765743" calcext:value-type="float">
            <text:p>0.0251889168765743</text:p>
          </table:table-cell>
          <table:table-cell table:formula="of:=LOG10([.E768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69]/[.B769]" office:value-type="float" office:value="1408.80503144654" calcext:value-type="float">
            <text:p>1408.80503144654</text:p>
          </table:table-cell>
          <table:table-cell table:formula="of:=1/[.D769]" office:value-type="float" office:value="0.0251889168765743" calcext:value-type="float">
            <text:p>0.0251889168765743</text:p>
          </table:table-cell>
          <table:table-cell table:formula="of:=LOG10([.E76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0]/[.B770]" office:value-type="float" office:value="845.283018867925" calcext:value-type="float">
            <text:p>845.283018867925</text:p>
          </table:table-cell>
          <table:table-cell table:formula="of:=1/[.D770]" office:value-type="float" office:value="0.0251889168765743" calcext:value-type="float">
            <text:p>0.0251889168765743</text:p>
          </table:table-cell>
          <table:table-cell table:formula="of:=LOG10([.E77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1]/[.B771]" office:value-type="float" office:value="603.77358490566" calcext:value-type="float">
            <text:p>603.77358490566</text:p>
          </table:table-cell>
          <table:table-cell table:formula="of:=1/[.D771]" office:value-type="float" office:value="0.0251889168765743" calcext:value-type="float">
            <text:p>0.0251889168765743</text:p>
          </table:table-cell>
          <table:table-cell table:formula="of:=LOG10([.E77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2]/[.B772]" office:value-type="float" office:value="704.402515723271" calcext:value-type="float">
            <text:p>704.402515723271</text:p>
          </table:table-cell>
          <table:table-cell table:formula="of:=1/[.D772]" office:value-type="float" office:value="0.0251889168765743" calcext:value-type="float">
            <text:p>0.0251889168765743</text:p>
          </table:table-cell>
          <table:table-cell table:formula="of:=LOG10([.E77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3]/[.B773]" office:value-type="float" office:value="845.283018867925" calcext:value-type="float">
            <text:p>845.283018867925</text:p>
          </table:table-cell>
          <table:table-cell table:formula="of:=1/[.D773]" office:value-type="float" office:value="0.0251889168765743" calcext:value-type="float">
            <text:p>0.0251889168765743</text:p>
          </table:table-cell>
          <table:table-cell table:formula="of:=LOG10([.E77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4]/[.B774]" office:value-type="float" office:value="1056.60377358491" calcext:value-type="float">
            <text:p>1056.60377358491</text:p>
          </table:table-cell>
          <table:table-cell table:formula="of:=1/[.D774]" office:value-type="float" office:value="0.0251889168765743" calcext:value-type="float">
            <text:p>0.0251889168765743</text:p>
          </table:table-cell>
          <table:table-cell table:formula="of:=LOG10([.E77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5]/[.B775]" office:value-type="float" office:value="603.77358490566" calcext:value-type="float">
            <text:p>603.77358490566</text:p>
          </table:table-cell>
          <table:table-cell table:formula="of:=1/[.D775]" office:value-type="float" office:value="0.0251889168765743" calcext:value-type="float">
            <text:p>0.0251889168765743</text:p>
          </table:table-cell>
          <table:table-cell table:formula="of:=LOG10([.E77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6]/[.B776]" office:value-type="float" office:value="1056.60377358491" calcext:value-type="float">
            <text:p>1056.60377358491</text:p>
          </table:table-cell>
          <table:table-cell table:formula="of:=1/[.D776]" office:value-type="float" office:value="0.0251889168765743" calcext:value-type="float">
            <text:p>0.0251889168765743</text:p>
          </table:table-cell>
          <table:table-cell table:formula="of:=LOG10([.E77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7]/[.B777]" office:value-type="float" office:value="845.283018867925" calcext:value-type="float">
            <text:p>845.283018867925</text:p>
          </table:table-cell>
          <table:table-cell table:formula="of:=1/[.D777]" office:value-type="float" office:value="0.0251889168765743" calcext:value-type="float">
            <text:p>0.0251889168765743</text:p>
          </table:table-cell>
          <table:table-cell table:formula="of:=LOG10([.E77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7" calcext:value-type="float">
            <text:p>39.7</text:p>
          </table:table-cell>
          <table:table-cell table:formula="of:=[.C778]/[.B778]" office:value-type="float" office:value="845.283018867925" calcext:value-type="float">
            <text:p>845.283018867925</text:p>
          </table:table-cell>
          <table:table-cell table:formula="of:=1/[.D778]" office:value-type="float" office:value="0.0251889168765743" calcext:value-type="float">
            <text:p>0.0251889168765743</text:p>
          </table:table-cell>
          <table:table-cell table:formula="of:=LOG10([.E77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79]/[.B779]" office:value-type="float" office:value="845.283018867925" calcext:value-type="float">
            <text:p>845.283018867925</text:p>
          </table:table-cell>
          <table:table-cell table:formula="of:=1/[.D779]" office:value-type="float" office:value="0.0252525252525253" calcext:value-type="float">
            <text:p>0.0252525252525253</text:p>
          </table:table-cell>
          <table:table-cell table:formula="of:=LOG10([.E77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0]/[.B780]" office:value-type="float" office:value="704.402515723271" calcext:value-type="float">
            <text:p>704.402515723271</text:p>
          </table:table-cell>
          <table:table-cell table:formula="of:=1/[.D780]" office:value-type="float" office:value="0.0252525252525253" calcext:value-type="float">
            <text:p>0.0252525252525253</text:p>
          </table:table-cell>
          <table:table-cell table:formula="of:=LOG10([.E78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1]/[.B781]" office:value-type="float" office:value="1056.60377358491" calcext:value-type="float">
            <text:p>1056.60377358491</text:p>
          </table:table-cell>
          <table:table-cell table:formula="of:=1/[.D781]" office:value-type="float" office:value="0.0252525252525253" calcext:value-type="float">
            <text:p>0.0252525252525253</text:p>
          </table:table-cell>
          <table:table-cell table:formula="of:=LOG10([.E78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2]/[.B782]" office:value-type="float" office:value="1056.60377358491" calcext:value-type="float">
            <text:p>1056.60377358491</text:p>
          </table:table-cell>
          <table:table-cell table:formula="of:=1/[.D782]" office:value-type="float" office:value="0.0252525252525253" calcext:value-type="float">
            <text:p>0.0252525252525253</text:p>
          </table:table-cell>
          <table:table-cell table:formula="of:=LOG10([.E78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3]/[.B783]" office:value-type="float" office:value="704.402515723271" calcext:value-type="float">
            <text:p>704.402515723271</text:p>
          </table:table-cell>
          <table:table-cell table:formula="of:=1/[.D783]" office:value-type="float" office:value="0.0252525252525253" calcext:value-type="float">
            <text:p>0.0252525252525253</text:p>
          </table:table-cell>
          <table:table-cell table:formula="of:=LOG10([.E78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4]/[.B784]" office:value-type="float" office:value="2113.20754716981" calcext:value-type="float">
            <text:p>2113.20754716981</text:p>
          </table:table-cell>
          <table:table-cell table:formula="of:=1/[.D784]" office:value-type="float" office:value="0.0252525252525253" calcext:value-type="float">
            <text:p>0.0252525252525253</text:p>
          </table:table-cell>
          <table:table-cell table:formula="of:=LOG10([.E784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5]/[.B785]" office:value-type="float" office:value="1408.80503144654" calcext:value-type="float">
            <text:p>1408.80503144654</text:p>
          </table:table-cell>
          <table:table-cell table:formula="of:=1/[.D785]" office:value-type="float" office:value="0.0252525252525253" calcext:value-type="float">
            <text:p>0.0252525252525253</text:p>
          </table:table-cell>
          <table:table-cell table:formula="of:=LOG10([.E78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6]/[.B786]" office:value-type="float" office:value="704.402515723271" calcext:value-type="float">
            <text:p>704.402515723271</text:p>
          </table:table-cell>
          <table:table-cell table:formula="of:=1/[.D786]" office:value-type="float" office:value="0.0252525252525253" calcext:value-type="float">
            <text:p>0.0252525252525253</text:p>
          </table:table-cell>
          <table:table-cell table:formula="of:=LOG10([.E78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7]/[.B787]" office:value-type="float" office:value="528.301886792453" calcext:value-type="float">
            <text:p>528.301886792453</text:p>
          </table:table-cell>
          <table:table-cell table:formula="of:=1/[.D787]" office:value-type="float" office:value="0.0252525252525253" calcext:value-type="float">
            <text:p>0.0252525252525253</text:p>
          </table:table-cell>
          <table:table-cell table:formula="of:=LOG10([.E78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9.6" calcext:value-type="float">
            <text:p>39.6</text:p>
          </table:table-cell>
          <table:table-cell table:formula="of:=[.C788]/[.B788]" office:value-type="float" office:value="841.509433962264" calcext:value-type="float">
            <text:p>841.509433962264</text:p>
          </table:table-cell>
          <table:table-cell table:formula="of:=1/[.D788]" office:value-type="float" office:value="0.0252525252525253" calcext:value-type="float">
            <text:p>0.0252525252525253</text:p>
          </table:table-cell>
          <table:table-cell table:formula="of:=LOG10([.E788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89]/[.B789]" office:value-type="float" office:value="1056.60377358491" calcext:value-type="float">
            <text:p>1056.60377358491</text:p>
          </table:table-cell>
          <table:table-cell table:formula="of:=1/[.D789]" office:value-type="float" office:value="0.0252525252525253" calcext:value-type="float">
            <text:p>0.0252525252525253</text:p>
          </table:table-cell>
          <table:table-cell table:formula="of:=LOG10([.E78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90]/[.B790]" office:value-type="float" office:value="1056.60377358491" calcext:value-type="float">
            <text:p>1056.60377358491</text:p>
          </table:table-cell>
          <table:table-cell table:formula="of:=1/[.D790]" office:value-type="float" office:value="0.0252525252525253" calcext:value-type="float">
            <text:p>0.0252525252525253</text:p>
          </table:table-cell>
          <table:table-cell table:formula="of:=LOG10([.E79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91]/[.B791]" office:value-type="float" office:value="1056.60377358491" calcext:value-type="float">
            <text:p>1056.60377358491</text:p>
          </table:table-cell>
          <table:table-cell table:formula="of:=1/[.D791]" office:value-type="float" office:value="0.0252525252525253" calcext:value-type="float">
            <text:p>0.0252525252525253</text:p>
          </table:table-cell>
          <table:table-cell table:formula="of:=LOG10([.E79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92]/[.B792]" office:value-type="float" office:value="1056.60377358491" calcext:value-type="float">
            <text:p>1056.60377358491</text:p>
          </table:table-cell>
          <table:table-cell table:formula="of:=1/[.D792]" office:value-type="float" office:value="0.0252525252525253" calcext:value-type="float">
            <text:p>0.0252525252525253</text:p>
          </table:table-cell>
          <table:table-cell table:formula="of:=LOG10([.E79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93]/[.B793]" office:value-type="float" office:value="845.283018867925" calcext:value-type="float">
            <text:p>845.283018867925</text:p>
          </table:table-cell>
          <table:table-cell table:formula="of:=1/[.D793]" office:value-type="float" office:value="0.0252525252525253" calcext:value-type="float">
            <text:p>0.0252525252525253</text:p>
          </table:table-cell>
          <table:table-cell table:formula="of:=LOG10([.E79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6" calcext:value-type="float">
            <text:p>39.6</text:p>
          </table:table-cell>
          <table:table-cell table:formula="of:=[.C794]/[.B794]" office:value-type="float" office:value="603.77358490566" calcext:value-type="float">
            <text:p>603.77358490566</text:p>
          </table:table-cell>
          <table:table-cell table:formula="of:=1/[.D794]" office:value-type="float" office:value="0.0252525252525253" calcext:value-type="float">
            <text:p>0.0252525252525253</text:p>
          </table:table-cell>
          <table:table-cell table:formula="of:=LOG10([.E79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795]/[.B795]" office:value-type="float" office:value="704.402515723271" calcext:value-type="float">
            <text:p>704.402515723271</text:p>
          </table:table-cell>
          <table:table-cell table:formula="of:=1/[.D795]" office:value-type="float" office:value="0.0253164556962025" calcext:value-type="float">
            <text:p>0.0253164556962025</text:p>
          </table:table-cell>
          <table:table-cell table:formula="of:=LOG10([.E79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796]/[.B796]" office:value-type="float" office:value="704.402515723271" calcext:value-type="float">
            <text:p>704.402515723271</text:p>
          </table:table-cell>
          <table:table-cell table:formula="of:=1/[.D796]" office:value-type="float" office:value="0.0253164556962025" calcext:value-type="float">
            <text:p>0.0253164556962025</text:p>
          </table:table-cell>
          <table:table-cell table:formula="of:=LOG10([.E79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797]/[.B797]" office:value-type="float" office:value="704.402515723271" calcext:value-type="float">
            <text:p>704.402515723271</text:p>
          </table:table-cell>
          <table:table-cell table:formula="of:=1/[.D797]" office:value-type="float" office:value="0.0253164556962025" calcext:value-type="float">
            <text:p>0.0253164556962025</text:p>
          </table:table-cell>
          <table:table-cell table:formula="of:=LOG10([.E79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798]/[.B798]" office:value-type="float" office:value="845.283018867925" calcext:value-type="float">
            <text:p>845.283018867925</text:p>
          </table:table-cell>
          <table:table-cell table:formula="of:=1/[.D798]" office:value-type="float" office:value="0.0253164556962025" calcext:value-type="float">
            <text:p>0.0253164556962025</text:p>
          </table:table-cell>
          <table:table-cell table:formula="of:=LOG10([.E79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799]/[.B799]" office:value-type="float" office:value="845.283018867925" calcext:value-type="float">
            <text:p>845.283018867925</text:p>
          </table:table-cell>
          <table:table-cell table:formula="of:=1/[.D799]" office:value-type="float" office:value="0.0253164556962025" calcext:value-type="float">
            <text:p>0.0253164556962025</text:p>
          </table:table-cell>
          <table:table-cell table:formula="of:=LOG10([.E79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0]/[.B800]" office:value-type="float" office:value="704.402515723271" calcext:value-type="float">
            <text:p>704.402515723271</text:p>
          </table:table-cell>
          <table:table-cell table:formula="of:=1/[.D800]" office:value-type="float" office:value="0.0253164556962025" calcext:value-type="float">
            <text:p>0.0253164556962025</text:p>
          </table:table-cell>
          <table:table-cell table:formula="of:=LOG10([.E80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1]/[.B801]" office:value-type="float" office:value="704.402515723271" calcext:value-type="float">
            <text:p>704.402515723271</text:p>
          </table:table-cell>
          <table:table-cell table:formula="of:=1/[.D801]" office:value-type="float" office:value="0.0253164556962025" calcext:value-type="float">
            <text:p>0.0253164556962025</text:p>
          </table:table-cell>
          <table:table-cell table:formula="of:=LOG10([.E80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2]/[.B802]" office:value-type="float" office:value="704.402515723271" calcext:value-type="float">
            <text:p>704.402515723271</text:p>
          </table:table-cell>
          <table:table-cell table:formula="of:=1/[.D802]" office:value-type="float" office:value="0.0253164556962025" calcext:value-type="float">
            <text:p>0.0253164556962025</text:p>
          </table:table-cell>
          <table:table-cell table:formula="of:=LOG10([.E80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3]/[.B803]" office:value-type="float" office:value="704.402515723271" calcext:value-type="float">
            <text:p>704.402515723271</text:p>
          </table:table-cell>
          <table:table-cell table:formula="of:=1/[.D803]" office:value-type="float" office:value="0.0253164556962025" calcext:value-type="float">
            <text:p>0.0253164556962025</text:p>
          </table:table-cell>
          <table:table-cell table:formula="of:=LOG10([.E80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4]/[.B804]" office:value-type="float" office:value="1056.60377358491" calcext:value-type="float">
            <text:p>1056.60377358491</text:p>
          </table:table-cell>
          <table:table-cell table:formula="of:=1/[.D804]" office:value-type="float" office:value="0.0253164556962025" calcext:value-type="float">
            <text:p>0.0253164556962025</text:p>
          </table:table-cell>
          <table:table-cell table:formula="of:=LOG10([.E80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5]/[.B805]" office:value-type="float" office:value="1056.60377358491" calcext:value-type="float">
            <text:p>1056.60377358491</text:p>
          </table:table-cell>
          <table:table-cell table:formula="of:=1/[.D805]" office:value-type="float" office:value="0.0253164556962025" calcext:value-type="float">
            <text:p>0.0253164556962025</text:p>
          </table:table-cell>
          <table:table-cell table:formula="of:=LOG10([.E80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6]/[.B806]" office:value-type="float" office:value="845.283018867925" calcext:value-type="float">
            <text:p>845.283018867925</text:p>
          </table:table-cell>
          <table:table-cell table:formula="of:=1/[.D806]" office:value-type="float" office:value="0.0253164556962025" calcext:value-type="float">
            <text:p>0.0253164556962025</text:p>
          </table:table-cell>
          <table:table-cell table:formula="of:=LOG10([.E80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7]/[.B807]" office:value-type="float" office:value="1056.60377358491" calcext:value-type="float">
            <text:p>1056.60377358491</text:p>
          </table:table-cell>
          <table:table-cell table:formula="of:=1/[.D807]" office:value-type="float" office:value="0.0253164556962025" calcext:value-type="float">
            <text:p>0.0253164556962025</text:p>
          </table:table-cell>
          <table:table-cell table:formula="of:=LOG10([.E80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8]/[.B808]" office:value-type="float" office:value="845.283018867925" calcext:value-type="float">
            <text:p>845.283018867925</text:p>
          </table:table-cell>
          <table:table-cell table:formula="of:=1/[.D808]" office:value-type="float" office:value="0.0253164556962025" calcext:value-type="float">
            <text:p>0.0253164556962025</text:p>
          </table:table-cell>
          <table:table-cell table:formula="of:=LOG10([.E80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09]/[.B809]" office:value-type="float" office:value="1056.60377358491" calcext:value-type="float">
            <text:p>1056.60377358491</text:p>
          </table:table-cell>
          <table:table-cell table:formula="of:=1/[.D809]" office:value-type="float" office:value="0.0253164556962025" calcext:value-type="float">
            <text:p>0.0253164556962025</text:p>
          </table:table-cell>
          <table:table-cell table:formula="of:=LOG10([.E80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10]/[.B810]" office:value-type="float" office:value="1408.80503144654" calcext:value-type="float">
            <text:p>1408.80503144654</text:p>
          </table:table-cell>
          <table:table-cell table:formula="of:=1/[.D810]" office:value-type="float" office:value="0.0253164556962025" calcext:value-type="float">
            <text:p>0.0253164556962025</text:p>
          </table:table-cell>
          <table:table-cell table:formula="of:=LOG10([.E810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11]/[.B811]" office:value-type="float" office:value="845.283018867925" calcext:value-type="float">
            <text:p>845.283018867925</text:p>
          </table:table-cell>
          <table:table-cell table:formula="of:=1/[.D811]" office:value-type="float" office:value="0.0253164556962025" calcext:value-type="float">
            <text:p>0.0253164556962025</text:p>
          </table:table-cell>
          <table:table-cell table:formula="of:=LOG10([.E81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12]/[.B812]" office:value-type="float" office:value="2113.20754716981" calcext:value-type="float">
            <text:p>2113.20754716981</text:p>
          </table:table-cell>
          <table:table-cell table:formula="of:=1/[.D812]" office:value-type="float" office:value="0.0253807106598985" calcext:value-type="float">
            <text:p>0.0253807106598985</text:p>
          </table:table-cell>
          <table:table-cell table:formula="of:=LOG10([.E812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9.5" calcext:value-type="float">
            <text:p>39.5</text:p>
          </table:table-cell>
          <table:table-cell table:formula="of:=[.C813]/[.B813]" office:value-type="float" office:value="4207.54716981132" calcext:value-type="float">
            <text:p>4207.54716981132</text:p>
          </table:table-cell>
          <table:table-cell table:formula="of:=1/[.D813]" office:value-type="float" office:value="0.0253164556962025" calcext:value-type="float">
            <text:p>0.0253164556962025</text:p>
          </table:table-cell>
          <table:table-cell table:formula="of:=LOG10([.E813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9.5" calcext:value-type="float">
            <text:p>39.5</text:p>
          </table:table-cell>
          <table:table-cell table:formula="of:=[.C814]/[.B814]" office:value-type="float" office:value="2113.20754716981" calcext:value-type="float">
            <text:p>2113.20754716981</text:p>
          </table:table-cell>
          <table:table-cell table:formula="of:=1/[.D814]" office:value-type="float" office:value="0.0253164556962025" calcext:value-type="float">
            <text:p>0.0253164556962025</text:p>
          </table:table-cell>
          <table:table-cell table:formula="of:=LOG10([.E814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15]/[.B815]" office:value-type="float" office:value="1408.80503144654" calcext:value-type="float">
            <text:p>1408.80503144654</text:p>
          </table:table-cell>
          <table:table-cell table:formula="of:=1/[.D815]" office:value-type="float" office:value="0.0253807106598985" calcext:value-type="float">
            <text:p>0.0253807106598985</text:p>
          </table:table-cell>
          <table:table-cell table:formula="of:=LOG10([.E81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16]/[.B816]" office:value-type="float" office:value="1056.60377358491" calcext:value-type="float">
            <text:p>1056.60377358491</text:p>
          </table:table-cell>
          <table:table-cell table:formula="of:=1/[.D816]" office:value-type="float" office:value="0.0253807106598985" calcext:value-type="float">
            <text:p>0.0253807106598985</text:p>
          </table:table-cell>
          <table:table-cell table:formula="of:=LOG10([.E81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17]/[.B817]" office:value-type="float" office:value="845.283018867925" calcext:value-type="float">
            <text:p>845.283018867925</text:p>
          </table:table-cell>
          <table:table-cell table:formula="of:=1/[.D817]" office:value-type="float" office:value="0.0253807106598985" calcext:value-type="float">
            <text:p>0.0253807106598985</text:p>
          </table:table-cell>
          <table:table-cell table:formula="of:=LOG10([.E81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18]/[.B818]" office:value-type="float" office:value="603.77358490566" calcext:value-type="float">
            <text:p>603.77358490566</text:p>
          </table:table-cell>
          <table:table-cell table:formula="of:=1/[.D818]" office:value-type="float" office:value="0.0253807106598985" calcext:value-type="float">
            <text:p>0.0253807106598985</text:p>
          </table:table-cell>
          <table:table-cell table:formula="of:=LOG10([.E81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19]/[.B819]" office:value-type="float" office:value="1408.80503144654" calcext:value-type="float">
            <text:p>1408.80503144654</text:p>
          </table:table-cell>
          <table:table-cell table:formula="of:=1/[.D819]" office:value-type="float" office:value="0.0253807106598985" calcext:value-type="float">
            <text:p>0.0253807106598985</text:p>
          </table:table-cell>
          <table:table-cell table:formula="of:=LOG10([.E81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3" calcext:value-type="float">
            <text:p>2.23</text:p>
          </table:table-cell>
          <table:table-cell office:value-type="float" office:value="39.4" calcext:value-type="float">
            <text:p>39.4</text:p>
          </table:table-cell>
          <table:table-cell table:formula="of:=[.C820]/[.B820]" office:value-type="float" office:value="2103.77358490566" calcext:value-type="float">
            <text:p>2103.77358490566</text:p>
          </table:table-cell>
          <table:table-cell table:formula="of:=1/[.D820]" office:value-type="float" office:value="0.0253807106598985" calcext:value-type="float">
            <text:p>0.0253807106598985</text:p>
          </table:table-cell>
          <table:table-cell table:formula="of:=LOG10([.E820])" office:value-type="float" office:value="3.32299899778339" calcext:value-type="float">
            <text:p>3.3229989977833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1]/[.B821]" office:value-type="float" office:value="528.301886792453" calcext:value-type="float">
            <text:p>528.301886792453</text:p>
          </table:table-cell>
          <table:table-cell table:formula="of:=1/[.D821]" office:value-type="float" office:value="0.0253807106598985" calcext:value-type="float">
            <text:p>0.0253807106598985</text:p>
          </table:table-cell>
          <table:table-cell table:formula="of:=LOG10([.E821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2]/[.B822]" office:value-type="float" office:value="528.301886792453" calcext:value-type="float">
            <text:p>528.301886792453</text:p>
          </table:table-cell>
          <table:table-cell table:formula="of:=1/[.D822]" office:value-type="float" office:value="0.0253807106598985" calcext:value-type="float">
            <text:p>0.0253807106598985</text:p>
          </table:table-cell>
          <table:table-cell table:formula="of:=LOG10([.E82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3]/[.B823]" office:value-type="float" office:value="528.301886792453" calcext:value-type="float">
            <text:p>528.301886792453</text:p>
          </table:table-cell>
          <table:table-cell table:formula="of:=1/[.D823]" office:value-type="float" office:value="0.0253807106598985" calcext:value-type="float">
            <text:p>0.0253807106598985</text:p>
          </table:table-cell>
          <table:table-cell table:formula="of:=LOG10([.E82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4]/[.B824]" office:value-type="float" office:value="528.301886792453" calcext:value-type="float">
            <text:p>528.301886792453</text:p>
          </table:table-cell>
          <table:table-cell table:formula="of:=1/[.D824]" office:value-type="float" office:value="0.0253807106598985" calcext:value-type="float">
            <text:p>0.0253807106598985</text:p>
          </table:table-cell>
          <table:table-cell table:formula="of:=LOG10([.E824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5]/[.B825]" office:value-type="float" office:value="528.301886792453" calcext:value-type="float">
            <text:p>528.301886792453</text:p>
          </table:table-cell>
          <table:table-cell table:formula="of:=1/[.D825]" office:value-type="float" office:value="0.0253807106598985" calcext:value-type="float">
            <text:p>0.0253807106598985</text:p>
          </table:table-cell>
          <table:table-cell table:formula="of:=LOG10([.E825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6]/[.B826]" office:value-type="float" office:value="528.301886792453" calcext:value-type="float">
            <text:p>528.301886792453</text:p>
          </table:table-cell>
          <table:table-cell table:formula="of:=1/[.D826]" office:value-type="float" office:value="0.0253807106598985" calcext:value-type="float">
            <text:p>0.0253807106598985</text:p>
          </table:table-cell>
          <table:table-cell table:formula="of:=LOG10([.E826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7]/[.B827]" office:value-type="float" office:value="704.402515723271" calcext:value-type="float">
            <text:p>704.402515723271</text:p>
          </table:table-cell>
          <table:table-cell table:formula="of:=1/[.D827]" office:value-type="float" office:value="0.0253807106598985" calcext:value-type="float">
            <text:p>0.0253807106598985</text:p>
          </table:table-cell>
          <table:table-cell table:formula="of:=LOG10([.E82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8]/[.B828]" office:value-type="float" office:value="528.301886792453" calcext:value-type="float">
            <text:p>528.301886792453</text:p>
          </table:table-cell>
          <table:table-cell table:formula="of:=1/[.D828]" office:value-type="float" office:value="0.0253807106598985" calcext:value-type="float">
            <text:p>0.0253807106598985</text:p>
          </table:table-cell>
          <table:table-cell table:formula="of:=LOG10([.E828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4" calcext:value-type="float">
            <text:p>39.4</text:p>
          </table:table-cell>
          <table:table-cell table:formula="of:=[.C829]/[.B829]" office:value-type="float" office:value="603.77358490566" calcext:value-type="float">
            <text:p>603.77358490566</text:p>
          </table:table-cell>
          <table:table-cell table:formula="of:=1/[.D829]" office:value-type="float" office:value="0.0253807106598985" calcext:value-type="float">
            <text:p>0.0253807106598985</text:p>
          </table:table-cell>
          <table:table-cell table:formula="of:=LOG10([.E829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0]/[.B830]" office:value-type="float" office:value="528.301886792453" calcext:value-type="float">
            <text:p>528.301886792453</text:p>
          </table:table-cell>
          <table:table-cell table:formula="of:=1/[.D830]" office:value-type="float" office:value="0.0254452926208651" calcext:value-type="float">
            <text:p>0.0254452926208651</text:p>
          </table:table-cell>
          <table:table-cell table:formula="of:=LOG10([.E83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1]/[.B831]" office:value-type="float" office:value="528.301886792453" calcext:value-type="float">
            <text:p>528.301886792453</text:p>
          </table:table-cell>
          <table:table-cell table:formula="of:=1/[.D831]" office:value-type="float" office:value="0.0254452926208651" calcext:value-type="float">
            <text:p>0.0254452926208651</text:p>
          </table:table-cell>
          <table:table-cell table:formula="of:=LOG10([.E831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2]/[.B832]" office:value-type="float" office:value="603.77358490566" calcext:value-type="float">
            <text:p>603.77358490566</text:p>
          </table:table-cell>
          <table:table-cell table:formula="of:=1/[.D832]" office:value-type="float" office:value="0.0254452926208651" calcext:value-type="float">
            <text:p>0.0254452926208651</text:p>
          </table:table-cell>
          <table:table-cell table:formula="of:=LOG10([.E83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3]/[.B833]" office:value-type="float" office:value="528.301886792453" calcext:value-type="float">
            <text:p>528.301886792453</text:p>
          </table:table-cell>
          <table:table-cell table:formula="of:=1/[.D833]" office:value-type="float" office:value="0.0254452926208651" calcext:value-type="float">
            <text:p>0.0254452926208651</text:p>
          </table:table-cell>
          <table:table-cell table:formula="of:=LOG10([.E833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4]/[.B834]" office:value-type="float" office:value="603.77358490566" calcext:value-type="float">
            <text:p>603.77358490566</text:p>
          </table:table-cell>
          <table:table-cell table:formula="of:=1/[.D834]" office:value-type="float" office:value="0.0254452926208651" calcext:value-type="float">
            <text:p>0.0254452926208651</text:p>
          </table:table-cell>
          <table:table-cell table:formula="of:=LOG10([.E83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5]/[.B835]" office:value-type="float" office:value="469.601677148847" calcext:value-type="float">
            <text:p>469.601677148847</text:p>
          </table:table-cell>
          <table:table-cell table:formula="of:=1/[.D835]" office:value-type="float" office:value="0.0254452926208651" calcext:value-type="float">
            <text:p>0.0254452926208651</text:p>
          </table:table-cell>
          <table:table-cell table:formula="of:=LOG10([.E835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6]/[.B836]" office:value-type="float" office:value="469.601677148847" calcext:value-type="float">
            <text:p>469.601677148847</text:p>
          </table:table-cell>
          <table:table-cell table:formula="of:=1/[.D836]" office:value-type="float" office:value="0.0254452926208651" calcext:value-type="float">
            <text:p>0.0254452926208651</text:p>
          </table:table-cell>
          <table:table-cell table:formula="of:=LOG10([.E836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7]/[.B837]" office:value-type="float" office:value="469.601677148847" calcext:value-type="float">
            <text:p>469.601677148847</text:p>
          </table:table-cell>
          <table:table-cell table:formula="of:=1/[.D837]" office:value-type="float" office:value="0.0254452926208651" calcext:value-type="float">
            <text:p>0.0254452926208651</text:p>
          </table:table-cell>
          <table:table-cell table:formula="of:=LOG10([.E837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8]/[.B838]" office:value-type="float" office:value="603.77358490566" calcext:value-type="float">
            <text:p>603.77358490566</text:p>
          </table:table-cell>
          <table:table-cell table:formula="of:=1/[.D838]" office:value-type="float" office:value="0.0254452926208651" calcext:value-type="float">
            <text:p>0.0254452926208651</text:p>
          </table:table-cell>
          <table:table-cell table:formula="of:=LOG10([.E83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39]/[.B839]" office:value-type="float" office:value="1408.80503144654" calcext:value-type="float">
            <text:p>1408.80503144654</text:p>
          </table:table-cell>
          <table:table-cell table:formula="of:=1/[.D839]" office:value-type="float" office:value="0.0254452926208651" calcext:value-type="float">
            <text:p>0.0254452926208651</text:p>
          </table:table-cell>
          <table:table-cell table:formula="of:=LOG10([.E83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40]/[.B840]" office:value-type="float" office:value="1056.60377358491" calcext:value-type="float">
            <text:p>1056.60377358491</text:p>
          </table:table-cell>
          <table:table-cell table:formula="of:=1/[.D840]" office:value-type="float" office:value="0.0254452926208651" calcext:value-type="float">
            <text:p>0.0254452926208651</text:p>
          </table:table-cell>
          <table:table-cell table:formula="of:=LOG10([.E84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3" calcext:value-type="float">
            <text:p>39.3</text:p>
          </table:table-cell>
          <table:table-cell table:formula="of:=[.C841]/[.B841]" office:value-type="float" office:value="704.402515723271" calcext:value-type="float">
            <text:p>704.402515723271</text:p>
          </table:table-cell>
          <table:table-cell table:formula="of:=1/[.D841]" office:value-type="float" office:value="0.0254452926208651" calcext:value-type="float">
            <text:p>0.0254452926208651</text:p>
          </table:table-cell>
          <table:table-cell table:formula="of:=LOG10([.E84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2]/[.B842]" office:value-type="float" office:value="1408.80503144654" calcext:value-type="float">
            <text:p>1408.80503144654</text:p>
          </table:table-cell>
          <table:table-cell table:formula="of:=1/[.D842]" office:value-type="float" office:value="0.0255102040816327" calcext:value-type="float">
            <text:p>0.0255102040816327</text:p>
          </table:table-cell>
          <table:table-cell table:formula="of:=LOG10([.E84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3]/[.B843]" office:value-type="float" office:value="4226.41509433962" calcext:value-type="float">
            <text:p>4226.41509433962</text:p>
          </table:table-cell>
          <table:table-cell table:formula="of:=1/[.D843]" office:value-type="float" office:value="0.0255102040816327" calcext:value-type="float">
            <text:p>0.0255102040816327</text:p>
          </table:table-cell>
          <table:table-cell table:formula="of:=LOG10([.E843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4]/[.B844]" office:value-type="float" office:value="704.402515723271" calcext:value-type="float">
            <text:p>704.402515723271</text:p>
          </table:table-cell>
          <table:table-cell table:formula="of:=1/[.D844]" office:value-type="float" office:value="0.0255102040816327" calcext:value-type="float">
            <text:p>0.0255102040816327</text:p>
          </table:table-cell>
          <table:table-cell table:formula="of:=LOG10([.E84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5]/[.B845]" office:value-type="float" office:value="1056.60377358491" calcext:value-type="float">
            <text:p>1056.60377358491</text:p>
          </table:table-cell>
          <table:table-cell table:formula="of:=1/[.D845]" office:value-type="float" office:value="0.0255102040816327" calcext:value-type="float">
            <text:p>0.0255102040816327</text:p>
          </table:table-cell>
          <table:table-cell table:formula="of:=LOG10([.E84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6]/[.B846]" office:value-type="float" office:value="1056.60377358491" calcext:value-type="float">
            <text:p>1056.60377358491</text:p>
          </table:table-cell>
          <table:table-cell table:formula="of:=1/[.D846]" office:value-type="float" office:value="0.0255102040816327" calcext:value-type="float">
            <text:p>0.0255102040816327</text:p>
          </table:table-cell>
          <table:table-cell table:formula="of:=LOG10([.E84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7]/[.B847]" office:value-type="float" office:value="1056.60377358491" calcext:value-type="float">
            <text:p>1056.60377358491</text:p>
          </table:table-cell>
          <table:table-cell table:formula="of:=1/[.D847]" office:value-type="float" office:value="0.0255102040816327" calcext:value-type="float">
            <text:p>0.0255102040816327</text:p>
          </table:table-cell>
          <table:table-cell table:formula="of:=LOG10([.E84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8]/[.B848]" office:value-type="float" office:value="845.283018867925" calcext:value-type="float">
            <text:p>845.283018867925</text:p>
          </table:table-cell>
          <table:table-cell table:formula="of:=1/[.D848]" office:value-type="float" office:value="0.0255102040816327" calcext:value-type="float">
            <text:p>0.0255102040816327</text:p>
          </table:table-cell>
          <table:table-cell table:formula="of:=LOG10([.E84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49]/[.B849]" office:value-type="float" office:value="1408.80503144654" calcext:value-type="float">
            <text:p>1408.80503144654</text:p>
          </table:table-cell>
          <table:table-cell table:formula="of:=1/[.D849]" office:value-type="float" office:value="0.0255102040816327" calcext:value-type="float">
            <text:p>0.0255102040816327</text:p>
          </table:table-cell>
          <table:table-cell table:formula="of:=LOG10([.E84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0]/[.B850]" office:value-type="float" office:value="1056.60377358491" calcext:value-type="float">
            <text:p>1056.60377358491</text:p>
          </table:table-cell>
          <table:table-cell table:formula="of:=1/[.D850]" office:value-type="float" office:value="0.0255102040816327" calcext:value-type="float">
            <text:p>0.0255102040816327</text:p>
          </table:table-cell>
          <table:table-cell table:formula="of:=LOG10([.E85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1]/[.B851]" office:value-type="float" office:value="704.402515723271" calcext:value-type="float">
            <text:p>704.402515723271</text:p>
          </table:table-cell>
          <table:table-cell table:formula="of:=1/[.D851]" office:value-type="float" office:value="0.0255102040816327" calcext:value-type="float">
            <text:p>0.0255102040816327</text:p>
          </table:table-cell>
          <table:table-cell table:formula="of:=LOG10([.E85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9.2" calcext:value-type="float">
            <text:p>39.2</text:p>
          </table:table-cell>
          <table:table-cell table:formula="of:=[.C852]/[.B852]" office:value-type="float" office:value="1051.88679245283" calcext:value-type="float">
            <text:p>1051.88679245283</text:p>
          </table:table-cell>
          <table:table-cell table:formula="of:=1/[.D852]" office:value-type="float" office:value="0.0255102040816327" calcext:value-type="float">
            <text:p>0.0255102040816327</text:p>
          </table:table-cell>
          <table:table-cell table:formula="of:=LOG10([.E852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3]/[.B853]" office:value-type="float" office:value="845.283018867925" calcext:value-type="float">
            <text:p>845.283018867925</text:p>
          </table:table-cell>
          <table:table-cell table:formula="of:=1/[.D853]" office:value-type="float" office:value="0.0255102040816327" calcext:value-type="float">
            <text:p>0.0255102040816327</text:p>
          </table:table-cell>
          <table:table-cell table:formula="of:=LOG10([.E85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4]/[.B854]" office:value-type="float" office:value="845.283018867925" calcext:value-type="float">
            <text:p>845.283018867925</text:p>
          </table:table-cell>
          <table:table-cell table:formula="of:=1/[.D854]" office:value-type="float" office:value="0.0255102040816327" calcext:value-type="float">
            <text:p>0.0255102040816327</text:p>
          </table:table-cell>
          <table:table-cell table:formula="of:=LOG10([.E85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5]/[.B855]" office:value-type="float" office:value="1056.60377358491" calcext:value-type="float">
            <text:p>1056.60377358491</text:p>
          </table:table-cell>
          <table:table-cell table:formula="of:=1/[.D855]" office:value-type="float" office:value="0.0255102040816327" calcext:value-type="float">
            <text:p>0.0255102040816327</text:p>
          </table:table-cell>
          <table:table-cell table:formula="of:=LOG10([.E85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6]/[.B856]" office:value-type="float" office:value="845.283018867925" calcext:value-type="float">
            <text:p>845.283018867925</text:p>
          </table:table-cell>
          <table:table-cell table:formula="of:=1/[.D856]" office:value-type="float" office:value="0.0255102040816327" calcext:value-type="float">
            <text:p>0.0255102040816327</text:p>
          </table:table-cell>
          <table:table-cell table:formula="of:=LOG10([.E85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7]/[.B857]" office:value-type="float" office:value="845.283018867925" calcext:value-type="float">
            <text:p>845.283018867925</text:p>
          </table:table-cell>
          <table:table-cell table:formula="of:=1/[.D857]" office:value-type="float" office:value="0.0255102040816327" calcext:value-type="float">
            <text:p>0.0255102040816327</text:p>
          </table:table-cell>
          <table:table-cell table:formula="of:=LOG10([.E85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8]/[.B858]" office:value-type="float" office:value="1056.60377358491" calcext:value-type="float">
            <text:p>1056.60377358491</text:p>
          </table:table-cell>
          <table:table-cell table:formula="of:=1/[.D858]" office:value-type="float" office:value="0.0255102040816327" calcext:value-type="float">
            <text:p>0.0255102040816327</text:p>
          </table:table-cell>
          <table:table-cell table:formula="of:=LOG10([.E85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2" calcext:value-type="float">
            <text:p>39.2</text:p>
          </table:table-cell>
          <table:table-cell table:formula="of:=[.C859]/[.B859]" office:value-type="float" office:value="704.402515723271" calcext:value-type="float">
            <text:p>704.402515723271</text:p>
          </table:table-cell>
          <table:table-cell table:formula="of:=1/[.D859]" office:value-type="float" office:value="0.0255102040816327" calcext:value-type="float">
            <text:p>0.0255102040816327</text:p>
          </table:table-cell>
          <table:table-cell table:formula="of:=LOG10([.E85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0]/[.B860]" office:value-type="float" office:value="845.283018867925" calcext:value-type="float">
            <text:p>845.283018867925</text:p>
          </table:table-cell>
          <table:table-cell table:formula="of:=1/[.D860]" office:value-type="float" office:value="0.0255754475703325" calcext:value-type="float">
            <text:p>0.0255754475703325</text:p>
          </table:table-cell>
          <table:table-cell table:formula="of:=LOG10([.E86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39.1" calcext:value-type="float">
            <text:p>39.1</text:p>
          </table:table-cell>
          <table:table-cell table:formula="of:=[.C861]/[.B861]" office:value-type="float" office:value="1402.51572327044" calcext:value-type="float">
            <text:p>1402.51572327044</text:p>
          </table:table-cell>
          <table:table-cell table:formula="of:=1/[.D861]" office:value-type="float" office:value="0.0255754475703325" calcext:value-type="float">
            <text:p>0.0255754475703325</text:p>
          </table:table-cell>
          <table:table-cell table:formula="of:=LOG10([.E861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2]/[.B862]" office:value-type="float" office:value="845.283018867925" calcext:value-type="float">
            <text:p>845.283018867925</text:p>
          </table:table-cell>
          <table:table-cell table:formula="of:=1/[.D862]" office:value-type="float" office:value="0.0255754475703325" calcext:value-type="float">
            <text:p>0.0255754475703325</text:p>
          </table:table-cell>
          <table:table-cell table:formula="of:=LOG10([.E86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3]/[.B863]" office:value-type="float" office:value="704.402515723271" calcext:value-type="float">
            <text:p>704.402515723271</text:p>
          </table:table-cell>
          <table:table-cell table:formula="of:=1/[.D863]" office:value-type="float" office:value="0.0255754475703325" calcext:value-type="float">
            <text:p>0.0255754475703325</text:p>
          </table:table-cell>
          <table:table-cell table:formula="of:=LOG10([.E86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4]/[.B864]" office:value-type="float" office:value="704.402515723271" calcext:value-type="float">
            <text:p>704.402515723271</text:p>
          </table:table-cell>
          <table:table-cell table:formula="of:=1/[.D864]" office:value-type="float" office:value="0.0255754475703325" calcext:value-type="float">
            <text:p>0.0255754475703325</text:p>
          </table:table-cell>
          <table:table-cell table:formula="of:=LOG10([.E86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9.1" calcext:value-type="float">
            <text:p>39.1</text:p>
          </table:table-cell>
          <table:table-cell table:formula="of:=[.C865]/[.B865]" office:value-type="float" office:value="841.509433962264" calcext:value-type="float">
            <text:p>841.509433962264</text:p>
          </table:table-cell>
          <table:table-cell table:formula="of:=1/[.D865]" office:value-type="float" office:value="0.0255754475703325" calcext:value-type="float">
            <text:p>0.0255754475703325</text:p>
          </table:table-cell>
          <table:table-cell table:formula="of:=LOG10([.E865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6]/[.B866]" office:value-type="float" office:value="845.283018867925" calcext:value-type="float">
            <text:p>845.283018867925</text:p>
          </table:table-cell>
          <table:table-cell table:formula="of:=1/[.D866]" office:value-type="float" office:value="0.0255754475703325" calcext:value-type="float">
            <text:p>0.0255754475703325</text:p>
          </table:table-cell>
          <table:table-cell table:formula="of:=LOG10([.E86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7]/[.B867]" office:value-type="float" office:value="1056.60377358491" calcext:value-type="float">
            <text:p>1056.60377358491</text:p>
          </table:table-cell>
          <table:table-cell table:formula="of:=1/[.D867]" office:value-type="float" office:value="0.0255754475703325" calcext:value-type="float">
            <text:p>0.0255754475703325</text:p>
          </table:table-cell>
          <table:table-cell table:formula="of:=LOG10([.E86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9.1" calcext:value-type="float">
            <text:p>39.1</text:p>
          </table:table-cell>
          <table:table-cell table:formula="of:=[.C868]/[.B868]" office:value-type="float" office:value="841.509433962264" calcext:value-type="float">
            <text:p>841.509433962264</text:p>
          </table:table-cell>
          <table:table-cell table:formula="of:=1/[.D868]" office:value-type="float" office:value="0.0255754475703325" calcext:value-type="float">
            <text:p>0.0255754475703325</text:p>
          </table:table-cell>
          <table:table-cell table:formula="of:=LOG10([.E868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69]/[.B869]" office:value-type="float" office:value="1056.60377358491" calcext:value-type="float">
            <text:p>1056.60377358491</text:p>
          </table:table-cell>
          <table:table-cell table:formula="of:=1/[.D869]" office:value-type="float" office:value="0.0255754475703325" calcext:value-type="float">
            <text:p>0.0255754475703325</text:p>
          </table:table-cell>
          <table:table-cell table:formula="of:=LOG10([.E86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0]/[.B870]" office:value-type="float" office:value="1408.80503144654" calcext:value-type="float">
            <text:p>1408.80503144654</text:p>
          </table:table-cell>
          <table:table-cell table:formula="of:=1/[.D870]" office:value-type="float" office:value="0.0255754475703325" calcext:value-type="float">
            <text:p>0.0255754475703325</text:p>
          </table:table-cell>
          <table:table-cell table:formula="of:=LOG10([.E870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1]/[.B871]" office:value-type="float" office:value="704.402515723271" calcext:value-type="float">
            <text:p>704.402515723271</text:p>
          </table:table-cell>
          <table:table-cell table:formula="of:=1/[.D871]" office:value-type="float" office:value="0.0255754475703325" calcext:value-type="float">
            <text:p>0.0255754475703325</text:p>
          </table:table-cell>
          <table:table-cell table:formula="of:=LOG10([.E87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2]/[.B872]" office:value-type="float" office:value="1056.60377358491" calcext:value-type="float">
            <text:p>1056.60377358491</text:p>
          </table:table-cell>
          <table:table-cell table:formula="of:=1/[.D872]" office:value-type="float" office:value="0.0255754475703325" calcext:value-type="float">
            <text:p>0.0255754475703325</text:p>
          </table:table-cell>
          <table:table-cell table:formula="of:=LOG10([.E87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3]/[.B873]" office:value-type="float" office:value="1056.60377358491" calcext:value-type="float">
            <text:p>1056.60377358491</text:p>
          </table:table-cell>
          <table:table-cell table:formula="of:=1/[.D873]" office:value-type="float" office:value="0.0255754475703325" calcext:value-type="float">
            <text:p>0.0255754475703325</text:p>
          </table:table-cell>
          <table:table-cell table:formula="of:=LOG10([.E87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4]/[.B874]" office:value-type="float" office:value="1056.60377358491" calcext:value-type="float">
            <text:p>1056.60377358491</text:p>
          </table:table-cell>
          <table:table-cell table:formula="of:=1/[.D874]" office:value-type="float" office:value="0.0255754475703325" calcext:value-type="float">
            <text:p>0.0255754475703325</text:p>
          </table:table-cell>
          <table:table-cell table:formula="of:=LOG10([.E87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5]/[.B875]" office:value-type="float" office:value="603.77358490566" calcext:value-type="float">
            <text:p>603.77358490566</text:p>
          </table:table-cell>
          <table:table-cell table:formula="of:=1/[.D875]" office:value-type="float" office:value="0.0255754475703325" calcext:value-type="float">
            <text:p>0.0255754475703325</text:p>
          </table:table-cell>
          <table:table-cell table:formula="of:=LOG10([.E87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6]/[.B876]" office:value-type="float" office:value="1056.60377358491" calcext:value-type="float">
            <text:p>1056.60377358491</text:p>
          </table:table-cell>
          <table:table-cell table:formula="of:=1/[.D876]" office:value-type="float" office:value="0.0255754475703325" calcext:value-type="float">
            <text:p>0.0255754475703325</text:p>
          </table:table-cell>
          <table:table-cell table:formula="of:=LOG10([.E87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.1" calcext:value-type="float">
            <text:p>39.1</text:p>
          </table:table-cell>
          <table:table-cell table:formula="of:=[.C877]/[.B877]" office:value-type="float" office:value="1056.60377358491" calcext:value-type="float">
            <text:p>1056.60377358491</text:p>
          </table:table-cell>
          <table:table-cell table:formula="of:=1/[.D877]" office:value-type="float" office:value="0.0255754475703325" calcext:value-type="float">
            <text:p>0.0255754475703325</text:p>
          </table:table-cell>
          <table:table-cell table:formula="of:=LOG10([.E87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9" calcext:value-type="float">
            <text:p>39</text:p>
          </table:table-cell>
          <table:table-cell table:formula="of:=[.C878]/[.B878]" office:value-type="float" office:value="4207.54716981132" calcext:value-type="float">
            <text:p>4207.54716981132</text:p>
          </table:table-cell>
          <table:table-cell table:formula="of:=1/[.D878]" office:value-type="float" office:value="0.0256410256410256" calcext:value-type="float">
            <text:p>0.0256410256410256</text:p>
          </table:table-cell>
          <table:table-cell table:formula="of:=LOG10([.E878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79]/[.B879]" office:value-type="float" office:value="845.283018867925" calcext:value-type="float">
            <text:p>845.283018867925</text:p>
          </table:table-cell>
          <table:table-cell table:formula="of:=1/[.D879]" office:value-type="float" office:value="0.0256410256410256" calcext:value-type="float">
            <text:p>0.0256410256410256</text:p>
          </table:table-cell>
          <table:table-cell table:formula="of:=LOG10([.E87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0]/[.B880]" office:value-type="float" office:value="845.283018867925" calcext:value-type="float">
            <text:p>845.283018867925</text:p>
          </table:table-cell>
          <table:table-cell table:formula="of:=1/[.D880]" office:value-type="float" office:value="0.0256410256410256" calcext:value-type="float">
            <text:p>0.0256410256410256</text:p>
          </table:table-cell>
          <table:table-cell table:formula="of:=LOG10([.E88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1]/[.B881]" office:value-type="float" office:value="845.283018867925" calcext:value-type="float">
            <text:p>845.283018867925</text:p>
          </table:table-cell>
          <table:table-cell table:formula="of:=1/[.D881]" office:value-type="float" office:value="0.0256410256410256" calcext:value-type="float">
            <text:p>0.0256410256410256</text:p>
          </table:table-cell>
          <table:table-cell table:formula="of:=LOG10([.E88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2]/[.B882]" office:value-type="float" office:value="1056.60377358491" calcext:value-type="float">
            <text:p>1056.60377358491</text:p>
          </table:table-cell>
          <table:table-cell table:formula="of:=1/[.D882]" office:value-type="float" office:value="0.0256410256410256" calcext:value-type="float">
            <text:p>0.0256410256410256</text:p>
          </table:table-cell>
          <table:table-cell table:formula="of:=LOG10([.E88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3]/[.B883]" office:value-type="float" office:value="1056.60377358491" calcext:value-type="float">
            <text:p>1056.60377358491</text:p>
          </table:table-cell>
          <table:table-cell table:formula="of:=1/[.D883]" office:value-type="float" office:value="0.0256410256410256" calcext:value-type="float">
            <text:p>0.0256410256410256</text:p>
          </table:table-cell>
          <table:table-cell table:formula="of:=LOG10([.E88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4]/[.B884]" office:value-type="float" office:value="1408.80503144654" calcext:value-type="float">
            <text:p>1408.80503144654</text:p>
          </table:table-cell>
          <table:table-cell table:formula="of:=1/[.D884]" office:value-type="float" office:value="0.0256410256410256" calcext:value-type="float">
            <text:p>0.0256410256410256</text:p>
          </table:table-cell>
          <table:table-cell table:formula="of:=LOG10([.E884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5]/[.B885]" office:value-type="float" office:value="528.301886792453" calcext:value-type="float">
            <text:p>528.301886792453</text:p>
          </table:table-cell>
          <table:table-cell table:formula="of:=1/[.D885]" office:value-type="float" office:value="0.0256410256410256" calcext:value-type="float">
            <text:p>0.0256410256410256</text:p>
          </table:table-cell>
          <table:table-cell table:formula="of:=LOG10([.E885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6]/[.B886]" office:value-type="float" office:value="1408.80503144654" calcext:value-type="float">
            <text:p>1408.80503144654</text:p>
          </table:table-cell>
          <table:table-cell table:formula="of:=1/[.D886]" office:value-type="float" office:value="0.0256410256410256" calcext:value-type="float">
            <text:p>0.0256410256410256</text:p>
          </table:table-cell>
          <table:table-cell table:formula="of:=LOG10([.E88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7]/[.B887]" office:value-type="float" office:value="1056.60377358491" calcext:value-type="float">
            <text:p>1056.60377358491</text:p>
          </table:table-cell>
          <table:table-cell table:formula="of:=1/[.D887]" office:value-type="float" office:value="0.0256410256410256" calcext:value-type="float">
            <text:p>0.0256410256410256</text:p>
          </table:table-cell>
          <table:table-cell table:formula="of:=LOG10([.E88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8]/[.B888]" office:value-type="float" office:value="1056.60377358491" calcext:value-type="float">
            <text:p>1056.60377358491</text:p>
          </table:table-cell>
          <table:table-cell table:formula="of:=1/[.D888]" office:value-type="float" office:value="0.0256410256410256" calcext:value-type="float">
            <text:p>0.0256410256410256</text:p>
          </table:table-cell>
          <table:table-cell table:formula="of:=LOG10([.E88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89]/[.B889]" office:value-type="float" office:value="845.283018867925" calcext:value-type="float">
            <text:p>845.283018867925</text:p>
          </table:table-cell>
          <table:table-cell table:formula="of:=1/[.D889]" office:value-type="float" office:value="0.0256410256410256" calcext:value-type="float">
            <text:p>0.0256410256410256</text:p>
          </table:table-cell>
          <table:table-cell table:formula="of:=LOG10([.E88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90]/[.B890]" office:value-type="float" office:value="704.402515723271" calcext:value-type="float">
            <text:p>704.402515723271</text:p>
          </table:table-cell>
          <table:table-cell table:formula="of:=1/[.D890]" office:value-type="float" office:value="0.0256410256410256" calcext:value-type="float">
            <text:p>0.0256410256410256</text:p>
          </table:table-cell>
          <table:table-cell table:formula="of:=LOG10([.E890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91]/[.B891]" office:value-type="float" office:value="704.402515723271" calcext:value-type="float">
            <text:p>704.402515723271</text:p>
          </table:table-cell>
          <table:table-cell table:formula="of:=1/[.D891]" office:value-type="float" office:value="0.0256410256410256" calcext:value-type="float">
            <text:p>0.0256410256410256</text:p>
          </table:table-cell>
          <table:table-cell table:formula="of:=LOG10([.E89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92]/[.B892]" office:value-type="float" office:value="1408.80503144654" calcext:value-type="float">
            <text:p>1408.80503144654</text:p>
          </table:table-cell>
          <table:table-cell table:formula="of:=1/[.D892]" office:value-type="float" office:value="0.0256410256410256" calcext:value-type="float">
            <text:p>0.0256410256410256</text:p>
          </table:table-cell>
          <table:table-cell table:formula="of:=LOG10([.E89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93]/[.B893]" office:value-type="float" office:value="603.77358490566" calcext:value-type="float">
            <text:p>603.77358490566</text:p>
          </table:table-cell>
          <table:table-cell table:formula="of:=1/[.D893]" office:value-type="float" office:value="0.0256410256410256" calcext:value-type="float">
            <text:p>0.0256410256410256</text:p>
          </table:table-cell>
          <table:table-cell table:formula="of:=LOG10([.E893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94]/[.B894]" office:value-type="float" office:value="1408.80503144654" calcext:value-type="float">
            <text:p>1408.80503144654</text:p>
          </table:table-cell>
          <table:table-cell table:formula="of:=1/[.D894]" office:value-type="float" office:value="0.0256410256410256" calcext:value-type="float">
            <text:p>0.0256410256410256</text:p>
          </table:table-cell>
          <table:table-cell table:formula="of:=LOG10([.E894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3" calcext:value-type="float">
            <text:p>2.23</text:p>
          </table:table-cell>
          <table:table-cell office:value-type="float" office:value="39" calcext:value-type="float">
            <text:p>39</text:p>
          </table:table-cell>
          <table:table-cell table:formula="of:=[.C895]/[.B895]" office:value-type="float" office:value="2103.77358490566" calcext:value-type="float">
            <text:p>2103.77358490566</text:p>
          </table:table-cell>
          <table:table-cell table:formula="of:=1/[.D895]" office:value-type="float" office:value="0.0256410256410256" calcext:value-type="float">
            <text:p>0.0256410256410256</text:p>
          </table:table-cell>
          <table:table-cell table:formula="of:=LOG10([.E895])" office:value-type="float" office:value="3.32299899778339" calcext:value-type="float">
            <text:p>3.3229989977833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9" calcext:value-type="float">
            <text:p>39</text:p>
          </table:table-cell>
          <table:table-cell table:formula="of:=[.C896]/[.B896]" office:value-type="float" office:value="1056.60377358491" calcext:value-type="float">
            <text:p>1056.60377358491</text:p>
          </table:table-cell>
          <table:table-cell table:formula="of:=1/[.D896]" office:value-type="float" office:value="0.0256410256410256" calcext:value-type="float">
            <text:p>0.0256410256410256</text:p>
          </table:table-cell>
          <table:table-cell table:formula="of:=LOG10([.E89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897]/[.B897]" office:value-type="float" office:value="845.283018867925" calcext:value-type="float">
            <text:p>845.283018867925</text:p>
          </table:table-cell>
          <table:table-cell table:formula="of:=1/[.D897]" office:value-type="float" office:value="0.025706940874036" calcext:value-type="float">
            <text:p>0.025706940874036</text:p>
          </table:table-cell>
          <table:table-cell table:formula="of:=LOG10([.E89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898]/[.B898]" office:value-type="float" office:value="1056.60377358491" calcext:value-type="float">
            <text:p>1056.60377358491</text:p>
          </table:table-cell>
          <table:table-cell table:formula="of:=1/[.D898]" office:value-type="float" office:value="0.025706940874036" calcext:value-type="float">
            <text:p>0.025706940874036</text:p>
          </table:table-cell>
          <table:table-cell table:formula="of:=LOG10([.E89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899]/[.B899]" office:value-type="float" office:value="704.402515723271" calcext:value-type="float">
            <text:p>704.402515723271</text:p>
          </table:table-cell>
          <table:table-cell table:formula="of:=1/[.D899]" office:value-type="float" office:value="0.025706940874036" calcext:value-type="float">
            <text:p>0.025706940874036</text:p>
          </table:table-cell>
          <table:table-cell table:formula="of:=LOG10([.E89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0]/[.B900]" office:value-type="float" office:value="1056.60377358491" calcext:value-type="float">
            <text:p>1056.60377358491</text:p>
          </table:table-cell>
          <table:table-cell table:formula="of:=1/[.D900]" office:value-type="float" office:value="0.025706940874036" calcext:value-type="float">
            <text:p>0.025706940874036</text:p>
          </table:table-cell>
          <table:table-cell table:formula="of:=LOG10([.E90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1]/[.B901]" office:value-type="float" office:value="603.77358490566" calcext:value-type="float">
            <text:p>603.77358490566</text:p>
          </table:table-cell>
          <table:table-cell table:formula="of:=1/[.D901]" office:value-type="float" office:value="0.025706940874036" calcext:value-type="float">
            <text:p>0.025706940874036</text:p>
          </table:table-cell>
          <table:table-cell table:formula="of:=LOG10([.E90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2]/[.B902]" office:value-type="float" office:value="1056.60377358491" calcext:value-type="float">
            <text:p>1056.60377358491</text:p>
          </table:table-cell>
          <table:table-cell table:formula="of:=1/[.D902]" office:value-type="float" office:value="0.025706940874036" calcext:value-type="float">
            <text:p>0.025706940874036</text:p>
          </table:table-cell>
          <table:table-cell table:formula="of:=LOG10([.E90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3]/[.B903]" office:value-type="float" office:value="845.283018867925" calcext:value-type="float">
            <text:p>845.283018867925</text:p>
          </table:table-cell>
          <table:table-cell table:formula="of:=1/[.D903]" office:value-type="float" office:value="0.025706940874036" calcext:value-type="float">
            <text:p>0.025706940874036</text:p>
          </table:table-cell>
          <table:table-cell table:formula="of:=LOG10([.E90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4]/[.B904]" office:value-type="float" office:value="845.283018867925" calcext:value-type="float">
            <text:p>845.283018867925</text:p>
          </table:table-cell>
          <table:table-cell table:formula="of:=1/[.D904]" office:value-type="float" office:value="0.025706940874036" calcext:value-type="float">
            <text:p>0.025706940874036</text:p>
          </table:table-cell>
          <table:table-cell table:formula="of:=LOG10([.E90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5" calcext:value-type="float">
            <text:p>2.25</text:p>
          </table:table-cell>
          <table:table-cell office:value-type="float" office:value="38.9" calcext:value-type="float">
            <text:p>38.9</text:p>
          </table:table-cell>
          <table:table-cell table:formula="of:=[.C905]/[.B905]" office:value-type="float" office:value="849.056603773585" calcext:value-type="float">
            <text:p>849.056603773585</text:p>
          </table:table-cell>
          <table:table-cell table:formula="of:=1/[.D905]" office:value-type="float" office:value="0.025706940874036" calcext:value-type="float">
            <text:p>0.025706940874036</text:p>
          </table:table-cell>
          <table:table-cell table:formula="of:=LOG10([.E905])" office:value-type="float" office:value="2.92893664417456" calcext:value-type="float">
            <text:p>2.9289366441745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6]/[.B906]" office:value-type="float" office:value="845.283018867925" calcext:value-type="float">
            <text:p>845.283018867925</text:p>
          </table:table-cell>
          <table:table-cell table:formula="of:=1/[.D906]" office:value-type="float" office:value="0.025706940874036" calcext:value-type="float">
            <text:p>0.025706940874036</text:p>
          </table:table-cell>
          <table:table-cell table:formula="of:=LOG10([.E90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7]/[.B907]" office:value-type="float" office:value="845.283018867925" calcext:value-type="float">
            <text:p>845.283018867925</text:p>
          </table:table-cell>
          <table:table-cell table:formula="of:=1/[.D907]" office:value-type="float" office:value="0.025706940874036" calcext:value-type="float">
            <text:p>0.025706940874036</text:p>
          </table:table-cell>
          <table:table-cell table:formula="of:=LOG10([.E90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9" calcext:value-type="float">
            <text:p>38.9</text:p>
          </table:table-cell>
          <table:table-cell table:formula="of:=[.C908]/[.B908]" office:value-type="float" office:value="1051.88679245283" calcext:value-type="float">
            <text:p>1051.88679245283</text:p>
          </table:table-cell>
          <table:table-cell table:formula="of:=1/[.D908]" office:value-type="float" office:value="0.025706940874036" calcext:value-type="float">
            <text:p>0.025706940874036</text:p>
          </table:table-cell>
          <table:table-cell table:formula="of:=LOG10([.E908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09]/[.B909]" office:value-type="float" office:value="528.301886792453" calcext:value-type="float">
            <text:p>528.301886792453</text:p>
          </table:table-cell>
          <table:table-cell table:formula="of:=1/[.D909]" office:value-type="float" office:value="0.025706940874036" calcext:value-type="float">
            <text:p>0.025706940874036</text:p>
          </table:table-cell>
          <table:table-cell table:formula="of:=LOG10([.E909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10]/[.B910]" office:value-type="float" office:value="1408.80503144654" calcext:value-type="float">
            <text:p>1408.80503144654</text:p>
          </table:table-cell>
          <table:table-cell table:formula="of:=1/[.D910]" office:value-type="float" office:value="0.025706940874036" calcext:value-type="float">
            <text:p>0.025706940874036</text:p>
          </table:table-cell>
          <table:table-cell table:formula="of:=LOG10([.E910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11]/[.B911]" office:value-type="float" office:value="2113.20754716981" calcext:value-type="float">
            <text:p>2113.20754716981</text:p>
          </table:table-cell>
          <table:table-cell table:formula="of:=1/[.D911]" office:value-type="float" office:value="0.025706940874036" calcext:value-type="float">
            <text:p>0.025706940874036</text:p>
          </table:table-cell>
          <table:table-cell table:formula="of:=LOG10([.E911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9" calcext:value-type="float">
            <text:p>38.9</text:p>
          </table:table-cell>
          <table:table-cell table:formula="of:=[.C912]/[.B912]" office:value-type="float" office:value="841.509433962264" calcext:value-type="float">
            <text:p>841.509433962264</text:p>
          </table:table-cell>
          <table:table-cell table:formula="of:=1/[.D912]" office:value-type="float" office:value="0.025706940874036" calcext:value-type="float">
            <text:p>0.025706940874036</text:p>
          </table:table-cell>
          <table:table-cell table:formula="of:=LOG10([.E912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9" calcext:value-type="float">
            <text:p>38.9</text:p>
          </table:table-cell>
          <table:table-cell table:formula="of:=[.C913]/[.B913]" office:value-type="float" office:value="1056.60377358491" calcext:value-type="float">
            <text:p>1056.60377358491</text:p>
          </table:table-cell>
          <table:table-cell table:formula="of:=1/[.D913]" office:value-type="float" office:value="0.025706940874036" calcext:value-type="float">
            <text:p>0.025706940874036</text:p>
          </table:table-cell>
          <table:table-cell table:formula="of:=LOG10([.E91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14]/[.B914]" office:value-type="float" office:value="845.283018867925" calcext:value-type="float">
            <text:p>845.283018867925</text:p>
          </table:table-cell>
          <table:table-cell table:formula="of:=1/[.D914]" office:value-type="float" office:value="0.0257731958762887" calcext:value-type="float">
            <text:p>0.0257731958762887</text:p>
          </table:table-cell>
          <table:table-cell table:formula="of:=LOG10([.E91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15]/[.B915]" office:value-type="float" office:value="704.402515723271" calcext:value-type="float">
            <text:p>704.402515723271</text:p>
          </table:table-cell>
          <table:table-cell table:formula="of:=1/[.D915]" office:value-type="float" office:value="0.0257731958762887" calcext:value-type="float">
            <text:p>0.0257731958762887</text:p>
          </table:table-cell>
          <table:table-cell table:formula="of:=LOG10([.E91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16]/[.B916]" office:value-type="float" office:value="1408.80503144654" calcext:value-type="float">
            <text:p>1408.80503144654</text:p>
          </table:table-cell>
          <table:table-cell table:formula="of:=1/[.D916]" office:value-type="float" office:value="0.0257731958762887" calcext:value-type="float">
            <text:p>0.0257731958762887</text:p>
          </table:table-cell>
          <table:table-cell table:formula="of:=LOG10([.E91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17]/[.B917]" office:value-type="float" office:value="603.77358490566" calcext:value-type="float">
            <text:p>603.77358490566</text:p>
          </table:table-cell>
          <table:table-cell table:formula="of:=1/[.D917]" office:value-type="float" office:value="0.0257731958762887" calcext:value-type="float">
            <text:p>0.0257731958762887</text:p>
          </table:table-cell>
          <table:table-cell table:formula="of:=LOG10([.E917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18]/[.B918]" office:value-type="float" office:value="1056.60377358491" calcext:value-type="float">
            <text:p>1056.60377358491</text:p>
          </table:table-cell>
          <table:table-cell table:formula="of:=1/[.D918]" office:value-type="float" office:value="0.0257731958762887" calcext:value-type="float">
            <text:p>0.0257731958762887</text:p>
          </table:table-cell>
          <table:table-cell table:formula="of:=LOG10([.E91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19]/[.B919]" office:value-type="float" office:value="704.402515723271" calcext:value-type="float">
            <text:p>704.402515723271</text:p>
          </table:table-cell>
          <table:table-cell table:formula="of:=1/[.D919]" office:value-type="float" office:value="0.0257731958762887" calcext:value-type="float">
            <text:p>0.0257731958762887</text:p>
          </table:table-cell>
          <table:table-cell table:formula="of:=LOG10([.E91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0]/[.B920]" office:value-type="float" office:value="1056.60377358491" calcext:value-type="float">
            <text:p>1056.60377358491</text:p>
          </table:table-cell>
          <table:table-cell table:formula="of:=1/[.D920]" office:value-type="float" office:value="0.0257731958762887" calcext:value-type="float">
            <text:p>0.0257731958762887</text:p>
          </table:table-cell>
          <table:table-cell table:formula="of:=LOG10([.E92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1]/[.B921]" office:value-type="float" office:value="1056.60377358491" calcext:value-type="float">
            <text:p>1056.60377358491</text:p>
          </table:table-cell>
          <table:table-cell table:formula="of:=1/[.D921]" office:value-type="float" office:value="0.0257731958762887" calcext:value-type="float">
            <text:p>0.0257731958762887</text:p>
          </table:table-cell>
          <table:table-cell table:formula="of:=LOG10([.E92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2]/[.B922]" office:value-type="float" office:value="1056.60377358491" calcext:value-type="float">
            <text:p>1056.60377358491</text:p>
          </table:table-cell>
          <table:table-cell table:formula="of:=1/[.D922]" office:value-type="float" office:value="0.0257731958762887" calcext:value-type="float">
            <text:p>0.0257731958762887</text:p>
          </table:table-cell>
          <table:table-cell table:formula="of:=LOG10([.E92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3]/[.B923]" office:value-type="float" office:value="845.283018867925" calcext:value-type="float">
            <text:p>845.283018867925</text:p>
          </table:table-cell>
          <table:table-cell table:formula="of:=1/[.D923]" office:value-type="float" office:value="0.0257731958762887" calcext:value-type="float">
            <text:p>0.0257731958762887</text:p>
          </table:table-cell>
          <table:table-cell table:formula="of:=LOG10([.E92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4]/[.B924]" office:value-type="float" office:value="704.402515723271" calcext:value-type="float">
            <text:p>704.402515723271</text:p>
          </table:table-cell>
          <table:table-cell table:formula="of:=1/[.D924]" office:value-type="float" office:value="0.0257731958762887" calcext:value-type="float">
            <text:p>0.0257731958762887</text:p>
          </table:table-cell>
          <table:table-cell table:formula="of:=LOG10([.E92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5]/[.B925]" office:value-type="float" office:value="704.402515723271" calcext:value-type="float">
            <text:p>704.402515723271</text:p>
          </table:table-cell>
          <table:table-cell table:formula="of:=1/[.D925]" office:value-type="float" office:value="0.0257731958762887" calcext:value-type="float">
            <text:p>0.0257731958762887</text:p>
          </table:table-cell>
          <table:table-cell table:formula="of:=LOG10([.E92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6]/[.B926]" office:value-type="float" office:value="1408.80503144654" calcext:value-type="float">
            <text:p>1408.80503144654</text:p>
          </table:table-cell>
          <table:table-cell table:formula="of:=1/[.D926]" office:value-type="float" office:value="0.0257731958762887" calcext:value-type="float">
            <text:p>0.0257731958762887</text:p>
          </table:table-cell>
          <table:table-cell table:formula="of:=LOG10([.E92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7]/[.B927]" office:value-type="float" office:value="1056.60377358491" calcext:value-type="float">
            <text:p>1056.60377358491</text:p>
          </table:table-cell>
          <table:table-cell table:formula="of:=1/[.D927]" office:value-type="float" office:value="0.0257731958762887" calcext:value-type="float">
            <text:p>0.0257731958762887</text:p>
          </table:table-cell>
          <table:table-cell table:formula="of:=LOG10([.E92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8" calcext:value-type="float">
            <text:p>38.8</text:p>
          </table:table-cell>
          <table:table-cell table:formula="of:=[.C928]/[.B928]" office:value-type="float" office:value="845.283018867925" calcext:value-type="float">
            <text:p>845.283018867925</text:p>
          </table:table-cell>
          <table:table-cell table:formula="of:=1/[.D928]" office:value-type="float" office:value="0.0257731958762887" calcext:value-type="float">
            <text:p>0.0257731958762887</text:p>
          </table:table-cell>
          <table:table-cell table:formula="of:=LOG10([.E92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29]/[.B929]" office:value-type="float" office:value="1408.80503144654" calcext:value-type="float">
            <text:p>1408.80503144654</text:p>
          </table:table-cell>
          <table:table-cell table:formula="of:=1/[.D929]" office:value-type="float" office:value="0.0258397932816537" calcext:value-type="float">
            <text:p>0.0258397932816537</text:p>
          </table:table-cell>
          <table:table-cell table:formula="of:=LOG10([.E92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0]/[.B930]" office:value-type="float" office:value="1056.60377358491" calcext:value-type="float">
            <text:p>1056.60377358491</text:p>
          </table:table-cell>
          <table:table-cell table:formula="of:=1/[.D930]" office:value-type="float" office:value="0.0258397932816537" calcext:value-type="float">
            <text:p>0.0258397932816537</text:p>
          </table:table-cell>
          <table:table-cell table:formula="of:=LOG10([.E93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1]/[.B931]" office:value-type="float" office:value="704.402515723271" calcext:value-type="float">
            <text:p>704.402515723271</text:p>
          </table:table-cell>
          <table:table-cell table:formula="of:=1/[.D931]" office:value-type="float" office:value="0.0258397932816537" calcext:value-type="float">
            <text:p>0.0258397932816537</text:p>
          </table:table-cell>
          <table:table-cell table:formula="of:=LOG10([.E931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2]/[.B932]" office:value-type="float" office:value="1056.60377358491" calcext:value-type="float">
            <text:p>1056.60377358491</text:p>
          </table:table-cell>
          <table:table-cell table:formula="of:=1/[.D932]" office:value-type="float" office:value="0.0258397932816537" calcext:value-type="float">
            <text:p>0.0258397932816537</text:p>
          </table:table-cell>
          <table:table-cell table:formula="of:=LOG10([.E93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7" calcext:value-type="float">
            <text:p>38.7</text:p>
          </table:table-cell>
          <table:table-cell table:formula="of:=[.C933]/[.B933]" office:value-type="float" office:value="841.509433962264" calcext:value-type="float">
            <text:p>841.509433962264</text:p>
          </table:table-cell>
          <table:table-cell table:formula="of:=1/[.D933]" office:value-type="float" office:value="0.0258397932816537" calcext:value-type="float">
            <text:p>0.0258397932816537</text:p>
          </table:table-cell>
          <table:table-cell table:formula="of:=LOG10([.E933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4]/[.B934]" office:value-type="float" office:value="1408.80503144654" calcext:value-type="float">
            <text:p>1408.80503144654</text:p>
          </table:table-cell>
          <table:table-cell table:formula="of:=1/[.D934]" office:value-type="float" office:value="0.0258397932816537" calcext:value-type="float">
            <text:p>0.0258397932816537</text:p>
          </table:table-cell>
          <table:table-cell table:formula="of:=LOG10([.E934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5]/[.B935]" office:value-type="float" office:value="1056.60377358491" calcext:value-type="float">
            <text:p>1056.60377358491</text:p>
          </table:table-cell>
          <table:table-cell table:formula="of:=1/[.D935]" office:value-type="float" office:value="0.0258397932816537" calcext:value-type="float">
            <text:p>0.0258397932816537</text:p>
          </table:table-cell>
          <table:table-cell table:formula="of:=LOG10([.E93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6]/[.B936]" office:value-type="float" office:value="845.283018867925" calcext:value-type="float">
            <text:p>845.283018867925</text:p>
          </table:table-cell>
          <table:table-cell table:formula="of:=1/[.D936]" office:value-type="float" office:value="0.0258397932816537" calcext:value-type="float">
            <text:p>0.0258397932816537</text:p>
          </table:table-cell>
          <table:table-cell table:formula="of:=LOG10([.E93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7]/[.B937]" office:value-type="float" office:value="845.283018867925" calcext:value-type="float">
            <text:p>845.283018867925</text:p>
          </table:table-cell>
          <table:table-cell table:formula="of:=1/[.D937]" office:value-type="float" office:value="0.0258397932816537" calcext:value-type="float">
            <text:p>0.0258397932816537</text:p>
          </table:table-cell>
          <table:table-cell table:formula="of:=LOG10([.E93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8]/[.B938]" office:value-type="float" office:value="603.77358490566" calcext:value-type="float">
            <text:p>603.77358490566</text:p>
          </table:table-cell>
          <table:table-cell table:formula="of:=1/[.D938]" office:value-type="float" office:value="0.0258397932816537" calcext:value-type="float">
            <text:p>0.0258397932816537</text:p>
          </table:table-cell>
          <table:table-cell table:formula="of:=LOG10([.E938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39]/[.B939]" office:value-type="float" office:value="2113.20754716981" calcext:value-type="float">
            <text:p>2113.20754716981</text:p>
          </table:table-cell>
          <table:table-cell table:formula="of:=1/[.D939]" office:value-type="float" office:value="0.0258397932816537" calcext:value-type="float">
            <text:p>0.0258397932816537</text:p>
          </table:table-cell>
          <table:table-cell table:formula="of:=LOG10([.E939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40]/[.B940]" office:value-type="float" office:value="845.283018867925" calcext:value-type="float">
            <text:p>845.283018867925</text:p>
          </table:table-cell>
          <table:table-cell table:formula="of:=1/[.D940]" office:value-type="float" office:value="0.0258397932816537" calcext:value-type="float">
            <text:p>0.0258397932816537</text:p>
          </table:table-cell>
          <table:table-cell table:formula="of:=LOG10([.E94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7" calcext:value-type="float">
            <text:p>38.7</text:p>
          </table:table-cell>
          <table:table-cell table:formula="of:=[.C941]/[.B941]" office:value-type="float" office:value="1056.60377358491" calcext:value-type="float">
            <text:p>1056.60377358491</text:p>
          </table:table-cell>
          <table:table-cell table:formula="of:=1/[.D941]" office:value-type="float" office:value="0.0258397932816537" calcext:value-type="float">
            <text:p>0.0258397932816537</text:p>
          </table:table-cell>
          <table:table-cell table:formula="of:=LOG10([.E94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2]/[.B942]" office:value-type="float" office:value="704.402515723271" calcext:value-type="float">
            <text:p>704.402515723271</text:p>
          </table:table-cell>
          <table:table-cell table:formula="of:=1/[.D942]" office:value-type="float" office:value="0.0259067357512953" calcext:value-type="float">
            <text:p>0.0259067357512953</text:p>
          </table:table-cell>
          <table:table-cell table:formula="of:=LOG10([.E94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3]/[.B943]" office:value-type="float" office:value="1056.60377358491" calcext:value-type="float">
            <text:p>1056.60377358491</text:p>
          </table:table-cell>
          <table:table-cell table:formula="of:=1/[.D943]" office:value-type="float" office:value="0.0259067357512953" calcext:value-type="float">
            <text:p>0.0259067357512953</text:p>
          </table:table-cell>
          <table:table-cell table:formula="of:=LOG10([.E94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4]/[.B944]" office:value-type="float" office:value="704.402515723271" calcext:value-type="float">
            <text:p>704.402515723271</text:p>
          </table:table-cell>
          <table:table-cell table:formula="of:=1/[.D944]" office:value-type="float" office:value="0.0259067357512953" calcext:value-type="float">
            <text:p>0.0259067357512953</text:p>
          </table:table-cell>
          <table:table-cell table:formula="of:=LOG10([.E94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5]/[.B945]" office:value-type="float" office:value="4226.41509433962" calcext:value-type="float">
            <text:p>4226.41509433962</text:p>
          </table:table-cell>
          <table:table-cell table:formula="of:=1/[.D945]" office:value-type="float" office:value="0.0259067357512953" calcext:value-type="float">
            <text:p>0.0259067357512953</text:p>
          </table:table-cell>
          <table:table-cell table:formula="of:=LOG10([.E945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6]/[.B946]" office:value-type="float" office:value="1056.60377358491" calcext:value-type="float">
            <text:p>1056.60377358491</text:p>
          </table:table-cell>
          <table:table-cell table:formula="of:=1/[.D946]" office:value-type="float" office:value="0.0259067357512953" calcext:value-type="float">
            <text:p>0.0259067357512953</text:p>
          </table:table-cell>
          <table:table-cell table:formula="of:=LOG10([.E94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7]/[.B947]" office:value-type="float" office:value="845.283018867925" calcext:value-type="float">
            <text:p>845.283018867925</text:p>
          </table:table-cell>
          <table:table-cell table:formula="of:=1/[.D947]" office:value-type="float" office:value="0.0259067357512953" calcext:value-type="float">
            <text:p>0.0259067357512953</text:p>
          </table:table-cell>
          <table:table-cell table:formula="of:=LOG10([.E94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8]/[.B948]" office:value-type="float" office:value="1408.80503144654" calcext:value-type="float">
            <text:p>1408.80503144654</text:p>
          </table:table-cell>
          <table:table-cell table:formula="of:=1/[.D948]" office:value-type="float" office:value="0.0259067357512953" calcext:value-type="float">
            <text:p>0.0259067357512953</text:p>
          </table:table-cell>
          <table:table-cell table:formula="of:=LOG10([.E948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49]/[.B949]" office:value-type="float" office:value="1056.60377358491" calcext:value-type="float">
            <text:p>1056.60377358491</text:p>
          </table:table-cell>
          <table:table-cell table:formula="of:=1/[.D949]" office:value-type="float" office:value="0.0259067357512953" calcext:value-type="float">
            <text:p>0.0259067357512953</text:p>
          </table:table-cell>
          <table:table-cell table:formula="of:=LOG10([.E94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0]/[.B950]" office:value-type="float" office:value="469.601677148847" calcext:value-type="float">
            <text:p>469.601677148847</text:p>
          </table:table-cell>
          <table:table-cell table:formula="of:=1/[.D950]" office:value-type="float" office:value="0.0259067357512953" calcext:value-type="float">
            <text:p>0.0259067357512953</text:p>
          </table:table-cell>
          <table:table-cell table:formula="of:=LOG10([.E950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1]/[.B951]" office:value-type="float" office:value="1408.80503144654" calcext:value-type="float">
            <text:p>1408.80503144654</text:p>
          </table:table-cell>
          <table:table-cell table:formula="of:=1/[.D951]" office:value-type="float" office:value="0.0259067357512953" calcext:value-type="float">
            <text:p>0.0259067357512953</text:p>
          </table:table-cell>
          <table:table-cell table:formula="of:=LOG10([.E951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6" calcext:value-type="float">
            <text:p>38.6</text:p>
          </table:table-cell>
          <table:table-cell table:formula="of:=[.C952]/[.B952]" office:value-type="float" office:value="1051.88679245283" calcext:value-type="float">
            <text:p>1051.88679245283</text:p>
          </table:table-cell>
          <table:table-cell table:formula="of:=1/[.D952]" office:value-type="float" office:value="0.0259067357512953" calcext:value-type="float">
            <text:p>0.0259067357512953</text:p>
          </table:table-cell>
          <table:table-cell table:formula="of:=LOG10([.E952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3]/[.B953]" office:value-type="float" office:value="1408.80503144654" calcext:value-type="float">
            <text:p>1408.80503144654</text:p>
          </table:table-cell>
          <table:table-cell table:formula="of:=1/[.D953]" office:value-type="float" office:value="0.0259067357512953" calcext:value-type="float">
            <text:p>0.0259067357512953</text:p>
          </table:table-cell>
          <table:table-cell table:formula="of:=LOG10([.E95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5" calcext:value-type="float">
            <text:p>2.25</text:p>
          </table:table-cell>
          <table:table-cell office:value-type="float" office:value="38.6" calcext:value-type="float">
            <text:p>38.6</text:p>
          </table:table-cell>
          <table:table-cell table:formula="of:=[.C954]/[.B954]" office:value-type="float" office:value="849.056603773585" calcext:value-type="float">
            <text:p>849.056603773585</text:p>
          </table:table-cell>
          <table:table-cell table:formula="of:=1/[.D954]" office:value-type="float" office:value="0.0259067357512953" calcext:value-type="float">
            <text:p>0.0259067357512953</text:p>
          </table:table-cell>
          <table:table-cell table:formula="of:=LOG10([.E954])" office:value-type="float" office:value="2.92893664417456" calcext:value-type="float">
            <text:p>2.928936644174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5]/[.B955]" office:value-type="float" office:value="1408.80503144654" calcext:value-type="float">
            <text:p>1408.80503144654</text:p>
          </table:table-cell>
          <table:table-cell table:formula="of:=1/[.D955]" office:value-type="float" office:value="0.0259067357512953" calcext:value-type="float">
            <text:p>0.0259067357512953</text:p>
          </table:table-cell>
          <table:table-cell table:formula="of:=LOG10([.E95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6]/[.B956]" office:value-type="float" office:value="1408.80503144654" calcext:value-type="float">
            <text:p>1408.80503144654</text:p>
          </table:table-cell>
          <table:table-cell table:formula="of:=1/[.D956]" office:value-type="float" office:value="0.0259067357512953" calcext:value-type="float">
            <text:p>0.0259067357512953</text:p>
          </table:table-cell>
          <table:table-cell table:formula="of:=LOG10([.E95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7]/[.B957]" office:value-type="float" office:value="1056.60377358491" calcext:value-type="float">
            <text:p>1056.60377358491</text:p>
          </table:table-cell>
          <table:table-cell table:formula="of:=1/[.D957]" office:value-type="float" office:value="0.0259067357512953" calcext:value-type="float">
            <text:p>0.0259067357512953</text:p>
          </table:table-cell>
          <table:table-cell table:formula="of:=LOG10([.E95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8]/[.B958]" office:value-type="float" office:value="845.283018867925" calcext:value-type="float">
            <text:p>845.283018867925</text:p>
          </table:table-cell>
          <table:table-cell table:formula="of:=1/[.D958]" office:value-type="float" office:value="0.0259067357512953" calcext:value-type="float">
            <text:p>0.0259067357512953</text:p>
          </table:table-cell>
          <table:table-cell table:formula="of:=LOG10([.E95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59]/[.B959]" office:value-type="float" office:value="704.402515723271" calcext:value-type="float">
            <text:p>704.402515723271</text:p>
          </table:table-cell>
          <table:table-cell table:formula="of:=1/[.D959]" office:value-type="float" office:value="0.0259067357512953" calcext:value-type="float">
            <text:p>0.0259067357512953</text:p>
          </table:table-cell>
          <table:table-cell table:formula="of:=LOG10([.E95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60]/[.B960]" office:value-type="float" office:value="1056.60377358491" calcext:value-type="float">
            <text:p>1056.60377358491</text:p>
          </table:table-cell>
          <table:table-cell table:formula="of:=1/[.D960]" office:value-type="float" office:value="0.0259067357512953" calcext:value-type="float">
            <text:p>0.0259067357512953</text:p>
          </table:table-cell>
          <table:table-cell table:formula="of:=LOG10([.E96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61]/[.B961]" office:value-type="float" office:value="1056.60377358491" calcext:value-type="float">
            <text:p>1056.60377358491</text:p>
          </table:table-cell>
          <table:table-cell table:formula="of:=1/[.D961]" office:value-type="float" office:value="0.0259067357512953" calcext:value-type="float">
            <text:p>0.0259067357512953</text:p>
          </table:table-cell>
          <table:table-cell table:formula="of:=LOG10([.E96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6" calcext:value-type="float">
            <text:p>38.6</text:p>
          </table:table-cell>
          <table:table-cell table:formula="of:=[.C962]/[.B962]" office:value-type="float" office:value="1408.80503144654" calcext:value-type="float">
            <text:p>1408.80503144654</text:p>
          </table:table-cell>
          <table:table-cell table:formula="of:=1/[.D962]" office:value-type="float" office:value="0.0259067357512953" calcext:value-type="float">
            <text:p>0.0259067357512953</text:p>
          </table:table-cell>
          <table:table-cell table:formula="of:=LOG10([.E96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3]/[.B963]" office:value-type="float" office:value="1056.60377358491" calcext:value-type="float">
            <text:p>1056.60377358491</text:p>
          </table:table-cell>
          <table:table-cell table:formula="of:=1/[.D963]" office:value-type="float" office:value="0.025974025974026" calcext:value-type="float">
            <text:p>0.025974025974026</text:p>
          </table:table-cell>
          <table:table-cell table:formula="of:=LOG10([.E96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4]/[.B964]" office:value-type="float" office:value="1056.60377358491" calcext:value-type="float">
            <text:p>1056.60377358491</text:p>
          </table:table-cell>
          <table:table-cell table:formula="of:=1/[.D964]" office:value-type="float" office:value="0.025974025974026" calcext:value-type="float">
            <text:p>0.025974025974026</text:p>
          </table:table-cell>
          <table:table-cell table:formula="of:=LOG10([.E96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5]/[.B965]" office:value-type="float" office:value="528.301886792453" calcext:value-type="float">
            <text:p>528.301886792453</text:p>
          </table:table-cell>
          <table:table-cell table:formula="of:=1/[.D965]" office:value-type="float" office:value="0.025974025974026" calcext:value-type="float">
            <text:p>0.025974025974026</text:p>
          </table:table-cell>
          <table:table-cell table:formula="of:=LOG10([.E965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6]/[.B966]" office:value-type="float" office:value="845.283018867925" calcext:value-type="float">
            <text:p>845.283018867925</text:p>
          </table:table-cell>
          <table:table-cell table:formula="of:=1/[.D966]" office:value-type="float" office:value="0.025974025974026" calcext:value-type="float">
            <text:p>0.025974025974026</text:p>
          </table:table-cell>
          <table:table-cell table:formula="of:=LOG10([.E96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7]/[.B967]" office:value-type="float" office:value="1408.80503144654" calcext:value-type="float">
            <text:p>1408.80503144654</text:p>
          </table:table-cell>
          <table:table-cell table:formula="of:=1/[.D967]" office:value-type="float" office:value="0.025974025974026" calcext:value-type="float">
            <text:p>0.025974025974026</text:p>
          </table:table-cell>
          <table:table-cell table:formula="of:=LOG10([.E96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8]/[.B968]" office:value-type="float" office:value="845.283018867925" calcext:value-type="float">
            <text:p>845.283018867925</text:p>
          </table:table-cell>
          <table:table-cell table:formula="of:=1/[.D968]" office:value-type="float" office:value="0.025974025974026" calcext:value-type="float">
            <text:p>0.025974025974026</text:p>
          </table:table-cell>
          <table:table-cell table:formula="of:=LOG10([.E96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69]/[.B969]" office:value-type="float" office:value="704.402515723271" calcext:value-type="float">
            <text:p>704.402515723271</text:p>
          </table:table-cell>
          <table:table-cell table:formula="of:=1/[.D969]" office:value-type="float" office:value="0.025974025974026" calcext:value-type="float">
            <text:p>0.025974025974026</text:p>
          </table:table-cell>
          <table:table-cell table:formula="of:=LOG10([.E96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70]/[.B970]" office:value-type="float" office:value="528.301886792453" calcext:value-type="float">
            <text:p>528.301886792453</text:p>
          </table:table-cell>
          <table:table-cell table:formula="of:=1/[.D970]" office:value-type="float" office:value="0.025974025974026" calcext:value-type="float">
            <text:p>0.025974025974026</text:p>
          </table:table-cell>
          <table:table-cell table:formula="of:=LOG10([.E97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3" calcext:value-type="float">
            <text:p>2.23</text:p>
          </table:table-cell>
          <table:table-cell office:value-type="float" office:value="38.5" calcext:value-type="float">
            <text:p>38.5</text:p>
          </table:table-cell>
          <table:table-cell table:formula="of:=[.C971]/[.B971]" office:value-type="float" office:value="2103.77358490566" calcext:value-type="float">
            <text:p>2103.77358490566</text:p>
          </table:table-cell>
          <table:table-cell table:formula="of:=1/[.D971]" office:value-type="float" office:value="0.025974025974026" calcext:value-type="float">
            <text:p>0.025974025974026</text:p>
          </table:table-cell>
          <table:table-cell table:formula="of:=LOG10([.E971])" office:value-type="float" office:value="3.32299899778339" calcext:value-type="float">
            <text:p>3.3229989977833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5" calcext:value-type="float">
            <text:p>38.5</text:p>
          </table:table-cell>
          <table:table-cell table:formula="of:=[.C972]/[.B972]" office:value-type="float" office:value="1051.88679245283" calcext:value-type="float">
            <text:p>1051.88679245283</text:p>
          </table:table-cell>
          <table:table-cell table:formula="of:=1/[.D972]" office:value-type="float" office:value="0.025974025974026" calcext:value-type="float">
            <text:p>0.025974025974026</text:p>
          </table:table-cell>
          <table:table-cell table:formula="of:=LOG10([.E972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73]/[.B973]" office:value-type="float" office:value="1408.80503144654" calcext:value-type="float">
            <text:p>1408.80503144654</text:p>
          </table:table-cell>
          <table:table-cell table:formula="of:=1/[.D973]" office:value-type="float" office:value="0.025974025974026" calcext:value-type="float">
            <text:p>0.025974025974026</text:p>
          </table:table-cell>
          <table:table-cell table:formula="of:=LOG10([.E97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74]/[.B974]" office:value-type="float" office:value="1056.60377358491" calcext:value-type="float">
            <text:p>1056.60377358491</text:p>
          </table:table-cell>
          <table:table-cell table:formula="of:=1/[.D974]" office:value-type="float" office:value="0.025974025974026" calcext:value-type="float">
            <text:p>0.025974025974026</text:p>
          </table:table-cell>
          <table:table-cell table:formula="of:=LOG10([.E97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75]/[.B975]" office:value-type="float" office:value="603.77358490566" calcext:value-type="float">
            <text:p>603.77358490566</text:p>
          </table:table-cell>
          <table:table-cell table:formula="of:=1/[.D975]" office:value-type="float" office:value="0.025974025974026" calcext:value-type="float">
            <text:p>0.025974025974026</text:p>
          </table:table-cell>
          <table:table-cell table:formula="of:=LOG10([.E97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76]/[.B976]" office:value-type="float" office:value="4226.41509433962" calcext:value-type="float">
            <text:p>4226.41509433962</text:p>
          </table:table-cell>
          <table:table-cell table:formula="of:=1/[.D976]" office:value-type="float" office:value="0.025974025974026" calcext:value-type="float">
            <text:p>0.025974025974026</text:p>
          </table:table-cell>
          <table:table-cell table:formula="of:=LOG10([.E976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77]/[.B977]" office:value-type="float" office:value="1056.60377358491" calcext:value-type="float">
            <text:p>1056.60377358491</text:p>
          </table:table-cell>
          <table:table-cell table:formula="of:=1/[.D977]" office:value-type="float" office:value="0.025974025974026" calcext:value-type="float">
            <text:p>0.025974025974026</text:p>
          </table:table-cell>
          <table:table-cell table:formula="of:=LOG10([.E97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5" calcext:value-type="float">
            <text:p>38.5</text:p>
          </table:table-cell>
          <table:table-cell table:formula="of:=[.C978]/[.B978]" office:value-type="float" office:value="841.509433962264" calcext:value-type="float">
            <text:p>841.509433962264</text:p>
          </table:table-cell>
          <table:table-cell table:formula="of:=1/[.D978]" office:value-type="float" office:value="0.025974025974026" calcext:value-type="float">
            <text:p>0.025974025974026</text:p>
          </table:table-cell>
          <table:table-cell table:formula="of:=LOG10([.E978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5" calcext:value-type="float">
            <text:p>38.5</text:p>
          </table:table-cell>
          <table:table-cell table:formula="of:=[.C979]/[.B979]" office:value-type="float" office:value="841.509433962264" calcext:value-type="float">
            <text:p>841.509433962264</text:p>
          </table:table-cell>
          <table:table-cell table:formula="of:=1/[.D979]" office:value-type="float" office:value="0.025974025974026" calcext:value-type="float">
            <text:p>0.025974025974026</text:p>
          </table:table-cell>
          <table:table-cell table:formula="of:=LOG10([.E979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80]/[.B980]" office:value-type="float" office:value="1056.60377358491" calcext:value-type="float">
            <text:p>1056.60377358491</text:p>
          </table:table-cell>
          <table:table-cell table:formula="of:=1/[.D980]" office:value-type="float" office:value="0.025974025974026" calcext:value-type="float">
            <text:p>0.025974025974026</text:p>
          </table:table-cell>
          <table:table-cell table:formula="of:=LOG10([.E98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81]/[.B981]" office:value-type="float" office:value="528.301886792453" calcext:value-type="float">
            <text:p>528.301886792453</text:p>
          </table:table-cell>
          <table:table-cell table:formula="of:=1/[.D981]" office:value-type="float" office:value="0.025974025974026" calcext:value-type="float">
            <text:p>0.025974025974026</text:p>
          </table:table-cell>
          <table:table-cell table:formula="of:=LOG10([.E981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5" calcext:value-type="float">
            <text:p>38.5</text:p>
          </table:table-cell>
          <table:table-cell table:formula="of:=[.C982]/[.B982]" office:value-type="float" office:value="1056.60377358491" calcext:value-type="float">
            <text:p>1056.60377358491</text:p>
          </table:table-cell>
          <table:table-cell table:formula="of:=1/[.D982]" office:value-type="float" office:value="0.025974025974026" calcext:value-type="float">
            <text:p>0.025974025974026</text:p>
          </table:table-cell>
          <table:table-cell table:formula="of:=LOG10([.E98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8.5" calcext:value-type="float">
            <text:p>38.5</text:p>
          </table:table-cell>
          <table:table-cell table:formula="of:=[.C983]/[.B983]" office:value-type="float" office:value="4207.54716981132" calcext:value-type="float">
            <text:p>4207.54716981132</text:p>
          </table:table-cell>
          <table:table-cell table:formula="of:=1/[.D983]" office:value-type="float" office:value="0.025974025974026" calcext:value-type="float">
            <text:p>0.025974025974026</text:p>
          </table:table-cell>
          <table:table-cell table:formula="of:=LOG10([.E983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4" calcext:value-type="float">
            <text:p>38.4</text:p>
          </table:table-cell>
          <table:table-cell table:formula="of:=[.C984]/[.B984]" office:value-type="float" office:value="841.509433962264" calcext:value-type="float">
            <text:p>841.509433962264</text:p>
          </table:table-cell>
          <table:table-cell table:formula="of:=1/[.D984]" office:value-type="float" office:value="0.0260416666666667" calcext:value-type="float">
            <text:p>0.0260416666666667</text:p>
          </table:table-cell>
          <table:table-cell table:formula="of:=LOG10([.E984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85]/[.B985]" office:value-type="float" office:value="1056.60377358491" calcext:value-type="float">
            <text:p>1056.60377358491</text:p>
          </table:table-cell>
          <table:table-cell table:formula="of:=1/[.D985]" office:value-type="float" office:value="0.0260416666666667" calcext:value-type="float">
            <text:p>0.0260416666666667</text:p>
          </table:table-cell>
          <table:table-cell table:formula="of:=LOG10([.E98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86]/[.B986]" office:value-type="float" office:value="1056.60377358491" calcext:value-type="float">
            <text:p>1056.60377358491</text:p>
          </table:table-cell>
          <table:table-cell table:formula="of:=1/[.D986]" office:value-type="float" office:value="0.0260416666666667" calcext:value-type="float">
            <text:p>0.0260416666666667</text:p>
          </table:table-cell>
          <table:table-cell table:formula="of:=LOG10([.E98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87]/[.B987]" office:value-type="float" office:value="1408.80503144654" calcext:value-type="float">
            <text:p>1408.80503144654</text:p>
          </table:table-cell>
          <table:table-cell table:formula="of:=1/[.D987]" office:value-type="float" office:value="0.0260416666666667" calcext:value-type="float">
            <text:p>0.0260416666666667</text:p>
          </table:table-cell>
          <table:table-cell table:formula="of:=LOG10([.E98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88]/[.B988]" office:value-type="float" office:value="1056.60377358491" calcext:value-type="float">
            <text:p>1056.60377358491</text:p>
          </table:table-cell>
          <table:table-cell table:formula="of:=1/[.D988]" office:value-type="float" office:value="0.0260416666666667" calcext:value-type="float">
            <text:p>0.0260416666666667</text:p>
          </table:table-cell>
          <table:table-cell table:formula="of:=LOG10([.E98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89]/[.B989]" office:value-type="float" office:value="845.283018867925" calcext:value-type="float">
            <text:p>845.283018867925</text:p>
          </table:table-cell>
          <table:table-cell table:formula="of:=1/[.D989]" office:value-type="float" office:value="0.0260416666666667" calcext:value-type="float">
            <text:p>0.0260416666666667</text:p>
          </table:table-cell>
          <table:table-cell table:formula="of:=LOG10([.E98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0]/[.B990]" office:value-type="float" office:value="528.301886792453" calcext:value-type="float">
            <text:p>528.301886792453</text:p>
          </table:table-cell>
          <table:table-cell table:formula="of:=1/[.D990]" office:value-type="float" office:value="0.0260416666666667" calcext:value-type="float">
            <text:p>0.0260416666666667</text:p>
          </table:table-cell>
          <table:table-cell table:formula="of:=LOG10([.E990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1]/[.B991]" office:value-type="float" office:value="1056.60377358491" calcext:value-type="float">
            <text:p>1056.60377358491</text:p>
          </table:table-cell>
          <table:table-cell table:formula="of:=1/[.D991]" office:value-type="float" office:value="0.0260416666666667" calcext:value-type="float">
            <text:p>0.0260416666666667</text:p>
          </table:table-cell>
          <table:table-cell table:formula="of:=LOG10([.E99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2]/[.B992]" office:value-type="float" office:value="4226.41509433962" calcext:value-type="float">
            <text:p>4226.41509433962</text:p>
          </table:table-cell>
          <table:table-cell table:formula="of:=1/[.D992]" office:value-type="float" office:value="0.0260416666666667" calcext:value-type="float">
            <text:p>0.0260416666666667</text:p>
          </table:table-cell>
          <table:table-cell table:formula="of:=LOG10([.E992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3]/[.B993]" office:value-type="float" office:value="845.283018867925" calcext:value-type="float">
            <text:p>845.283018867925</text:p>
          </table:table-cell>
          <table:table-cell table:formula="of:=1/[.D993]" office:value-type="float" office:value="0.0260416666666667" calcext:value-type="float">
            <text:p>0.0260416666666667</text:p>
          </table:table-cell>
          <table:table-cell table:formula="of:=LOG10([.E99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4]/[.B994]" office:value-type="float" office:value="845.283018867925" calcext:value-type="float">
            <text:p>845.283018867925</text:p>
          </table:table-cell>
          <table:table-cell table:formula="of:=1/[.D994]" office:value-type="float" office:value="0.0260416666666667" calcext:value-type="float">
            <text:p>0.0260416666666667</text:p>
          </table:table-cell>
          <table:table-cell table:formula="of:=LOG10([.E99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5]/[.B995]" office:value-type="float" office:value="845.283018867925" calcext:value-type="float">
            <text:p>845.283018867925</text:p>
          </table:table-cell>
          <table:table-cell table:formula="of:=1/[.D995]" office:value-type="float" office:value="0.0260416666666667" calcext:value-type="float">
            <text:p>0.0260416666666667</text:p>
          </table:table-cell>
          <table:table-cell table:formula="of:=LOG10([.E99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4" calcext:value-type="float">
            <text:p>38.4</text:p>
          </table:table-cell>
          <table:table-cell table:formula="of:=[.C996]/[.B996]" office:value-type="float" office:value="1051.88679245283" calcext:value-type="float">
            <text:p>1051.88679245283</text:p>
          </table:table-cell>
          <table:table-cell table:formula="of:=1/[.D996]" office:value-type="float" office:value="0.0260416666666667" calcext:value-type="float">
            <text:p>0.0260416666666667</text:p>
          </table:table-cell>
          <table:table-cell table:formula="of:=LOG10([.E996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7]/[.B997]" office:value-type="float" office:value="1056.60377358491" calcext:value-type="float">
            <text:p>1056.60377358491</text:p>
          </table:table-cell>
          <table:table-cell table:formula="of:=1/[.D997]" office:value-type="float" office:value="0.0260416666666667" calcext:value-type="float">
            <text:p>0.0260416666666667</text:p>
          </table:table-cell>
          <table:table-cell table:formula="of:=LOG10([.E99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8]/[.B998]" office:value-type="float" office:value="845.283018867925" calcext:value-type="float">
            <text:p>845.283018867925</text:p>
          </table:table-cell>
          <table:table-cell table:formula="of:=1/[.D998]" office:value-type="float" office:value="0.0260416666666667" calcext:value-type="float">
            <text:p>0.0260416666666667</text:p>
          </table:table-cell>
          <table:table-cell table:formula="of:=LOG10([.E99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999]/[.B999]" office:value-type="float" office:value="1056.60377358491" calcext:value-type="float">
            <text:p>1056.60377358491</text:p>
          </table:table-cell>
          <table:table-cell table:formula="of:=1/[.D999]" office:value-type="float" office:value="0.0260416666666667" calcext:value-type="float">
            <text:p>0.0260416666666667</text:p>
          </table:table-cell>
          <table:table-cell table:formula="of:=LOG10([.E99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4" calcext:value-type="float">
            <text:p>38.4</text:p>
          </table:table-cell>
          <table:table-cell table:formula="of:=[.C1000]/[.B1000]" office:value-type="float" office:value="841.509433962264" calcext:value-type="float">
            <text:p>841.509433962264</text:p>
          </table:table-cell>
          <table:table-cell table:formula="of:=1/[.D1000]" office:value-type="float" office:value="0.0260416666666667" calcext:value-type="float">
            <text:p>0.0260416666666667</text:p>
          </table:table-cell>
          <table:table-cell table:formula="of:=LOG10([.E1000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1001]/[.B1001]" office:value-type="float" office:value="845.283018867925" calcext:value-type="float">
            <text:p>845.283018867925</text:p>
          </table:table-cell>
          <table:table-cell table:formula="of:=1/[.D1001]" office:value-type="float" office:value="0.0260416666666667" calcext:value-type="float">
            <text:p>0.0260416666666667</text:p>
          </table:table-cell>
          <table:table-cell table:formula="of:=LOG10([.E100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1002]/[.B1002]" office:value-type="float" office:value="704.402515723271" calcext:value-type="float">
            <text:p>704.402515723271</text:p>
          </table:table-cell>
          <table:table-cell table:formula="of:=1/[.D1002]" office:value-type="float" office:value="0.0260416666666667" calcext:value-type="float">
            <text:p>0.0260416666666667</text:p>
          </table:table-cell>
          <table:table-cell table:formula="of:=LOG10([.E1002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4" calcext:value-type="float">
            <text:p>38.4</text:p>
          </table:table-cell>
          <table:table-cell table:formula="of:=[.C1003]/[.B1003]" office:value-type="float" office:value="1056.60377358491" calcext:value-type="float">
            <text:p>1056.60377358491</text:p>
          </table:table-cell>
          <table:table-cell table:formula="of:=1/[.D1003]" office:value-type="float" office:value="0.0260416666666667" calcext:value-type="float">
            <text:p>0.0260416666666667</text:p>
          </table:table-cell>
          <table:table-cell table:formula="of:=LOG10([.E100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04]/[.B1004]" office:value-type="float" office:value="1056.60377358491" calcext:value-type="float">
            <text:p>1056.60377358491</text:p>
          </table:table-cell>
          <table:table-cell table:formula="of:=1/[.D1004]" office:value-type="float" office:value="0.0261096605744125" calcext:value-type="float">
            <text:p>0.0261096605744125</text:p>
          </table:table-cell>
          <table:table-cell table:formula="of:=LOG10([.E100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05]/[.B1005]" office:value-type="float" office:value="845.283018867925" calcext:value-type="float">
            <text:p>845.283018867925</text:p>
          </table:table-cell>
          <table:table-cell table:formula="of:=1/[.D1005]" office:value-type="float" office:value="0.0261096605744125" calcext:value-type="float">
            <text:p>0.0261096605744125</text:p>
          </table:table-cell>
          <table:table-cell table:formula="of:=LOG10([.E100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06]/[.B1006]" office:value-type="float" office:value="603.77358490566" calcext:value-type="float">
            <text:p>603.77358490566</text:p>
          </table:table-cell>
          <table:table-cell table:formula="of:=1/[.D1006]" office:value-type="float" office:value="0.0261096605744125" calcext:value-type="float">
            <text:p>0.0261096605744125</text:p>
          </table:table-cell>
          <table:table-cell table:formula="of:=LOG10([.E100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07]/[.B1007]" office:value-type="float" office:value="845.283018867925" calcext:value-type="float">
            <text:p>845.283018867925</text:p>
          </table:table-cell>
          <table:table-cell table:formula="of:=1/[.D1007]" office:value-type="float" office:value="0.0261096605744125" calcext:value-type="float">
            <text:p>0.0261096605744125</text:p>
          </table:table-cell>
          <table:table-cell table:formula="of:=LOG10([.E100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08]/[.B1008]" office:value-type="float" office:value="704.402515723271" calcext:value-type="float">
            <text:p>704.402515723271</text:p>
          </table:table-cell>
          <table:table-cell table:formula="of:=1/[.D1008]" office:value-type="float" office:value="0.0261096605744125" calcext:value-type="float">
            <text:p>0.0261096605744125</text:p>
          </table:table-cell>
          <table:table-cell table:formula="of:=LOG10([.E100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09]/[.B1009]" office:value-type="float" office:value="1056.60377358491" calcext:value-type="float">
            <text:p>1056.60377358491</text:p>
          </table:table-cell>
          <table:table-cell table:formula="of:=1/[.D1009]" office:value-type="float" office:value="0.0261096605744125" calcext:value-type="float">
            <text:p>0.0261096605744125</text:p>
          </table:table-cell>
          <table:table-cell table:formula="of:=LOG10([.E100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3" calcext:value-type="float">
            <text:p>38.3</text:p>
          </table:table-cell>
          <table:table-cell table:formula="of:=[.C1010]/[.B1010]" office:value-type="float" office:value="1051.88679245283" calcext:value-type="float">
            <text:p>1051.88679245283</text:p>
          </table:table-cell>
          <table:table-cell table:formula="of:=1/[.D1010]" office:value-type="float" office:value="0.0261096605744125" calcext:value-type="float">
            <text:p>0.0261096605744125</text:p>
          </table:table-cell>
          <table:table-cell table:formula="of:=LOG10([.E1010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1]/[.B1011]" office:value-type="float" office:value="1056.60377358491" calcext:value-type="float">
            <text:p>1056.60377358491</text:p>
          </table:table-cell>
          <table:table-cell table:formula="of:=1/[.D1011]" office:value-type="float" office:value="0.0261096605744125" calcext:value-type="float">
            <text:p>0.0261096605744125</text:p>
          </table:table-cell>
          <table:table-cell table:formula="of:=LOG10([.E101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2]/[.B1012]" office:value-type="float" office:value="1056.60377358491" calcext:value-type="float">
            <text:p>1056.60377358491</text:p>
          </table:table-cell>
          <table:table-cell table:formula="of:=1/[.D1012]" office:value-type="float" office:value="0.0261096605744125" calcext:value-type="float">
            <text:p>0.0261096605744125</text:p>
          </table:table-cell>
          <table:table-cell table:formula="of:=LOG10([.E101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3]/[.B1013]" office:value-type="float" office:value="704.402515723271" calcext:value-type="float">
            <text:p>704.402515723271</text:p>
          </table:table-cell>
          <table:table-cell table:formula="of:=1/[.D1013]" office:value-type="float" office:value="0.0261096605744125" calcext:value-type="float">
            <text:p>0.0261096605744125</text:p>
          </table:table-cell>
          <table:table-cell table:formula="of:=LOG10([.E101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4]/[.B1014]" office:value-type="float" office:value="603.77358490566" calcext:value-type="float">
            <text:p>603.77358490566</text:p>
          </table:table-cell>
          <table:table-cell table:formula="of:=1/[.D1014]" office:value-type="float" office:value="0.0261096605744125" calcext:value-type="float">
            <text:p>0.0261096605744125</text:p>
          </table:table-cell>
          <table:table-cell table:formula="of:=LOG10([.E1014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5]/[.B1015]" office:value-type="float" office:value="603.77358490566" calcext:value-type="float">
            <text:p>603.77358490566</text:p>
          </table:table-cell>
          <table:table-cell table:formula="of:=1/[.D1015]" office:value-type="float" office:value="0.0261096605744125" calcext:value-type="float">
            <text:p>0.0261096605744125</text:p>
          </table:table-cell>
          <table:table-cell table:formula="of:=LOG10([.E1015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38.3" calcext:value-type="float">
            <text:p>38.3</text:p>
          </table:table-cell>
          <table:table-cell table:formula="of:=[.C1016]/[.B1016]" office:value-type="float" office:value="1402.51572327044" calcext:value-type="float">
            <text:p>1402.51572327044</text:p>
          </table:table-cell>
          <table:table-cell table:formula="of:=1/[.D1016]" office:value-type="float" office:value="0.0261096605744125" calcext:value-type="float">
            <text:p>0.0261096605744125</text:p>
          </table:table-cell>
          <table:table-cell table:formula="of:=LOG10([.E1016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7]/[.B1017]" office:value-type="float" office:value="845.283018867925" calcext:value-type="float">
            <text:p>845.283018867925</text:p>
          </table:table-cell>
          <table:table-cell table:formula="of:=1/[.D1017]" office:value-type="float" office:value="0.0261096605744125" calcext:value-type="float">
            <text:p>0.0261096605744125</text:p>
          </table:table-cell>
          <table:table-cell table:formula="of:=LOG10([.E101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3" calcext:value-type="float">
            <text:p>38.3</text:p>
          </table:table-cell>
          <table:table-cell table:formula="of:=[.C1018]/[.B1018]" office:value-type="float" office:value="704.402515723271" calcext:value-type="float">
            <text:p>704.402515723271</text:p>
          </table:table-cell>
          <table:table-cell table:formula="of:=1/[.D1018]" office:value-type="float" office:value="0.0261096605744125" calcext:value-type="float">
            <text:p>0.0261096605744125</text:p>
          </table:table-cell>
          <table:table-cell table:formula="of:=LOG10([.E101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19]/[.B1019]" office:value-type="float" office:value="1408.80503144654" calcext:value-type="float">
            <text:p>1408.80503144654</text:p>
          </table:table-cell>
          <table:table-cell table:formula="of:=1/[.D1019]" office:value-type="float" office:value="0.0261780104712042" calcext:value-type="float">
            <text:p>0.0261780104712042</text:p>
          </table:table-cell>
          <table:table-cell table:formula="of:=LOG10([.E101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0]/[.B1020]" office:value-type="float" office:value="2113.20754716981" calcext:value-type="float">
            <text:p>2113.20754716981</text:p>
          </table:table-cell>
          <table:table-cell table:formula="of:=1/[.D1020]" office:value-type="float" office:value="0.0261780104712042" calcext:value-type="float">
            <text:p>0.0261780104712042</text:p>
          </table:table-cell>
          <table:table-cell table:formula="of:=LOG10([.E1020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8.2" calcext:value-type="float">
            <text:p>38.2</text:p>
          </table:table-cell>
          <table:table-cell table:formula="of:=[.C1021]/[.B1021]" office:value-type="float" office:value="4207.54716981132" calcext:value-type="float">
            <text:p>4207.54716981132</text:p>
          </table:table-cell>
          <table:table-cell table:formula="of:=1/[.D1021]" office:value-type="float" office:value="0.0261780104712042" calcext:value-type="float">
            <text:p>0.0261780104712042</text:p>
          </table:table-cell>
          <table:table-cell table:formula="of:=LOG10([.E1021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2]/[.B1022]" office:value-type="float" office:value="845.283018867925" calcext:value-type="float">
            <text:p>845.283018867925</text:p>
          </table:table-cell>
          <table:table-cell table:formula="of:=1/[.D1022]" office:value-type="float" office:value="0.0261780104712042" calcext:value-type="float">
            <text:p>0.0261780104712042</text:p>
          </table:table-cell>
          <table:table-cell table:formula="of:=LOG10([.E102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3]/[.B1023]" office:value-type="float" office:value="2113.20754716981" calcext:value-type="float">
            <text:p>2113.20754716981</text:p>
          </table:table-cell>
          <table:table-cell table:formula="of:=1/[.D1023]" office:value-type="float" office:value="0.0261780104712042" calcext:value-type="float">
            <text:p>0.0261780104712042</text:p>
          </table:table-cell>
          <table:table-cell table:formula="of:=LOG10([.E1023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2" calcext:value-type="float">
            <text:p>38.2</text:p>
          </table:table-cell>
          <table:table-cell table:formula="of:=[.C1024]/[.B1024]" office:value-type="float" office:value="1051.88679245283" calcext:value-type="float">
            <text:p>1051.88679245283</text:p>
          </table:table-cell>
          <table:table-cell table:formula="of:=1/[.D1024]" office:value-type="float" office:value="0.0261780104712042" calcext:value-type="float">
            <text:p>0.0261780104712042</text:p>
          </table:table-cell>
          <table:table-cell table:formula="of:=LOG10([.E1024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5]/[.B1025]" office:value-type="float" office:value="1056.60377358491" calcext:value-type="float">
            <text:p>1056.60377358491</text:p>
          </table:table-cell>
          <table:table-cell table:formula="of:=1/[.D1025]" office:value-type="float" office:value="0.0261780104712042" calcext:value-type="float">
            <text:p>0.0261780104712042</text:p>
          </table:table-cell>
          <table:table-cell table:formula="of:=LOG10([.E102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6]/[.B1026]" office:value-type="float" office:value="845.283018867925" calcext:value-type="float">
            <text:p>845.283018867925</text:p>
          </table:table-cell>
          <table:table-cell table:formula="of:=1/[.D1026]" office:value-type="float" office:value="0.0261780104712042" calcext:value-type="float">
            <text:p>0.0261780104712042</text:p>
          </table:table-cell>
          <table:table-cell table:formula="of:=LOG10([.E102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7]/[.B1027]" office:value-type="float" office:value="845.283018867925" calcext:value-type="float">
            <text:p>845.283018867925</text:p>
          </table:table-cell>
          <table:table-cell table:formula="of:=1/[.D1027]" office:value-type="float" office:value="0.0261780104712042" calcext:value-type="float">
            <text:p>0.0261780104712042</text:p>
          </table:table-cell>
          <table:table-cell table:formula="of:=LOG10([.E102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28]/[.B1028]" office:value-type="float" office:value="1408.80503144654" calcext:value-type="float">
            <text:p>1408.80503144654</text:p>
          </table:table-cell>
          <table:table-cell table:formula="of:=1/[.D1028]" office:value-type="float" office:value="0.0261780104712042" calcext:value-type="float">
            <text:p>0.0261780104712042</text:p>
          </table:table-cell>
          <table:table-cell table:formula="of:=LOG10([.E1028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2" calcext:value-type="float">
            <text:p>38.2</text:p>
          </table:table-cell>
          <table:table-cell table:formula="of:=[.C1029]/[.B1029]" office:value-type="float" office:value="1051.88679245283" calcext:value-type="float">
            <text:p>1051.88679245283</text:p>
          </table:table-cell>
          <table:table-cell table:formula="of:=1/[.D1029]" office:value-type="float" office:value="0.0261780104712042" calcext:value-type="float">
            <text:p>0.0261780104712042</text:p>
          </table:table-cell>
          <table:table-cell table:formula="of:=LOG10([.E1029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2" calcext:value-type="float">
            <text:p>38.2</text:p>
          </table:table-cell>
          <table:table-cell table:formula="of:=[.C1030]/[.B1030]" office:value-type="float" office:value="1051.88679245283" calcext:value-type="float">
            <text:p>1051.88679245283</text:p>
          </table:table-cell>
          <table:table-cell table:formula="of:=1/[.D1030]" office:value-type="float" office:value="0.0261780104712042" calcext:value-type="float">
            <text:p>0.0261780104712042</text:p>
          </table:table-cell>
          <table:table-cell table:formula="of:=LOG10([.E1030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1]/[.B1031]" office:value-type="float" office:value="1056.60377358491" calcext:value-type="float">
            <text:p>1056.60377358491</text:p>
          </table:table-cell>
          <table:table-cell table:formula="of:=1/[.D1031]" office:value-type="float" office:value="0.0261780104712042" calcext:value-type="float">
            <text:p>0.0261780104712042</text:p>
          </table:table-cell>
          <table:table-cell table:formula="of:=LOG10([.E103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2]/[.B1032]" office:value-type="float" office:value="845.283018867925" calcext:value-type="float">
            <text:p>845.283018867925</text:p>
          </table:table-cell>
          <table:table-cell table:formula="of:=1/[.D1032]" office:value-type="float" office:value="0.0261780104712042" calcext:value-type="float">
            <text:p>0.0261780104712042</text:p>
          </table:table-cell>
          <table:table-cell table:formula="of:=LOG10([.E103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3]/[.B1033]" office:value-type="float" office:value="845.283018867925" calcext:value-type="float">
            <text:p>845.283018867925</text:p>
          </table:table-cell>
          <table:table-cell table:formula="of:=1/[.D1033]" office:value-type="float" office:value="0.0261780104712042" calcext:value-type="float">
            <text:p>0.0261780104712042</text:p>
          </table:table-cell>
          <table:table-cell table:formula="of:=LOG10([.E103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4]/[.B1034]" office:value-type="float" office:value="1056.60377358491" calcext:value-type="float">
            <text:p>1056.60377358491</text:p>
          </table:table-cell>
          <table:table-cell table:formula="of:=1/[.D1034]" office:value-type="float" office:value="0.0261780104712042" calcext:value-type="float">
            <text:p>0.0261780104712042</text:p>
          </table:table-cell>
          <table:table-cell table:formula="of:=LOG10([.E103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5]/[.B1035]" office:value-type="float" office:value="1408.80503144654" calcext:value-type="float">
            <text:p>1408.80503144654</text:p>
          </table:table-cell>
          <table:table-cell table:formula="of:=1/[.D1035]" office:value-type="float" office:value="0.0261780104712042" calcext:value-type="float">
            <text:p>0.0261780104712042</text:p>
          </table:table-cell>
          <table:table-cell table:formula="of:=LOG10([.E103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6]/[.B1036]" office:value-type="float" office:value="1056.60377358491" calcext:value-type="float">
            <text:p>1056.60377358491</text:p>
          </table:table-cell>
          <table:table-cell table:formula="of:=1/[.D1036]" office:value-type="float" office:value="0.0261780104712042" calcext:value-type="float">
            <text:p>0.0261780104712042</text:p>
          </table:table-cell>
          <table:table-cell table:formula="of:=LOG10([.E103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3" calcext:value-type="float">
            <text:p>2.23</text:p>
          </table:table-cell>
          <table:table-cell office:value-type="float" office:value="38.2" calcext:value-type="float">
            <text:p>38.2</text:p>
          </table:table-cell>
          <table:table-cell table:formula="of:=[.C1037]/[.B1037]" office:value-type="float" office:value="841.509433962264" calcext:value-type="float">
            <text:p>841.509433962264</text:p>
          </table:table-cell>
          <table:table-cell table:formula="of:=1/[.D1037]" office:value-type="float" office:value="0.0261780104712042" calcext:value-type="float">
            <text:p>0.0261780104712042</text:p>
          </table:table-cell>
          <table:table-cell table:formula="of:=LOG10([.E1037])" office:value-type="float" office:value="2.92505898911135" calcext:value-type="float">
            <text:p>2.9250589891113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8]/[.B1038]" office:value-type="float" office:value="845.283018867925" calcext:value-type="float">
            <text:p>845.283018867925</text:p>
          </table:table-cell>
          <table:table-cell table:formula="of:=1/[.D1038]" office:value-type="float" office:value="0.0261780104712042" calcext:value-type="float">
            <text:p>0.0261780104712042</text:p>
          </table:table-cell>
          <table:table-cell table:formula="of:=LOG10([.E103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2" calcext:value-type="float">
            <text:p>38.2</text:p>
          </table:table-cell>
          <table:table-cell table:formula="of:=[.C1039]/[.B1039]" office:value-type="float" office:value="845.283018867925" calcext:value-type="float">
            <text:p>845.283018867925</text:p>
          </table:table-cell>
          <table:table-cell table:formula="of:=1/[.D1039]" office:value-type="float" office:value="0.0261780104712042" calcext:value-type="float">
            <text:p>0.0261780104712042</text:p>
          </table:table-cell>
          <table:table-cell table:formula="of:=LOG10([.E103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0]/[.B1040]" office:value-type="float" office:value="1056.60377358491" calcext:value-type="float">
            <text:p>1056.60377358491</text:p>
          </table:table-cell>
          <table:table-cell table:formula="of:=1/[.D1040]" office:value-type="float" office:value="0.026246719160105" calcext:value-type="float">
            <text:p>0.026246719160105</text:p>
          </table:table-cell>
          <table:table-cell table:formula="of:=LOG10([.E104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1" calcext:value-type="float">
            <text:p>38.1</text:p>
          </table:table-cell>
          <table:table-cell table:formula="of:=[.C1041]/[.B1041]" office:value-type="float" office:value="1051.88679245283" calcext:value-type="float">
            <text:p>1051.88679245283</text:p>
          </table:table-cell>
          <table:table-cell table:formula="of:=1/[.D1041]" office:value-type="float" office:value="0.026246719160105" calcext:value-type="float">
            <text:p>0.026246719160105</text:p>
          </table:table-cell>
          <table:table-cell table:formula="of:=LOG10([.E1041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2]/[.B1042]" office:value-type="float" office:value="1056.60377358491" calcext:value-type="float">
            <text:p>1056.60377358491</text:p>
          </table:table-cell>
          <table:table-cell table:formula="of:=1/[.D1042]" office:value-type="float" office:value="0.026246719160105" calcext:value-type="float">
            <text:p>0.026246719160105</text:p>
          </table:table-cell>
          <table:table-cell table:formula="of:=LOG10([.E104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3]/[.B1043]" office:value-type="float" office:value="1056.60377358491" calcext:value-type="float">
            <text:p>1056.60377358491</text:p>
          </table:table-cell>
          <table:table-cell table:formula="of:=1/[.D1043]" office:value-type="float" office:value="0.026246719160105" calcext:value-type="float">
            <text:p>0.026246719160105</text:p>
          </table:table-cell>
          <table:table-cell table:formula="of:=LOG10([.E104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4]/[.B1044]" office:value-type="float" office:value="845.283018867925" calcext:value-type="float">
            <text:p>845.283018867925</text:p>
          </table:table-cell>
          <table:table-cell table:formula="of:=1/[.D1044]" office:value-type="float" office:value="0.026246719160105" calcext:value-type="float">
            <text:p>0.026246719160105</text:p>
          </table:table-cell>
          <table:table-cell table:formula="of:=LOG10([.E1044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5]/[.B1045]" office:value-type="float" office:value="845.283018867925" calcext:value-type="float">
            <text:p>845.283018867925</text:p>
          </table:table-cell>
          <table:table-cell table:formula="of:=1/[.D1045]" office:value-type="float" office:value="0.026246719160105" calcext:value-type="float">
            <text:p>0.026246719160105</text:p>
          </table:table-cell>
          <table:table-cell table:formula="of:=LOG10([.E104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6]/[.B1046]" office:value-type="float" office:value="704.402515723271" calcext:value-type="float">
            <text:p>704.402515723271</text:p>
          </table:table-cell>
          <table:table-cell table:formula="of:=1/[.D1046]" office:value-type="float" office:value="0.026246719160105" calcext:value-type="float">
            <text:p>0.026246719160105</text:p>
          </table:table-cell>
          <table:table-cell table:formula="of:=LOG10([.E1046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7]/[.B1047]" office:value-type="float" office:value="845.283018867925" calcext:value-type="float">
            <text:p>845.283018867925</text:p>
          </table:table-cell>
          <table:table-cell table:formula="of:=1/[.D1047]" office:value-type="float" office:value="0.026246719160105" calcext:value-type="float">
            <text:p>0.026246719160105</text:p>
          </table:table-cell>
          <table:table-cell table:formula="of:=LOG10([.E104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8]/[.B1048]" office:value-type="float" office:value="1056.60377358491" calcext:value-type="float">
            <text:p>1056.60377358491</text:p>
          </table:table-cell>
          <table:table-cell table:formula="of:=1/[.D1048]" office:value-type="float" office:value="0.026246719160105" calcext:value-type="float">
            <text:p>0.026246719160105</text:p>
          </table:table-cell>
          <table:table-cell table:formula="of:=LOG10([.E104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49]/[.B1049]" office:value-type="float" office:value="845.283018867925" calcext:value-type="float">
            <text:p>845.283018867925</text:p>
          </table:table-cell>
          <table:table-cell table:formula="of:=1/[.D1049]" office:value-type="float" office:value="0.026246719160105" calcext:value-type="float">
            <text:p>0.026246719160105</text:p>
          </table:table-cell>
          <table:table-cell table:formula="of:=LOG10([.E104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0]/[.B1050]" office:value-type="float" office:value="845.283018867925" calcext:value-type="float">
            <text:p>845.283018867925</text:p>
          </table:table-cell>
          <table:table-cell table:formula="of:=1/[.D1050]" office:value-type="float" office:value="0.026246719160105" calcext:value-type="float">
            <text:p>0.026246719160105</text:p>
          </table:table-cell>
          <table:table-cell table:formula="of:=LOG10([.E105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1]/[.B1051]" office:value-type="float" office:value="845.283018867925" calcext:value-type="float">
            <text:p>845.283018867925</text:p>
          </table:table-cell>
          <table:table-cell table:formula="of:=1/[.D1051]" office:value-type="float" office:value="0.026246719160105" calcext:value-type="float">
            <text:p>0.026246719160105</text:p>
          </table:table-cell>
          <table:table-cell table:formula="of:=LOG10([.E105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2]/[.B1052]" office:value-type="float" office:value="845.283018867925" calcext:value-type="float">
            <text:p>845.283018867925</text:p>
          </table:table-cell>
          <table:table-cell table:formula="of:=1/[.D1052]" office:value-type="float" office:value="0.026246719160105" calcext:value-type="float">
            <text:p>0.026246719160105</text:p>
          </table:table-cell>
          <table:table-cell table:formula="of:=LOG10([.E105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3]/[.B1053]" office:value-type="float" office:value="704.402515723271" calcext:value-type="float">
            <text:p>704.402515723271</text:p>
          </table:table-cell>
          <table:table-cell table:formula="of:=1/[.D1053]" office:value-type="float" office:value="0.026246719160105" calcext:value-type="float">
            <text:p>0.026246719160105</text:p>
          </table:table-cell>
          <table:table-cell table:formula="of:=LOG10([.E1053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4]/[.B1054]" office:value-type="float" office:value="704.402515723271" calcext:value-type="float">
            <text:p>704.402515723271</text:p>
          </table:table-cell>
          <table:table-cell table:formula="of:=1/[.D1054]" office:value-type="float" office:value="0.026246719160105" calcext:value-type="float">
            <text:p>0.026246719160105</text:p>
          </table:table-cell>
          <table:table-cell table:formula="of:=LOG10([.E105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5]/[.B1055]" office:value-type="float" office:value="845.283018867925" calcext:value-type="float">
            <text:p>845.283018867925</text:p>
          </table:table-cell>
          <table:table-cell table:formula="of:=1/[.D1055]" office:value-type="float" office:value="0.026246719160105" calcext:value-type="float">
            <text:p>0.026246719160105</text:p>
          </table:table-cell>
          <table:table-cell table:formula="of:=LOG10([.E1055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.1" calcext:value-type="float">
            <text:p>38.1</text:p>
          </table:table-cell>
          <table:table-cell table:formula="of:=[.C1056]/[.B1056]" office:value-type="float" office:value="1051.88679245283" calcext:value-type="float">
            <text:p>1051.88679245283</text:p>
          </table:table-cell>
          <table:table-cell table:formula="of:=1/[.D1056]" office:value-type="float" office:value="0.026246719160105" calcext:value-type="float">
            <text:p>0.026246719160105</text:p>
          </table:table-cell>
          <table:table-cell table:formula="of:=LOG10([.E1056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7]/[.B1057]" office:value-type="float" office:value="1408.80503144654" calcext:value-type="float">
            <text:p>1408.80503144654</text:p>
          </table:table-cell>
          <table:table-cell table:formula="of:=1/[.D1057]" office:value-type="float" office:value="0.026246719160105" calcext:value-type="float">
            <text:p>0.026246719160105</text:p>
          </table:table-cell>
          <table:table-cell table:formula="of:=LOG10([.E105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8]/[.B1058]" office:value-type="float" office:value="845.283018867925" calcext:value-type="float">
            <text:p>845.283018867925</text:p>
          </table:table-cell>
          <table:table-cell table:formula="of:=1/[.D1058]" office:value-type="float" office:value="0.026246719160105" calcext:value-type="float">
            <text:p>0.026246719160105</text:p>
          </table:table-cell>
          <table:table-cell table:formula="of:=LOG10([.E105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59]/[.B1059]" office:value-type="float" office:value="1056.60377358491" calcext:value-type="float">
            <text:p>1056.60377358491</text:p>
          </table:table-cell>
          <table:table-cell table:formula="of:=1/[.D1059]" office:value-type="float" office:value="0.026246719160105" calcext:value-type="float">
            <text:p>0.026246719160105</text:p>
          </table:table-cell>
          <table:table-cell table:formula="of:=LOG10([.E105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60]/[.B1060]" office:value-type="float" office:value="1056.60377358491" calcext:value-type="float">
            <text:p>1056.60377358491</text:p>
          </table:table-cell>
          <table:table-cell table:formula="of:=1/[.D1060]" office:value-type="float" office:value="0.026246719160105" calcext:value-type="float">
            <text:p>0.026246719160105</text:p>
          </table:table-cell>
          <table:table-cell table:formula="of:=LOG10([.E106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.1" calcext:value-type="float">
            <text:p>38.1</text:p>
          </table:table-cell>
          <table:table-cell table:formula="of:=[.C1061]/[.B1061]" office:value-type="float" office:value="1408.80503144654" calcext:value-type="float">
            <text:p>1408.80503144654</text:p>
          </table:table-cell>
          <table:table-cell table:formula="of:=1/[.D1061]" office:value-type="float" office:value="0.026246719160105" calcext:value-type="float">
            <text:p>0.026246719160105</text:p>
          </table:table-cell>
          <table:table-cell table:formula="of:=LOG10([.E1061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62]/[.B1062]" office:value-type="float" office:value="1056.60377358491" calcext:value-type="float">
            <text:p>1056.60377358491</text:p>
          </table:table-cell>
          <table:table-cell table:formula="of:=1/[.D1062]" office:value-type="float" office:value="0.0263157894736842" calcext:value-type="float">
            <text:p>0.0263157894736842</text:p>
          </table:table-cell>
          <table:table-cell table:formula="of:=LOG10([.E106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63]/[.B1063]" office:value-type="float" office:value="1408.80503144654" calcext:value-type="float">
            <text:p>1408.80503144654</text:p>
          </table:table-cell>
          <table:table-cell table:formula="of:=1/[.D1063]" office:value-type="float" office:value="0.0263157894736842" calcext:value-type="float">
            <text:p>0.0263157894736842</text:p>
          </table:table-cell>
          <table:table-cell table:formula="of:=LOG10([.E106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38" calcext:value-type="float">
            <text:p>38</text:p>
          </table:table-cell>
          <table:table-cell table:formula="of:=[.C1064]/[.B1064]" office:value-type="float" office:value="1402.51572327044" calcext:value-type="float">
            <text:p>1402.51572327044</text:p>
          </table:table-cell>
          <table:table-cell table:formula="of:=1/[.D1064]" office:value-type="float" office:value="0.0263157894736842" calcext:value-type="float">
            <text:p>0.0263157894736842</text:p>
          </table:table-cell>
          <table:table-cell table:formula="of:=LOG10([.E1064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65]/[.B1065]" office:value-type="float" office:value="4226.41509433962" calcext:value-type="float">
            <text:p>4226.41509433962</text:p>
          </table:table-cell>
          <table:table-cell table:formula="of:=1/[.D1065]" office:value-type="float" office:value="0.0263157894736842" calcext:value-type="float">
            <text:p>0.0263157894736842</text:p>
          </table:table-cell>
          <table:table-cell table:formula="of:=LOG10([.E1065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3" calcext:value-type="float">
            <text:p>2.23</text:p>
          </table:table-cell>
          <table:table-cell office:value-type="float" office:value="38" calcext:value-type="float">
            <text:p>38</text:p>
          </table:table-cell>
          <table:table-cell table:formula="of:=[.C1066]/[.B1066]" office:value-type="float" office:value="2103.77358490566" calcext:value-type="float">
            <text:p>2103.77358490566</text:p>
          </table:table-cell>
          <table:table-cell table:formula="of:=1/[.D1066]" office:value-type="float" office:value="0.0263157894736842" calcext:value-type="float">
            <text:p>0.0263157894736842</text:p>
          </table:table-cell>
          <table:table-cell table:formula="of:=LOG10([.E1066])" office:value-type="float" office:value="3.32299899778339" calcext:value-type="float">
            <text:p>3.3229989977833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3" calcext:value-type="float">
            <text:p>2.23</text:p>
          </table:table-cell>
          <table:table-cell office:value-type="float" office:value="38" calcext:value-type="float">
            <text:p>38</text:p>
          </table:table-cell>
          <table:table-cell table:formula="of:=[.C1067]/[.B1067]" office:value-type="float" office:value="601.078167115903" calcext:value-type="float">
            <text:p>601.078167115903</text:p>
          </table:table-cell>
          <table:table-cell table:formula="of:=1/[.D1067]" office:value-type="float" office:value="0.0263157894736842" calcext:value-type="float">
            <text:p>0.0263157894736842</text:p>
          </table:table-cell>
          <table:table-cell table:formula="of:=LOG10([.E1067])" office:value-type="float" office:value="2.77893095343311" calcext:value-type="float">
            <text:p>2.7789309534331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68]/[.B1068]" office:value-type="float" office:value="4226.41509433962" calcext:value-type="float">
            <text:p>4226.41509433962</text:p>
          </table:table-cell>
          <table:table-cell table:formula="of:=1/[.D1068]" office:value-type="float" office:value="0.0263157894736842" calcext:value-type="float">
            <text:p>0.0263157894736842</text:p>
          </table:table-cell>
          <table:table-cell table:formula="of:=LOG10([.E1068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69]/[.B1069]" office:value-type="float" office:value="704.402515723271" calcext:value-type="float">
            <text:p>704.402515723271</text:p>
          </table:table-cell>
          <table:table-cell table:formula="of:=1/[.D1069]" office:value-type="float" office:value="0.0263157894736842" calcext:value-type="float">
            <text:p>0.0263157894736842</text:p>
          </table:table-cell>
          <table:table-cell table:formula="of:=LOG10([.E106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0]/[.B1070]" office:value-type="float" office:value="469.601677148847" calcext:value-type="float">
            <text:p>469.601677148847</text:p>
          </table:table-cell>
          <table:table-cell table:formula="of:=1/[.D1070]" office:value-type="float" office:value="0.0263157894736842" calcext:value-type="float">
            <text:p>0.0263157894736842</text:p>
          </table:table-cell>
          <table:table-cell table:formula="of:=LOG10([.E1070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1]/[.B1071]" office:value-type="float" office:value="603.77358490566" calcext:value-type="float">
            <text:p>603.77358490566</text:p>
          </table:table-cell>
          <table:table-cell table:formula="of:=1/[.D1071]" office:value-type="float" office:value="0.0263157894736842" calcext:value-type="float">
            <text:p>0.0263157894736842</text:p>
          </table:table-cell>
          <table:table-cell table:formula="of:=LOG10([.E1071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2]/[.B1072]" office:value-type="float" office:value="1056.60377358491" calcext:value-type="float">
            <text:p>1056.60377358491</text:p>
          </table:table-cell>
          <table:table-cell table:formula="of:=1/[.D1072]" office:value-type="float" office:value="0.0263157894736842" calcext:value-type="float">
            <text:p>0.0263157894736842</text:p>
          </table:table-cell>
          <table:table-cell table:formula="of:=LOG10([.E107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8" calcext:value-type="float">
            <text:p>38</text:p>
          </table:table-cell>
          <table:table-cell table:formula="of:=[.C1073]/[.B1073]" office:value-type="float" office:value="1051.88679245283" calcext:value-type="float">
            <text:p>1051.88679245283</text:p>
          </table:table-cell>
          <table:table-cell table:formula="of:=1/[.D1073]" office:value-type="float" office:value="0.0263157894736842" calcext:value-type="float">
            <text:p>0.0263157894736842</text:p>
          </table:table-cell>
          <table:table-cell table:formula="of:=LOG10([.E1073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4]/[.B1074]" office:value-type="float" office:value="1056.60377358491" calcext:value-type="float">
            <text:p>1056.60377358491</text:p>
          </table:table-cell>
          <table:table-cell table:formula="of:=1/[.D1074]" office:value-type="float" office:value="0.0263157894736842" calcext:value-type="float">
            <text:p>0.0263157894736842</text:p>
          </table:table-cell>
          <table:table-cell table:formula="of:=LOG10([.E107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5]/[.B1075]" office:value-type="float" office:value="1056.60377358491" calcext:value-type="float">
            <text:p>1056.60377358491</text:p>
          </table:table-cell>
          <table:table-cell table:formula="of:=1/[.D1075]" office:value-type="float" office:value="0.0263157894736842" calcext:value-type="float">
            <text:p>0.0263157894736842</text:p>
          </table:table-cell>
          <table:table-cell table:formula="of:=LOG10([.E107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6]/[.B1076]" office:value-type="float" office:value="1408.80503144654" calcext:value-type="float">
            <text:p>1408.80503144654</text:p>
          </table:table-cell>
          <table:table-cell table:formula="of:=1/[.D1076]" office:value-type="float" office:value="0.0263157894736842" calcext:value-type="float">
            <text:p>0.0263157894736842</text:p>
          </table:table-cell>
          <table:table-cell table:formula="of:=LOG10([.E107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7]/[.B1077]" office:value-type="float" office:value="704.402515723271" calcext:value-type="float">
            <text:p>704.402515723271</text:p>
          </table:table-cell>
          <table:table-cell table:formula="of:=1/[.D1077]" office:value-type="float" office:value="0.0263157894736842" calcext:value-type="float">
            <text:p>0.0263157894736842</text:p>
          </table:table-cell>
          <table:table-cell table:formula="of:=LOG10([.E107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8]/[.B1078]" office:value-type="float" office:value="1056.60377358491" calcext:value-type="float">
            <text:p>1056.60377358491</text:p>
          </table:table-cell>
          <table:table-cell table:formula="of:=1/[.D1078]" office:value-type="float" office:value="0.0263157894736842" calcext:value-type="float">
            <text:p>0.0263157894736842</text:p>
          </table:table-cell>
          <table:table-cell table:formula="of:=LOG10([.E107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79]/[.B1079]" office:value-type="float" office:value="1056.60377358491" calcext:value-type="float">
            <text:p>1056.60377358491</text:p>
          </table:table-cell>
          <table:table-cell table:formula="of:=1/[.D1079]" office:value-type="float" office:value="0.0263157894736842" calcext:value-type="float">
            <text:p>0.0263157894736842</text:p>
          </table:table-cell>
          <table:table-cell table:formula="of:=LOG10([.E107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80]/[.B1080]" office:value-type="float" office:value="845.283018867925" calcext:value-type="float">
            <text:p>845.283018867925</text:p>
          </table:table-cell>
          <table:table-cell table:formula="of:=1/[.D1080]" office:value-type="float" office:value="0.0263157894736842" calcext:value-type="float">
            <text:p>0.0263157894736842</text:p>
          </table:table-cell>
          <table:table-cell table:formula="of:=LOG10([.E108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81]/[.B1081]" office:value-type="float" office:value="845.283018867925" calcext:value-type="float">
            <text:p>845.283018867925</text:p>
          </table:table-cell>
          <table:table-cell table:formula="of:=1/[.D1081]" office:value-type="float" office:value="0.0263157894736842" calcext:value-type="float">
            <text:p>0.0263157894736842</text:p>
          </table:table-cell>
          <table:table-cell table:formula="of:=LOG10([.E108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82]/[.B1082]" office:value-type="float" office:value="1056.60377358491" calcext:value-type="float">
            <text:p>1056.60377358491</text:p>
          </table:table-cell>
          <table:table-cell table:formula="of:=1/[.D1082]" office:value-type="float" office:value="0.0263157894736842" calcext:value-type="float">
            <text:p>0.0263157894736842</text:p>
          </table:table-cell>
          <table:table-cell table:formula="of:=LOG10([.E108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83]/[.B1083]" office:value-type="float" office:value="1056.60377358491" calcext:value-type="float">
            <text:p>1056.60377358491</text:p>
          </table:table-cell>
          <table:table-cell table:formula="of:=1/[.D1083]" office:value-type="float" office:value="0.0263157894736842" calcext:value-type="float">
            <text:p>0.0263157894736842</text:p>
          </table:table-cell>
          <table:table-cell table:formula="of:=LOG10([.E108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8" calcext:value-type="float">
            <text:p>38</text:p>
          </table:table-cell>
          <table:table-cell table:formula="of:=[.C1084]/[.B1084]" office:value-type="float" office:value="1056.60377358491" calcext:value-type="float">
            <text:p>1056.60377358491</text:p>
          </table:table-cell>
          <table:table-cell table:formula="of:=1/[.D1084]" office:value-type="float" office:value="0.0263157894736842" calcext:value-type="float">
            <text:p>0.0263157894736842</text:p>
          </table:table-cell>
          <table:table-cell table:formula="of:=LOG10([.E108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85]/[.B1085]" office:value-type="float" office:value="1056.60377358491" calcext:value-type="float">
            <text:p>1056.60377358491</text:p>
          </table:table-cell>
          <table:table-cell table:formula="of:=1/[.D1085]" office:value-type="float" office:value="0.0263852242744063" calcext:value-type="float">
            <text:p>0.0263852242744063</text:p>
          </table:table-cell>
          <table:table-cell table:formula="of:=LOG10([.E108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86]/[.B1086]" office:value-type="float" office:value="1056.60377358491" calcext:value-type="float">
            <text:p>1056.60377358491</text:p>
          </table:table-cell>
          <table:table-cell table:formula="of:=1/[.D1086]" office:value-type="float" office:value="0.0263852242744063" calcext:value-type="float">
            <text:p>0.0263852242744063</text:p>
          </table:table-cell>
          <table:table-cell table:formula="of:=LOG10([.E108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87]/[.B1087]" office:value-type="float" office:value="845.283018867925" calcext:value-type="float">
            <text:p>845.283018867925</text:p>
          </table:table-cell>
          <table:table-cell table:formula="of:=1/[.D1087]" office:value-type="float" office:value="0.0263852242744063" calcext:value-type="float">
            <text:p>0.0263852242744063</text:p>
          </table:table-cell>
          <table:table-cell table:formula="of:=LOG10([.E108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88]/[.B1088]" office:value-type="float" office:value="1056.60377358491" calcext:value-type="float">
            <text:p>1056.60377358491</text:p>
          </table:table-cell>
          <table:table-cell table:formula="of:=1/[.D1088]" office:value-type="float" office:value="0.0263852242744063" calcext:value-type="float">
            <text:p>0.0263852242744063</text:p>
          </table:table-cell>
          <table:table-cell table:formula="of:=LOG10([.E108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89]/[.B1089]" office:value-type="float" office:value="704.402515723271" calcext:value-type="float">
            <text:p>704.402515723271</text:p>
          </table:table-cell>
          <table:table-cell table:formula="of:=1/[.D1089]" office:value-type="float" office:value="0.0263852242744063" calcext:value-type="float">
            <text:p>0.0263852242744063</text:p>
          </table:table-cell>
          <table:table-cell table:formula="of:=LOG10([.E1089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0]/[.B1090]" office:value-type="float" office:value="603.77358490566" calcext:value-type="float">
            <text:p>603.77358490566</text:p>
          </table:table-cell>
          <table:table-cell table:formula="of:=1/[.D1090]" office:value-type="float" office:value="0.0263852242744063" calcext:value-type="float">
            <text:p>0.0263852242744063</text:p>
          </table:table-cell>
          <table:table-cell table:formula="of:=LOG10([.E1090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1]/[.B1091]" office:value-type="float" office:value="469.601677148847" calcext:value-type="float">
            <text:p>469.601677148847</text:p>
          </table:table-cell>
          <table:table-cell table:formula="of:=1/[.D1091]" office:value-type="float" office:value="0.0263852242744063" calcext:value-type="float">
            <text:p>0.0263852242744063</text:p>
          </table:table-cell>
          <table:table-cell table:formula="of:=LOG10([.E1091])" office:value-type="float" office:value="2.67172963929405" calcext:value-type="float">
            <text:p>2.6717296392940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2]/[.B1092]" office:value-type="float" office:value="603.77358490566" calcext:value-type="float">
            <text:p>603.77358490566</text:p>
          </table:table-cell>
          <table:table-cell table:formula="of:=1/[.D1092]" office:value-type="float" office:value="0.0263852242744063" calcext:value-type="float">
            <text:p>0.0263852242744063</text:p>
          </table:table-cell>
          <table:table-cell table:formula="of:=LOG10([.E1092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3]/[.B1093]" office:value-type="float" office:value="1056.60377358491" calcext:value-type="float">
            <text:p>1056.60377358491</text:p>
          </table:table-cell>
          <table:table-cell table:formula="of:=1/[.D1093]" office:value-type="float" office:value="0.0263852242744063" calcext:value-type="float">
            <text:p>0.0263852242744063</text:p>
          </table:table-cell>
          <table:table-cell table:formula="of:=LOG10([.E109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4]/[.B1094]" office:value-type="float" office:value="2113.20754716981" calcext:value-type="float">
            <text:p>2113.20754716981</text:p>
          </table:table-cell>
          <table:table-cell table:formula="of:=1/[.D1094]" office:value-type="float" office:value="0.0263852242744063" calcext:value-type="float">
            <text:p>0.0263852242744063</text:p>
          </table:table-cell>
          <table:table-cell table:formula="of:=LOG10([.E1094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5]/[.B1095]" office:value-type="float" office:value="1056.60377358491" calcext:value-type="float">
            <text:p>1056.60377358491</text:p>
          </table:table-cell>
          <table:table-cell table:formula="of:=1/[.D1095]" office:value-type="float" office:value="0.0263852242744063" calcext:value-type="float">
            <text:p>0.0263852242744063</text:p>
          </table:table-cell>
          <table:table-cell table:formula="of:=LOG10([.E109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6]/[.B1096]" office:value-type="float" office:value="845.283018867925" calcext:value-type="float">
            <text:p>845.283018867925</text:p>
          </table:table-cell>
          <table:table-cell table:formula="of:=1/[.D1096]" office:value-type="float" office:value="0.0263852242744063" calcext:value-type="float">
            <text:p>0.0263852242744063</text:p>
          </table:table-cell>
          <table:table-cell table:formula="of:=LOG10([.E109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7]/[.B1097]" office:value-type="float" office:value="845.283018867925" calcext:value-type="float">
            <text:p>845.283018867925</text:p>
          </table:table-cell>
          <table:table-cell table:formula="of:=1/[.D1097]" office:value-type="float" office:value="0.0263852242744063" calcext:value-type="float">
            <text:p>0.0263852242744063</text:p>
          </table:table-cell>
          <table:table-cell table:formula="of:=LOG10([.E109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8]/[.B1098]" office:value-type="float" office:value="845.283018867925" calcext:value-type="float">
            <text:p>845.283018867925</text:p>
          </table:table-cell>
          <table:table-cell table:formula="of:=1/[.D1098]" office:value-type="float" office:value="0.0263852242744063" calcext:value-type="float">
            <text:p>0.0263852242744063</text:p>
          </table:table-cell>
          <table:table-cell table:formula="of:=LOG10([.E109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099]/[.B1099]" office:value-type="float" office:value="845.283018867925" calcext:value-type="float">
            <text:p>845.283018867925</text:p>
          </table:table-cell>
          <table:table-cell table:formula="of:=1/[.D1099]" office:value-type="float" office:value="0.0263852242744063" calcext:value-type="float">
            <text:p>0.0263852242744063</text:p>
          </table:table-cell>
          <table:table-cell table:formula="of:=LOG10([.E109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5" calcext:value-type="float">
            <text:p>2.25</text:p>
          </table:table-cell>
          <table:table-cell office:value-type="float" office:value="37.9" calcext:value-type="float">
            <text:p>37.9</text:p>
          </table:table-cell>
          <table:table-cell table:formula="of:=[.C1100]/[.B1100]" office:value-type="float" office:value="1061.32075471698" calcext:value-type="float">
            <text:p>1061.32075471698</text:p>
          </table:table-cell>
          <table:table-cell table:formula="of:=1/[.D1100]" office:value-type="float" office:value="0.0263852242744063" calcext:value-type="float">
            <text:p>0.0263852242744063</text:p>
          </table:table-cell>
          <table:table-cell table:formula="of:=LOG10([.E1100])" office:value-type="float" office:value="3.02584665718261" calcext:value-type="float">
            <text:p>3.0258466571826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101]/[.B1101]" office:value-type="float" office:value="4226.41509433962" calcext:value-type="float">
            <text:p>4226.41509433962</text:p>
          </table:table-cell>
          <table:table-cell table:formula="of:=1/[.D1101]" office:value-type="float" office:value="0.0263852242744063" calcext:value-type="float">
            <text:p>0.0263852242744063</text:p>
          </table:table-cell>
          <table:table-cell table:formula="of:=LOG10([.E1101])" office:value-type="float" office:value="3.62597214873337" calcext:value-type="float">
            <text:p>3.6259721487333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102]/[.B1102]" office:value-type="float" office:value="2113.20754716981" calcext:value-type="float">
            <text:p>2113.20754716981</text:p>
          </table:table-cell>
          <table:table-cell table:formula="of:=1/[.D1102]" office:value-type="float" office:value="0.0263852242744063" calcext:value-type="float">
            <text:p>0.0263852242744063</text:p>
          </table:table-cell>
          <table:table-cell table:formula="of:=LOG10([.E1102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103]/[.B1103]" office:value-type="float" office:value="2113.20754716981" calcext:value-type="float">
            <text:p>2113.20754716981</text:p>
          </table:table-cell>
          <table:table-cell table:formula="of:=1/[.D1103]" office:value-type="float" office:value="0.0263852242744063" calcext:value-type="float">
            <text:p>0.0263852242744063</text:p>
          </table:table-cell>
          <table:table-cell table:formula="of:=LOG10([.E1103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7.9" calcext:value-type="float">
            <text:p>37.9</text:p>
          </table:table-cell>
          <table:table-cell table:formula="of:=[.C1104]/[.B1104]" office:value-type="float" office:value="4207.54716981132" calcext:value-type="float">
            <text:p>4207.54716981132</text:p>
          </table:table-cell>
          <table:table-cell table:formula="of:=1/[.D1104]" office:value-type="float" office:value="0.0263852242744063" calcext:value-type="float">
            <text:p>0.0263852242744063</text:p>
          </table:table-cell>
          <table:table-cell table:formula="of:=LOG10([.E1104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105]/[.B1105]" office:value-type="float" office:value="2113.20754716981" calcext:value-type="float">
            <text:p>2113.20754716981</text:p>
          </table:table-cell>
          <table:table-cell table:formula="of:=1/[.D1105]" office:value-type="float" office:value="0.0263852242744063" calcext:value-type="float">
            <text:p>0.0263852242744063</text:p>
          </table:table-cell>
          <table:table-cell table:formula="of:=LOG10([.E1105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9" calcext:value-type="float">
            <text:p>37.9</text:p>
          </table:table-cell>
          <table:table-cell table:formula="of:=[.C1106]/[.B1106]" office:value-type="float" office:value="2113.20754716981" calcext:value-type="float">
            <text:p>2113.20754716981</text:p>
          </table:table-cell>
          <table:table-cell table:formula="of:=1/[.D1106]" office:value-type="float" office:value="0.0263852242744063" calcext:value-type="float">
            <text:p>0.0263852242744063</text:p>
          </table:table-cell>
          <table:table-cell table:formula="of:=LOG10([.E1106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07]/[.B1107]" office:value-type="float" office:value="1408.80503144654" calcext:value-type="float">
            <text:p>1408.80503144654</text:p>
          </table:table-cell>
          <table:table-cell table:formula="of:=1/[.D1107]" office:value-type="float" office:value="0.0264550264550265" calcext:value-type="float">
            <text:p>0.0264550264550265</text:p>
          </table:table-cell>
          <table:table-cell table:formula="of:=LOG10([.E110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08]/[.B1108]" office:value-type="float" office:value="2113.20754716981" calcext:value-type="float">
            <text:p>2113.20754716981</text:p>
          </table:table-cell>
          <table:table-cell table:formula="of:=1/[.D1108]" office:value-type="float" office:value="0.0264550264550265" calcext:value-type="float">
            <text:p>0.0264550264550265</text:p>
          </table:table-cell>
          <table:table-cell table:formula="of:=LOG10([.E1108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7.8" calcext:value-type="float">
            <text:p>37.8</text:p>
          </table:table-cell>
          <table:table-cell table:formula="of:=[.C1109]/[.B1109]" office:value-type="float" office:value="4207.54716981132" calcext:value-type="float">
            <text:p>4207.54716981132</text:p>
          </table:table-cell>
          <table:table-cell table:formula="of:=1/[.D1109]" office:value-type="float" office:value="0.0264550264550265" calcext:value-type="float">
            <text:p>0.0264550264550265</text:p>
          </table:table-cell>
          <table:table-cell table:formula="of:=LOG10([.E1109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0]/[.B1110]" office:value-type="float" office:value="2113.20754716981" calcext:value-type="float">
            <text:p>2113.20754716981</text:p>
          </table:table-cell>
          <table:table-cell table:formula="of:=1/[.D1110]" office:value-type="float" office:value="0.0264550264550265" calcext:value-type="float">
            <text:p>0.0264550264550265</text:p>
          </table:table-cell>
          <table:table-cell table:formula="of:=LOG10([.E1110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1]/[.B1111]" office:value-type="float" office:value="1408.80503144654" calcext:value-type="float">
            <text:p>1408.80503144654</text:p>
          </table:table-cell>
          <table:table-cell table:formula="of:=1/[.D1111]" office:value-type="float" office:value="0.0264550264550265" calcext:value-type="float">
            <text:p>0.0264550264550265</text:p>
          </table:table-cell>
          <table:table-cell table:formula="of:=LOG10([.E1111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2]/[.B1112]" office:value-type="float" office:value="528.301886792453" calcext:value-type="float">
            <text:p>528.301886792453</text:p>
          </table:table-cell>
          <table:table-cell table:formula="of:=1/[.D1112]" office:value-type="float" office:value="0.0264550264550265" calcext:value-type="float">
            <text:p>0.0264550264550265</text:p>
          </table:table-cell>
          <table:table-cell table:formula="of:=LOG10([.E1112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3]/[.B1113]" office:value-type="float" office:value="1056.60377358491" calcext:value-type="float">
            <text:p>1056.60377358491</text:p>
          </table:table-cell>
          <table:table-cell table:formula="of:=1/[.D1113]" office:value-type="float" office:value="0.0264550264550265" calcext:value-type="float">
            <text:p>0.0264550264550265</text:p>
          </table:table-cell>
          <table:table-cell table:formula="of:=LOG10([.E111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4]/[.B1114]" office:value-type="float" office:value="2113.20754716981" calcext:value-type="float">
            <text:p>2113.20754716981</text:p>
          </table:table-cell>
          <table:table-cell table:formula="of:=1/[.D1114]" office:value-type="float" office:value="0.0264550264550265" calcext:value-type="float">
            <text:p>0.0264550264550265</text:p>
          </table:table-cell>
          <table:table-cell table:formula="of:=LOG10([.E1114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5]/[.B1115]" office:value-type="float" office:value="704.402515723271" calcext:value-type="float">
            <text:p>704.402515723271</text:p>
          </table:table-cell>
          <table:table-cell table:formula="of:=1/[.D1115]" office:value-type="float" office:value="0.0264550264550265" calcext:value-type="float">
            <text:p>0.0264550264550265</text:p>
          </table:table-cell>
          <table:table-cell table:formula="of:=LOG10([.E1115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6]/[.B1116]" office:value-type="float" office:value="603.77358490566" calcext:value-type="float">
            <text:p>603.77358490566</text:p>
          </table:table-cell>
          <table:table-cell table:formula="of:=1/[.D1116]" office:value-type="float" office:value="0.0264550264550265" calcext:value-type="float">
            <text:p>0.0264550264550265</text:p>
          </table:table-cell>
          <table:table-cell table:formula="of:=LOG10([.E111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7]/[.B1117]" office:value-type="float" office:value="528.301886792453" calcext:value-type="float">
            <text:p>528.301886792453</text:p>
          </table:table-cell>
          <table:table-cell table:formula="of:=1/[.D1117]" office:value-type="float" office:value="0.0264550264550265" calcext:value-type="float">
            <text:p>0.0264550264550265</text:p>
          </table:table-cell>
          <table:table-cell table:formula="of:=LOG10([.E1117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8]/[.B1118]" office:value-type="float" office:value="1056.60377358491" calcext:value-type="float">
            <text:p>1056.60377358491</text:p>
          </table:table-cell>
          <table:table-cell table:formula="of:=1/[.D1118]" office:value-type="float" office:value="0.0264550264550265" calcext:value-type="float">
            <text:p>0.0264550264550265</text:p>
          </table:table-cell>
          <table:table-cell table:formula="of:=LOG10([.E111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19]/[.B1119]" office:value-type="float" office:value="1056.60377358491" calcext:value-type="float">
            <text:p>1056.60377358491</text:p>
          </table:table-cell>
          <table:table-cell table:formula="of:=1/[.D1119]" office:value-type="float" office:value="0.0264550264550265" calcext:value-type="float">
            <text:p>0.0264550264550265</text:p>
          </table:table-cell>
          <table:table-cell table:formula="of:=LOG10([.E111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0]/[.B1120]" office:value-type="float" office:value="1056.60377358491" calcext:value-type="float">
            <text:p>1056.60377358491</text:p>
          </table:table-cell>
          <table:table-cell table:formula="of:=1/[.D1120]" office:value-type="float" office:value="0.0264550264550265" calcext:value-type="float">
            <text:p>0.0264550264550265</text:p>
          </table:table-cell>
          <table:table-cell table:formula="of:=LOG10([.E112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1]/[.B1121]" office:value-type="float" office:value="1056.60377358491" calcext:value-type="float">
            <text:p>1056.60377358491</text:p>
          </table:table-cell>
          <table:table-cell table:formula="of:=1/[.D1121]" office:value-type="float" office:value="0.0264550264550265" calcext:value-type="float">
            <text:p>0.0264550264550265</text:p>
          </table:table-cell>
          <table:table-cell table:formula="of:=LOG10([.E112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2]/[.B1122]" office:value-type="float" office:value="1056.60377358491" calcext:value-type="float">
            <text:p>1056.60377358491</text:p>
          </table:table-cell>
          <table:table-cell table:formula="of:=1/[.D1122]" office:value-type="float" office:value="0.0264550264550265" calcext:value-type="float">
            <text:p>0.0264550264550265</text:p>
          </table:table-cell>
          <table:table-cell table:formula="of:=LOG10([.E112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3]/[.B1123]" office:value-type="float" office:value="1408.80503144654" calcext:value-type="float">
            <text:p>1408.80503144654</text:p>
          </table:table-cell>
          <table:table-cell table:formula="of:=1/[.D1123]" office:value-type="float" office:value="0.0264550264550265" calcext:value-type="float">
            <text:p>0.0264550264550265</text:p>
          </table:table-cell>
          <table:table-cell table:formula="of:=LOG10([.E112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4]/[.B1124]" office:value-type="float" office:value="1056.60377358491" calcext:value-type="float">
            <text:p>1056.60377358491</text:p>
          </table:table-cell>
          <table:table-cell table:formula="of:=1/[.D1124]" office:value-type="float" office:value="0.0264550264550265" calcext:value-type="float">
            <text:p>0.0264550264550265</text:p>
          </table:table-cell>
          <table:table-cell table:formula="of:=LOG10([.E112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5" calcext:value-type="float">
            <text:p>2.25</text:p>
          </table:table-cell>
          <table:table-cell office:value-type="float" office:value="37.8" calcext:value-type="float">
            <text:p>37.8</text:p>
          </table:table-cell>
          <table:table-cell table:formula="of:=[.C1125]/[.B1125]" office:value-type="float" office:value="849.056603773585" calcext:value-type="float">
            <text:p>849.056603773585</text:p>
          </table:table-cell>
          <table:table-cell table:formula="of:=1/[.D1125]" office:value-type="float" office:value="0.0264550264550265" calcext:value-type="float">
            <text:p>0.0264550264550265</text:p>
          </table:table-cell>
          <table:table-cell table:formula="of:=LOG10([.E1125])" office:value-type="float" office:value="2.92893664417456" calcext:value-type="float">
            <text:p>2.9289366441745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6]/[.B1126]" office:value-type="float" office:value="603.77358490566" calcext:value-type="float">
            <text:p>603.77358490566</text:p>
          </table:table-cell>
          <table:table-cell table:formula="of:=1/[.D1126]" office:value-type="float" office:value="0.0264550264550265" calcext:value-type="float">
            <text:p>0.0264550264550265</text:p>
          </table:table-cell>
          <table:table-cell table:formula="of:=LOG10([.E1126])" office:value-type="float" office:value="2.78087410871912" calcext:value-type="float">
            <text:p>2.7808741087191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formula="of:=[.C1127]/[.B1127]" office:value-type="float" office:value="845.283018867925" calcext:value-type="float">
            <text:p>845.283018867925</text:p>
          </table:table-cell>
          <table:table-cell table:formula="of:=1/[.D1127]" office:value-type="float" office:value="0.0264550264550265" calcext:value-type="float">
            <text:p>0.0264550264550265</text:p>
          </table:table-cell>
          <table:table-cell table:formula="of:=LOG10([.E112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28]/[.B1128]" office:value-type="float" office:value="1056.60377358491" calcext:value-type="float">
            <text:p>1056.60377358491</text:p>
          </table:table-cell>
          <table:table-cell table:formula="of:=1/[.D1128]" office:value-type="float" office:value="0.026525198938992" calcext:value-type="float">
            <text:p>0.026525198938992</text:p>
          </table:table-cell>
          <table:table-cell table:formula="of:=LOG10([.E112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29]/[.B1129]" office:value-type="float" office:value="1056.60377358491" calcext:value-type="float">
            <text:p>1056.60377358491</text:p>
          </table:table-cell>
          <table:table-cell table:formula="of:=1/[.D1129]" office:value-type="float" office:value="0.026525198938992" calcext:value-type="float">
            <text:p>0.026525198938992</text:p>
          </table:table-cell>
          <table:table-cell table:formula="of:=LOG10([.E112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0]/[.B1130]" office:value-type="float" office:value="1056.60377358491" calcext:value-type="float">
            <text:p>1056.60377358491</text:p>
          </table:table-cell>
          <table:table-cell table:formula="of:=1/[.D1130]" office:value-type="float" office:value="0.026525198938992" calcext:value-type="float">
            <text:p>0.026525198938992</text:p>
          </table:table-cell>
          <table:table-cell table:formula="of:=LOG10([.E113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1]/[.B1131]" office:value-type="float" office:value="1056.60377358491" calcext:value-type="float">
            <text:p>1056.60377358491</text:p>
          </table:table-cell>
          <table:table-cell table:formula="of:=1/[.D1131]" office:value-type="float" office:value="0.026525198938992" calcext:value-type="float">
            <text:p>0.026525198938992</text:p>
          </table:table-cell>
          <table:table-cell table:formula="of:=LOG10([.E113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2]/[.B1132]" office:value-type="float" office:value="1056.60377358491" calcext:value-type="float">
            <text:p>1056.60377358491</text:p>
          </table:table-cell>
          <table:table-cell table:formula="of:=1/[.D1132]" office:value-type="float" office:value="0.026525198938992" calcext:value-type="float">
            <text:p>0.026525198938992</text:p>
          </table:table-cell>
          <table:table-cell table:formula="of:=LOG10([.E113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3]/[.B1133]" office:value-type="float" office:value="1056.60377358491" calcext:value-type="float">
            <text:p>1056.60377358491</text:p>
          </table:table-cell>
          <table:table-cell table:formula="of:=1/[.D1133]" office:value-type="float" office:value="0.026525198938992" calcext:value-type="float">
            <text:p>0.026525198938992</text:p>
          </table:table-cell>
          <table:table-cell table:formula="of:=LOG10([.E113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4]/[.B1134]" office:value-type="float" office:value="704.402515723271" calcext:value-type="float">
            <text:p>704.402515723271</text:p>
          </table:table-cell>
          <table:table-cell table:formula="of:=1/[.D1134]" office:value-type="float" office:value="0.026525198938992" calcext:value-type="float">
            <text:p>0.026525198938992</text:p>
          </table:table-cell>
          <table:table-cell table:formula="of:=LOG10([.E1134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5]/[.B1135]" office:value-type="float" office:value="1056.60377358491" calcext:value-type="float">
            <text:p>1056.60377358491</text:p>
          </table:table-cell>
          <table:table-cell table:formula="of:=1/[.D1135]" office:value-type="float" office:value="0.026525198938992" calcext:value-type="float">
            <text:p>0.026525198938992</text:p>
          </table:table-cell>
          <table:table-cell table:formula="of:=LOG10([.E113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6]/[.B1136]" office:value-type="float" office:value="845.283018867925" calcext:value-type="float">
            <text:p>845.283018867925</text:p>
          </table:table-cell>
          <table:table-cell table:formula="of:=1/[.D1136]" office:value-type="float" office:value="0.026525198938992" calcext:value-type="float">
            <text:p>0.026525198938992</text:p>
          </table:table-cell>
          <table:table-cell table:formula="of:=LOG10([.E1136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7]/[.B1137]" office:value-type="float" office:value="845.283018867925" calcext:value-type="float">
            <text:p>845.283018867925</text:p>
          </table:table-cell>
          <table:table-cell table:formula="of:=1/[.D1137]" office:value-type="float" office:value="0.026525198938992" calcext:value-type="float">
            <text:p>0.026525198938992</text:p>
          </table:table-cell>
          <table:table-cell table:formula="of:=LOG10([.E1137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8]/[.B1138]" office:value-type="float" office:value="845.283018867925" calcext:value-type="float">
            <text:p>845.283018867925</text:p>
          </table:table-cell>
          <table:table-cell table:formula="of:=1/[.D1138]" office:value-type="float" office:value="0.026525198938992" calcext:value-type="float">
            <text:p>0.026525198938992</text:p>
          </table:table-cell>
          <table:table-cell table:formula="of:=LOG10([.E1138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39]/[.B1139]" office:value-type="float" office:value="1408.80503144654" calcext:value-type="float">
            <text:p>1408.80503144654</text:p>
          </table:table-cell>
          <table:table-cell table:formula="of:=1/[.D1139]" office:value-type="float" office:value="0.026525198938992" calcext:value-type="float">
            <text:p>0.026525198938992</text:p>
          </table:table-cell>
          <table:table-cell table:formula="of:=LOG10([.E113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0]/[.B1140]" office:value-type="float" office:value="1408.80503144654" calcext:value-type="float">
            <text:p>1408.80503144654</text:p>
          </table:table-cell>
          <table:table-cell table:formula="of:=1/[.D1140]" office:value-type="float" office:value="0.026525198938992" calcext:value-type="float">
            <text:p>0.026525198938992</text:p>
          </table:table-cell>
          <table:table-cell table:formula="of:=LOG10([.E1140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7.7" calcext:value-type="float">
            <text:p>37.7</text:p>
          </table:table-cell>
          <table:table-cell table:formula="of:=[.C1141]/[.B1141]" office:value-type="float" office:value="1051.88679245283" calcext:value-type="float">
            <text:p>1051.88679245283</text:p>
          </table:table-cell>
          <table:table-cell table:formula="of:=1/[.D1141]" office:value-type="float" office:value="0.026525198938992" calcext:value-type="float">
            <text:p>0.026525198938992</text:p>
          </table:table-cell>
          <table:table-cell table:formula="of:=LOG10([.E1141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2]/[.B1142]" office:value-type="float" office:value="1056.60377358491" calcext:value-type="float">
            <text:p>1056.60377358491</text:p>
          </table:table-cell>
          <table:table-cell table:formula="of:=1/[.D1142]" office:value-type="float" office:value="0.026525198938992" calcext:value-type="float">
            <text:p>0.026525198938992</text:p>
          </table:table-cell>
          <table:table-cell table:formula="of:=LOG10([.E114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3]/[.B1143]" office:value-type="float" office:value="1056.60377358491" calcext:value-type="float">
            <text:p>1056.60377358491</text:p>
          </table:table-cell>
          <table:table-cell table:formula="of:=1/[.D1143]" office:value-type="float" office:value="0.026525198938992" calcext:value-type="float">
            <text:p>0.026525198938992</text:p>
          </table:table-cell>
          <table:table-cell table:formula="of:=LOG10([.E1143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7.7" calcext:value-type="float">
            <text:p>37.7</text:p>
          </table:table-cell>
          <table:table-cell table:formula="of:=[.C1144]/[.B1144]" office:value-type="float" office:value="1051.88679245283" calcext:value-type="float">
            <text:p>1051.88679245283</text:p>
          </table:table-cell>
          <table:table-cell table:formula="of:=1/[.D1144]" office:value-type="float" office:value="0.026525198938992" calcext:value-type="float">
            <text:p>0.026525198938992</text:p>
          </table:table-cell>
          <table:table-cell table:formula="of:=LOG10([.E1144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5]/[.B1145]" office:value-type="float" office:value="2113.20754716981" calcext:value-type="float">
            <text:p>2113.20754716981</text:p>
          </table:table-cell>
          <table:table-cell table:formula="of:=1/[.D1145]" office:value-type="float" office:value="0.026525198938992" calcext:value-type="float">
            <text:p>0.026525198938992</text:p>
          </table:table-cell>
          <table:table-cell table:formula="of:=LOG10([.E1145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6]/[.B1146]" office:value-type="float" office:value="1408.80503144654" calcext:value-type="float">
            <text:p>1408.80503144654</text:p>
          </table:table-cell>
          <table:table-cell table:formula="of:=1/[.D1146]" office:value-type="float" office:value="0.026525198938992" calcext:value-type="float">
            <text:p>0.026525198938992</text:p>
          </table:table-cell>
          <table:table-cell table:formula="of:=LOG10([.E114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7]/[.B1147]" office:value-type="float" office:value="704.402515723271" calcext:value-type="float">
            <text:p>704.402515723271</text:p>
          </table:table-cell>
          <table:table-cell table:formula="of:=1/[.D1147]" office:value-type="float" office:value="0.026525198938992" calcext:value-type="float">
            <text:p>0.026525198938992</text:p>
          </table:table-cell>
          <table:table-cell table:formula="of:=LOG10([.E114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8]/[.B1148]" office:value-type="float" office:value="1056.60377358491" calcext:value-type="float">
            <text:p>1056.60377358491</text:p>
          </table:table-cell>
          <table:table-cell table:formula="of:=1/[.D1148]" office:value-type="float" office:value="0.026525198938992" calcext:value-type="float">
            <text:p>0.026525198938992</text:p>
          </table:table-cell>
          <table:table-cell table:formula="of:=LOG10([.E114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49]/[.B1149]" office:value-type="float" office:value="845.283018867925" calcext:value-type="float">
            <text:p>845.283018867925</text:p>
          </table:table-cell>
          <table:table-cell table:formula="of:=1/[.D1149]" office:value-type="float" office:value="0.026525198938992" calcext:value-type="float">
            <text:p>0.026525198938992</text:p>
          </table:table-cell>
          <table:table-cell table:formula="of:=LOG10([.E1149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50]/[.B1150]" office:value-type="float" office:value="845.283018867925" calcext:value-type="float">
            <text:p>845.283018867925</text:p>
          </table:table-cell>
          <table:table-cell table:formula="of:=1/[.D1150]" office:value-type="float" office:value="0.026525198938992" calcext:value-type="float">
            <text:p>0.026525198938992</text:p>
          </table:table-cell>
          <table:table-cell table:formula="of:=LOG10([.E1150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7" calcext:value-type="float">
            <text:p>37.7</text:p>
          </table:table-cell>
          <table:table-cell table:formula="of:=[.C1151]/[.B1151]" office:value-type="float" office:value="1056.60377358491" calcext:value-type="float">
            <text:p>1056.60377358491</text:p>
          </table:table-cell>
          <table:table-cell table:formula="of:=1/[.D1151]" office:value-type="float" office:value="0.026525198938992" calcext:value-type="float">
            <text:p>0.026525198938992</text:p>
          </table:table-cell>
          <table:table-cell table:formula="of:=LOG10([.E115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52]/[.B1152]" office:value-type="float" office:value="1408.80503144654" calcext:value-type="float">
            <text:p>1408.80503144654</text:p>
          </table:table-cell>
          <table:table-cell table:formula="of:=1/[.D1152]" office:value-type="float" office:value="0.0265957446808511" calcext:value-type="float">
            <text:p>0.0265957446808511</text:p>
          </table:table-cell>
          <table:table-cell table:formula="of:=LOG10([.E115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7.6" calcext:value-type="float">
            <text:p>37.6</text:p>
          </table:table-cell>
          <table:table-cell table:formula="of:=[.C1153]/[.B1153]" office:value-type="float" office:value="1051.88679245283" calcext:value-type="float">
            <text:p>1051.88679245283</text:p>
          </table:table-cell>
          <table:table-cell table:formula="of:=1/[.D1153]" office:value-type="float" office:value="0.0265957446808511" calcext:value-type="float">
            <text:p>0.0265957446808511</text:p>
          </table:table-cell>
          <table:table-cell table:formula="of:=LOG10([.E1153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54]/[.B1154]" office:value-type="float" office:value="1056.60377358491" calcext:value-type="float">
            <text:p>1056.60377358491</text:p>
          </table:table-cell>
          <table:table-cell table:formula="of:=1/[.D1154]" office:value-type="float" office:value="0.0265957446808511" calcext:value-type="float">
            <text:p>0.0265957446808511</text:p>
          </table:table-cell>
          <table:table-cell table:formula="of:=LOG10([.E115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55]/[.B1155]" office:value-type="float" office:value="1408.80503144654" calcext:value-type="float">
            <text:p>1408.80503144654</text:p>
          </table:table-cell>
          <table:table-cell table:formula="of:=1/[.D1155]" office:value-type="float" office:value="0.0265957446808511" calcext:value-type="float">
            <text:p>0.0265957446808511</text:p>
          </table:table-cell>
          <table:table-cell table:formula="of:=LOG10([.E115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23" calcext:value-type="float">
            <text:p>2.23</text:p>
          </table:table-cell>
          <table:table-cell office:value-type="float" office:value="37.6" calcext:value-type="float">
            <text:p>37.6</text:p>
          </table:table-cell>
          <table:table-cell table:formula="of:=[.C1156]/[.B1156]" office:value-type="float" office:value="4207.54716981132" calcext:value-type="float">
            <text:p>4207.54716981132</text:p>
          </table:table-cell>
          <table:table-cell table:formula="of:=1/[.D1156]" office:value-type="float" office:value="0.0265957446808511" calcext:value-type="float">
            <text:p>0.0265957446808511</text:p>
          </table:table-cell>
          <table:table-cell table:formula="of:=LOG10([.E1156])" office:value-type="float" office:value="3.62402899344737" calcext:value-type="float">
            <text:p>3.6240289934473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57]/[.B1157]" office:value-type="float" office:value="704.402515723271" calcext:value-type="float">
            <text:p>704.402515723271</text:p>
          </table:table-cell>
          <table:table-cell table:formula="of:=1/[.D1157]" office:value-type="float" office:value="0.0265957446808511" calcext:value-type="float">
            <text:p>0.0265957446808511</text:p>
          </table:table-cell>
          <table:table-cell table:formula="of:=LOG10([.E115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58]/[.B1158]" office:value-type="float" office:value="704.402515723271" calcext:value-type="float">
            <text:p>704.402515723271</text:p>
          </table:table-cell>
          <table:table-cell table:formula="of:=1/[.D1158]" office:value-type="float" office:value="0.0265957446808511" calcext:value-type="float">
            <text:p>0.0265957446808511</text:p>
          </table:table-cell>
          <table:table-cell table:formula="of:=LOG10([.E1158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59]/[.B1159]" office:value-type="float" office:value="528.301886792453" calcext:value-type="float">
            <text:p>528.301886792453</text:p>
          </table:table-cell>
          <table:table-cell table:formula="of:=1/[.D1159]" office:value-type="float" office:value="0.0265957446808511" calcext:value-type="float">
            <text:p>0.0265957446808511</text:p>
          </table:table-cell>
          <table:table-cell table:formula="of:=LOG10([.E1159])" office:value-type="float" office:value="2.72288216174143" calcext:value-type="float">
            <text:p>2.7228821617414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0]/[.B1160]" office:value-type="float" office:value="1056.60377358491" calcext:value-type="float">
            <text:p>1056.60377358491</text:p>
          </table:table-cell>
          <table:table-cell table:formula="of:=1/[.D1160]" office:value-type="float" office:value="0.0265957446808511" calcext:value-type="float">
            <text:p>0.0265957446808511</text:p>
          </table:table-cell>
          <table:table-cell table:formula="of:=LOG10([.E116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1]/[.B1161]" office:value-type="float" office:value="1056.60377358491" calcext:value-type="float">
            <text:p>1056.60377358491</text:p>
          </table:table-cell>
          <table:table-cell table:formula="of:=1/[.D1161]" office:value-type="float" office:value="0.0265957446808511" calcext:value-type="float">
            <text:p>0.0265957446808511</text:p>
          </table:table-cell>
          <table:table-cell table:formula="of:=LOG10([.E116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2]/[.B1162]" office:value-type="float" office:value="845.283018867925" calcext:value-type="float">
            <text:p>845.283018867925</text:p>
          </table:table-cell>
          <table:table-cell table:formula="of:=1/[.D1162]" office:value-type="float" office:value="0.0265957446808511" calcext:value-type="float">
            <text:p>0.0265957446808511</text:p>
          </table:table-cell>
          <table:table-cell table:formula="of:=LOG10([.E1162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3]/[.B1163]" office:value-type="float" office:value="1408.80503144654" calcext:value-type="float">
            <text:p>1408.80503144654</text:p>
          </table:table-cell>
          <table:table-cell table:formula="of:=1/[.D1163]" office:value-type="float" office:value="0.0265957446808511" calcext:value-type="float">
            <text:p>0.0265957446808511</text:p>
          </table:table-cell>
          <table:table-cell table:formula="of:=LOG10([.E116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4]/[.B1164]" office:value-type="float" office:value="1056.60377358491" calcext:value-type="float">
            <text:p>1056.60377358491</text:p>
          </table:table-cell>
          <table:table-cell table:formula="of:=1/[.D1164]" office:value-type="float" office:value="0.0265957446808511" calcext:value-type="float">
            <text:p>0.0265957446808511</text:p>
          </table:table-cell>
          <table:table-cell table:formula="of:=LOG10([.E116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5]/[.B1165]" office:value-type="float" office:value="1408.80503144654" calcext:value-type="float">
            <text:p>1408.80503144654</text:p>
          </table:table-cell>
          <table:table-cell table:formula="of:=1/[.D1165]" office:value-type="float" office:value="0.0265957446808511" calcext:value-type="float">
            <text:p>0.0265957446808511</text:p>
          </table:table-cell>
          <table:table-cell table:formula="of:=LOG10([.E116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6]/[.B1166]" office:value-type="float" office:value="1408.80503144654" calcext:value-type="float">
            <text:p>1408.80503144654</text:p>
          </table:table-cell>
          <table:table-cell table:formula="of:=1/[.D1166]" office:value-type="float" office:value="0.0265957446808511" calcext:value-type="float">
            <text:p>0.0265957446808511</text:p>
          </table:table-cell>
          <table:table-cell table:formula="of:=LOG10([.E1166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7]/[.B1167]" office:value-type="float" office:value="1056.60377358491" calcext:value-type="float">
            <text:p>1056.60377358491</text:p>
          </table:table-cell>
          <table:table-cell table:formula="of:=1/[.D1167]" office:value-type="float" office:value="0.0265957446808511" calcext:value-type="float">
            <text:p>0.0265957446808511</text:p>
          </table:table-cell>
          <table:table-cell table:formula="of:=LOG10([.E116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7.6" calcext:value-type="float">
            <text:p>37.6</text:p>
          </table:table-cell>
          <table:table-cell table:formula="of:=[.C1168]/[.B1168]" office:value-type="float" office:value="1051.88679245283" calcext:value-type="float">
            <text:p>1051.88679245283</text:p>
          </table:table-cell>
          <table:table-cell table:formula="of:=1/[.D1168]" office:value-type="float" office:value="0.0265957446808511" calcext:value-type="float">
            <text:p>0.0265957446808511</text:p>
          </table:table-cell>
          <table:table-cell table:formula="of:=LOG10([.E1168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69]/[.B1169]" office:value-type="float" office:value="1056.60377358491" calcext:value-type="float">
            <text:p>1056.60377358491</text:p>
          </table:table-cell>
          <table:table-cell table:formula="of:=1/[.D1169]" office:value-type="float" office:value="0.0265957446808511" calcext:value-type="float">
            <text:p>0.0265957446808511</text:p>
          </table:table-cell>
          <table:table-cell table:formula="of:=LOG10([.E116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70]/[.B1170]" office:value-type="float" office:value="1056.60377358491" calcext:value-type="float">
            <text:p>1056.60377358491</text:p>
          </table:table-cell>
          <table:table-cell table:formula="of:=1/[.D1170]" office:value-type="float" office:value="0.0265957446808511" calcext:value-type="float">
            <text:p>0.0265957446808511</text:p>
          </table:table-cell>
          <table:table-cell table:formula="of:=LOG10([.E117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71]/[.B1171]" office:value-type="float" office:value="2113.20754716981" calcext:value-type="float">
            <text:p>2113.20754716981</text:p>
          </table:table-cell>
          <table:table-cell table:formula="of:=1/[.D1171]" office:value-type="float" office:value="0.0265957446808511" calcext:value-type="float">
            <text:p>0.0265957446808511</text:p>
          </table:table-cell>
          <table:table-cell table:formula="of:=LOG10([.E1171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72]/[.B1172]" office:value-type="float" office:value="1408.80503144654" calcext:value-type="float">
            <text:p>1408.80503144654</text:p>
          </table:table-cell>
          <table:table-cell table:formula="of:=1/[.D1172]" office:value-type="float" office:value="0.0265957446808511" calcext:value-type="float">
            <text:p>0.0265957446808511</text:p>
          </table:table-cell>
          <table:table-cell table:formula="of:=LOG10([.E1172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73]/[.B1173]" office:value-type="float" office:value="845.283018867925" calcext:value-type="float">
            <text:p>845.283018867925</text:p>
          </table:table-cell>
          <table:table-cell table:formula="of:=1/[.D1173]" office:value-type="float" office:value="0.0265957446808511" calcext:value-type="float">
            <text:p>0.0265957446808511</text:p>
          </table:table-cell>
          <table:table-cell table:formula="of:=LOG10([.E1173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74]/[.B1174]" office:value-type="float" office:value="1408.80503144654" calcext:value-type="float">
            <text:p>1408.80503144654</text:p>
          </table:table-cell>
          <table:table-cell table:formula="of:=1/[.D1174]" office:value-type="float" office:value="0.0265957446808511" calcext:value-type="float">
            <text:p>0.0265957446808511</text:p>
          </table:table-cell>
          <table:table-cell table:formula="of:=LOG10([.E1174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6" calcext:value-type="float">
            <text:p>37.6</text:p>
          </table:table-cell>
          <table:table-cell table:formula="of:=[.C1175]/[.B1175]" office:value-type="float" office:value="2113.20754716981" calcext:value-type="float">
            <text:p>2113.20754716981</text:p>
          </table:table-cell>
          <table:table-cell table:formula="of:=1/[.D1175]" office:value-type="float" office:value="0.0265957446808511" calcext:value-type="float">
            <text:p>0.0265957446808511</text:p>
          </table:table-cell>
          <table:table-cell table:formula="of:=LOG10([.E1175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76]/[.B1176]" office:value-type="float" office:value="1056.60377358491" calcext:value-type="float">
            <text:p>1056.60377358491</text:p>
          </table:table-cell>
          <table:table-cell table:formula="of:=1/[.D1176]" office:value-type="float" office:value="0.0266666666666667" calcext:value-type="float">
            <text:p>0.0266666666666667</text:p>
          </table:table-cell>
          <table:table-cell table:formula="of:=LOG10([.E117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77]/[.B1177]" office:value-type="float" office:value="704.402515723271" calcext:value-type="float">
            <text:p>704.402515723271</text:p>
          </table:table-cell>
          <table:table-cell table:formula="of:=1/[.D1177]" office:value-type="float" office:value="0.0266666666666667" calcext:value-type="float">
            <text:p>0.0266666666666667</text:p>
          </table:table-cell>
          <table:table-cell table:formula="of:=LOG10([.E1177])" office:value-type="float" office:value="2.84782089834973" calcext:value-type="float">
            <text:p>2.8478208983497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78]/[.B1178]" office:value-type="float" office:value="1056.60377358491" calcext:value-type="float">
            <text:p>1056.60377358491</text:p>
          </table:table-cell>
          <table:table-cell table:formula="of:=1/[.D1178]" office:value-type="float" office:value="0.0266666666666667" calcext:value-type="float">
            <text:p>0.0266666666666667</text:p>
          </table:table-cell>
          <table:table-cell table:formula="of:=LOG10([.E1178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79]/[.B1179]" office:value-type="float" office:value="1056.60377358491" calcext:value-type="float">
            <text:p>1056.60377358491</text:p>
          </table:table-cell>
          <table:table-cell table:formula="of:=1/[.D1179]" office:value-type="float" office:value="0.0266666666666667" calcext:value-type="float">
            <text:p>0.0266666666666667</text:p>
          </table:table-cell>
          <table:table-cell table:formula="of:=LOG10([.E1179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0]/[.B1180]" office:value-type="float" office:value="1056.60377358491" calcext:value-type="float">
            <text:p>1056.60377358491</text:p>
          </table:table-cell>
          <table:table-cell table:formula="of:=1/[.D1180]" office:value-type="float" office:value="0.0266666666666667" calcext:value-type="float">
            <text:p>0.0266666666666667</text:p>
          </table:table-cell>
          <table:table-cell table:formula="of:=LOG10([.E118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1]/[.B1181]" office:value-type="float" office:value="1056.60377358491" calcext:value-type="float">
            <text:p>1056.60377358491</text:p>
          </table:table-cell>
          <table:table-cell table:formula="of:=1/[.D1181]" office:value-type="float" office:value="0.0266666666666667" calcext:value-type="float">
            <text:p>0.0266666666666667</text:p>
          </table:table-cell>
          <table:table-cell table:formula="of:=LOG10([.E1181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2]/[.B1182]" office:value-type="float" office:value="1056.60377358491" calcext:value-type="float">
            <text:p>1056.60377358491</text:p>
          </table:table-cell>
          <table:table-cell table:formula="of:=1/[.D1182]" office:value-type="float" office:value="0.0266666666666667" calcext:value-type="float">
            <text:p>0.0266666666666667</text:p>
          </table:table-cell>
          <table:table-cell table:formula="of:=LOG10([.E118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3]/[.B1183]" office:value-type="float" office:value="1408.80503144654" calcext:value-type="float">
            <text:p>1408.80503144654</text:p>
          </table:table-cell>
          <table:table-cell table:formula="of:=1/[.D1183]" office:value-type="float" office:value="0.0266666666666667" calcext:value-type="float">
            <text:p>0.0266666666666667</text:p>
          </table:table-cell>
          <table:table-cell table:formula="of:=LOG10([.E1183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4]/[.B1184]" office:value-type="float" office:value="1056.60377358491" calcext:value-type="float">
            <text:p>1056.60377358491</text:p>
          </table:table-cell>
          <table:table-cell table:formula="of:=1/[.D1184]" office:value-type="float" office:value="0.0266666666666667" calcext:value-type="float">
            <text:p>0.0266666666666667</text:p>
          </table:table-cell>
          <table:table-cell table:formula="of:=LOG10([.E1184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5]/[.B1185]" office:value-type="float" office:value="1408.80503144654" calcext:value-type="float">
            <text:p>1408.80503144654</text:p>
          </table:table-cell>
          <table:table-cell table:formula="of:=1/[.D1185]" office:value-type="float" office:value="0.0266666666666667" calcext:value-type="float">
            <text:p>0.0266666666666667</text:p>
          </table:table-cell>
          <table:table-cell table:formula="of:=LOG10([.E1185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6]/[.B1186]" office:value-type="float" office:value="1056.60377358491" calcext:value-type="float">
            <text:p>1056.60377358491</text:p>
          </table:table-cell>
          <table:table-cell table:formula="of:=1/[.D1186]" office:value-type="float" office:value="0.0266666666666667" calcext:value-type="float">
            <text:p>0.0266666666666667</text:p>
          </table:table-cell>
          <table:table-cell table:formula="of:=LOG10([.E118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7]/[.B1187]" office:value-type="float" office:value="1408.80503144654" calcext:value-type="float">
            <text:p>1408.80503144654</text:p>
          </table:table-cell>
          <table:table-cell table:formula="of:=1/[.D1187]" office:value-type="float" office:value="0.0266666666666667" calcext:value-type="float">
            <text:p>0.0266666666666667</text:p>
          </table:table-cell>
          <table:table-cell table:formula="of:=LOG10([.E1187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8]/[.B1188]" office:value-type="float" office:value="2113.20754716981" calcext:value-type="float">
            <text:p>2113.20754716981</text:p>
          </table:table-cell>
          <table:table-cell table:formula="of:=1/[.D1188]" office:value-type="float" office:value="0.0266666666666667" calcext:value-type="float">
            <text:p>0.0266666666666667</text:p>
          </table:table-cell>
          <table:table-cell table:formula="of:=LOG10([.E1188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89]/[.B1189]" office:value-type="float" office:value="1408.80503144654" calcext:value-type="float">
            <text:p>1408.80503144654</text:p>
          </table:table-cell>
          <table:table-cell table:formula="of:=1/[.D1189]" office:value-type="float" office:value="0.0266666666666667" calcext:value-type="float">
            <text:p>0.0266666666666667</text:p>
          </table:table-cell>
          <table:table-cell table:formula="of:=LOG10([.E1189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90]/[.B1190]" office:value-type="float" office:value="2113.20754716981" calcext:value-type="float">
            <text:p>2113.20754716981</text:p>
          </table:table-cell>
          <table:table-cell table:formula="of:=1/[.D1190]" office:value-type="float" office:value="0.0266666666666667" calcext:value-type="float">
            <text:p>0.0266666666666667</text:p>
          </table:table-cell>
          <table:table-cell table:formula="of:=LOG10([.E1190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91]/[.B1191]" office:value-type="float" office:value="1408.80503144654" calcext:value-type="float">
            <text:p>1408.80503144654</text:p>
          </table:table-cell>
          <table:table-cell table:formula="of:=1/[.D1191]" office:value-type="float" office:value="0.0266666666666667" calcext:value-type="float">
            <text:p>0.0266666666666667</text:p>
          </table:table-cell>
          <table:table-cell table:formula="of:=LOG10([.E1191])" office:value-type="float" office:value="3.14885089401371" calcext:value-type="float">
            <text:p>3.1488508940137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92]/[.B1192]" office:value-type="float" office:value="2113.20754716981" calcext:value-type="float">
            <text:p>2113.20754716981</text:p>
          </table:table-cell>
          <table:table-cell table:formula="of:=1/[.D1192]" office:value-type="float" office:value="0.0266666666666667" calcext:value-type="float">
            <text:p>0.0266666666666667</text:p>
          </table:table-cell>
          <table:table-cell table:formula="of:=LOG10([.E1192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4" calcext:value-type="float">
            <text:p>2.24</text:p>
          </table:table-cell>
          <table:table-cell office:value-type="float" office:value="37.5" calcext:value-type="float">
            <text:p>37.5</text:p>
          </table:table-cell>
          <table:table-cell table:formula="of:=[.C1193]/[.B1193]" office:value-type="float" office:value="2113.20754716981" calcext:value-type="float">
            <text:p>2113.20754716981</text:p>
          </table:table-cell>
          <table:table-cell table:formula="of:=1/[.D1193]" office:value-type="float" office:value="0.0266666666666667" calcext:value-type="float">
            <text:p>0.0266666666666667</text:p>
          </table:table-cell>
          <table:table-cell table:formula="of:=LOG10([.E1193])" office:value-type="float" office:value="3.32494215306939" calcext:value-type="float">
            <text:p>3.3249421530693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.23" calcext:value-type="float">
            <text:p>2.23</text:p>
          </table:table-cell>
          <table:table-cell office:value-type="float" office:value="37.4" calcext:value-type="float">
            <text:p>37.4</text:p>
          </table:table-cell>
          <table:table-cell table:formula="of:=[.C1194]/[.B1194]" office:value-type="float" office:value="2103.77358490566" calcext:value-type="float">
            <text:p>2103.77358490566</text:p>
          </table:table-cell>
          <table:table-cell table:formula="of:=1/[.D1194]" office:value-type="float" office:value="0.0267379679144385" calcext:value-type="float">
            <text:p>0.0267379679144385</text:p>
          </table:table-cell>
          <table:table-cell table:formula="of:=LOG10([.E1194])" office:value-type="float" office:value="3.32299899778339" calcext:value-type="float">
            <text:p>3.322998997783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195]/[.B1195]" office:value-type="float" office:value="1056.60377358491" calcext:value-type="float">
            <text:p>1056.60377358491</text:p>
          </table:table-cell>
          <table:table-cell table:formula="of:=1/[.D1195]" office:value-type="float" office:value="0.0267379679144385" calcext:value-type="float">
            <text:p>0.0267379679144385</text:p>
          </table:table-cell>
          <table:table-cell table:formula="of:=LOG10([.E1195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196]/[.B1196]" office:value-type="float" office:value="1056.60377358491" calcext:value-type="float">
            <text:p>1056.60377358491</text:p>
          </table:table-cell>
          <table:table-cell table:formula="of:=1/[.D1196]" office:value-type="float" office:value="0.0267379679144385" calcext:value-type="float">
            <text:p>0.0267379679144385</text:p>
          </table:table-cell>
          <table:table-cell table:formula="of:=LOG10([.E1196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197]/[.B1197]" office:value-type="float" office:value="1056.60377358491" calcext:value-type="float">
            <text:p>1056.60377358491</text:p>
          </table:table-cell>
          <table:table-cell table:formula="of:=1/[.D1197]" office:value-type="float" office:value="0.0267379679144385" calcext:value-type="float">
            <text:p>0.0267379679144385</text:p>
          </table:table-cell>
          <table:table-cell table:formula="of:=LOG10([.E1197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23" calcext:value-type="float">
            <text:p>2.23</text:p>
          </table:table-cell>
          <table:table-cell office:value-type="float" office:value="37.4" calcext:value-type="float">
            <text:p>37.4</text:p>
          </table:table-cell>
          <table:table-cell table:formula="of:=[.C1198]/[.B1198]" office:value-type="float" office:value="1402.51572327044" calcext:value-type="float">
            <text:p>1402.51572327044</text:p>
          </table:table-cell>
          <table:table-cell table:formula="of:=1/[.D1198]" office:value-type="float" office:value="0.0267379679144385" calcext:value-type="float">
            <text:p>0.0267379679144385</text:p>
          </table:table-cell>
          <table:table-cell table:formula="of:=LOG10([.E1198])" office:value-type="float" office:value="3.14690773872771" calcext:value-type="float">
            <text:p>3.1469077387277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3" calcext:value-type="float">
            <text:p>2.23</text:p>
          </table:table-cell>
          <table:table-cell office:value-type="float" office:value="37.4" calcext:value-type="float">
            <text:p>37.4</text:p>
          </table:table-cell>
          <table:table-cell table:formula="of:=[.C1199]/[.B1199]" office:value-type="float" office:value="1051.88679245283" calcext:value-type="float">
            <text:p>1051.88679245283</text:p>
          </table:table-cell>
          <table:table-cell table:formula="of:=1/[.D1199]" office:value-type="float" office:value="0.0267379679144385" calcext:value-type="float">
            <text:p>0.0267379679144385</text:p>
          </table:table-cell>
          <table:table-cell table:formula="of:=LOG10([.E1199])" office:value-type="float" office:value="3.02196900211941" calcext:value-type="float">
            <text:p>3.0219690021194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200]/[.B1200]" office:value-type="float" office:value="1056.60377358491" calcext:value-type="float">
            <text:p>1056.60377358491</text:p>
          </table:table-cell>
          <table:table-cell table:formula="of:=1/[.D1200]" office:value-type="float" office:value="0.0267379679144385" calcext:value-type="float">
            <text:p>0.0267379679144385</text:p>
          </table:table-cell>
          <table:table-cell table:formula="of:=LOG10([.E1200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201]/[.B1201]" office:value-type="float" office:value="845.283018867925" calcext:value-type="float">
            <text:p>845.283018867925</text:p>
          </table:table-cell>
          <table:table-cell table:formula="of:=1/[.D1201]" office:value-type="float" office:value="0.0267379679144385" calcext:value-type="float">
            <text:p>0.0267379679144385</text:p>
          </table:table-cell>
          <table:table-cell table:formula="of:=LOG10([.E1201])" office:value-type="float" office:value="2.92700214439736" calcext:value-type="float">
            <text:p>2.9270021443973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202]/[.B1202]" office:value-type="float" office:value="1056.60377358491" calcext:value-type="float">
            <text:p>1056.60377358491</text:p>
          </table:table-cell>
          <table:table-cell table:formula="of:=1/[.D1202]" office:value-type="float" office:value="0.0267379679144385" calcext:value-type="float">
            <text:p>0.0267379679144385</text:p>
          </table:table-cell>
          <table:table-cell table:formula="of:=LOG10([.E1202])" office:value-type="float" office:value="3.02391215740541" calcext:value-type="float">
            <text:p>3.0239121574054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4" calcext:value-type="float">
            <text:p>2.24</text:p>
          </table:table-cell>
          <table:table-cell office:value-type="float" office:value="37.4" calcext:value-type="float">
            <text:p>37.4</text:p>
          </table:table-cell>
          <table:table-cell table:formula="of:=[.C1203]/[.B1203]" office:value-type="float" office:value="1056.60377358491" calcext:value-type="float">
            <text:p>1056.60377358491</text:p>
          </table:table-cell>
          <table:table-cell table:formula="of:=1/[.D1203]" office:value-type="float" office:value="0.0267379679144385" calcext:value-type="float">
            <text:p>0.0267379679144385</text:p>
          </table:table-cell>
          <table:table-cell table:formula="of:=LOG10([.E1203])" office:value-type="float" office:value="3.02391215740541" calcext:value-type="float">
            <text:p>3.02391215740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5:39:07.1249050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6-25T15:44:03.729800192</dc:date>
    <meta:editing-duration>PT6M35S</meta:editing-duration>
    <meta:editing-cycles>4</meta:editing-cycles>
    <meta:document-statistic meta:table-count="1" meta:cell-count="8421" meta:object-count="0"/>
  </office:meta>
</office:document-meta>
</file>